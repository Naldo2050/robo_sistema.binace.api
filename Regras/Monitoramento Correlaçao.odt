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 style:list-style-name="L1">
      <style:paragraph-properties fo:margin-left="0cm" fo:margin-right="0cm" fo:text-indent="0cm" style:auto-text-indent="false" style:writing-mode="lr-tb"/>
    </style:style>
    <style:style style:name="P2" style:family="paragraph" style:parent-style-name="Heading_20_2" style:list-style-name="L1">
      <style:paragraph-properties fo:margin-left="0cm" fo:margin-right="0cm" fo:text-indent="0cm" style:auto-text-indent="false" style:writing-mode="lr-tb"/>
    </style:style>
    <style:style style:name="P3" style:family="paragraph" style:parent-style-name="Horizontal_20_Line" style:list-style-name="L1">
      <style:paragraph-properties style:writing-mode="lr-tb"/>
    </style:style>
    <style:style style:name="P4" style:family="paragraph" style:parent-style-name="Heading_20_3" style:list-style-name="L1">
      <style:paragraph-properties fo:margin-left="0cm" fo:margin-right="0cm" fo:text-indent="0cm" style:auto-text-indent="false" style:writing-mode="lr-tb"/>
    </style:style>
    <style:style style:name="P5" style:family="paragraph" style:parent-style-name="Text_20_body" style:list-style-name="L1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8" style:family="paragraph" style:parent-style-name="Quotations" style:list-style-name="L1">
      <style:paragraph-properties fo:margin-left="1cm" fo:margin-right="1cm" fo:text-indent="0cm" style:auto-text-indent="false" style:writing-mode="lr-tb"/>
    </style:style>
    <style:style style:name="P9" style:family="paragraph" style:parent-style-name="Text_20_body">
      <style:paragraph-properties fo:margin-left="0cm" fo:margin-right="0cm" fo:text-indent="0cm" style:auto-text-indent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h text:style-name="P1" text:outline-level="1">PLANO INSTITUCIONAL — SISTEMA DE FREQUÊNCIA CORRELACIONAL</text:h>
          <text:list>
            <text:list-header>
              <text:h text:style-name="P2" text:outline-level="2"><text:span text:style-name="Strong_20_Emphasis">PROJETO: CORR-SYNC | WIN x WDO</text:span></text:h>
            </text:list-header>
          </text:list>
          <text:p text:style-name="P3"/>
          <text:list text:continue-numbering="true">
            <text:list-header>
              <text:h text:style-name="P2" text:outline-level="2">PARTE 1 — FUNDAMENTO CONCEITUAL</text:h>
              <text:list>
                <text:list-header>
                  <text:h text:style-name="P4" text:outline-level="3">1.1 Premissa Central</text:h>
                </text:list-header>
              </text:list>
            </text:list-header>
          </text:list>
          <text:p text:style-name="P5">O Mini Índice (WIN) e o Mini Dólar (WDO) possuem uma correlação negativa estrutural enraizada em fundamentos macroeconômicos brasileiros. Essa correlação <text:span text:style-name="Strong_20_Emphasis">não é constante</text:span> — ela oscila em intensidade, se comprime, se expande, e por vezes se rompe temporariamente. É justamente nessa <text:span text:style-name="Strong_20_Emphasis">variação de frequência correlacional</text:span> que residem as oportunidades.</text:p>
          <text:list>
            <text:list-item>
              <text:list>
                <text:list-header>
                  <text:h text:style-name="P4" text:outline-level="3">1.2 A Tese Operacional</text:h>
                </text:list-header>
              </text:list>
            </text:list-item>
          </text:list>
          <text:p text:style-name="P5">Quando a correlação negativa se enfraquece ou se desincroniza (um ativo anda e o outro fica parado, ou ambos andam na mesma direção), existe uma <text:span text:style-name="Strong_20_Emphasis">tensão acumulada</text:span>. O sistema busca identificar <text:span text:style-name="Strong_20_Emphasis">sinais precursores</text:span> de que essa tensão está prestes a se resolver — ou seja, que a correlação negativa vai se reafirmar.</text:p>
          <text:list>
            <text:list-item>
              <text:list>
                <text:list-header>
                  <text:h text:style-name="P4" text:outline-level="3">1.3 Três Estados de Mercado a Monitorar</text:h>
                </text:list-header>
              </text:list>
            </text:list-item>
          </text:list>
          <text:p text:style-name="P6">text</text:p>
          <text:p text:style-name="P7"><text:span text:style-name="Source_20_Text">ESTADO 1 — SINCRONIA ATIVA</text:span></text:p>
          <text:p text:style-name="P7"><text:span text:style-name="Source_20_Text">├── Correlação negativa funcionando normalmente</text:span></text:p>
          <text:p text:style-name="P7"><text:span text:style-name="Source_20_Text">├── WIN sobe → WDO desce (e vice-versa)</text:span></text:p>
          <text:p text:style-name="P7"><text:span text:style-name="Source_20_Text">└── Estado de "equilíbrio dinâmico"</text:span></text:p>
          <text:p text:style-name="P7"/>
          <text:p text:style-name="P7"><text:span text:style-name="Source_20_Text">ESTADO 2 — DESSINCRONIA (TENSÃO)</text:span></text:p>
          <text:p text:style-name="P7"><text:span text:style-name="Source_20_Text">├── Um ativo se move, o outro fica travado</text:span></text:p>
          <text:p text:style-name="P7"><text:span text:style-name="Source_20_Text">├── OU ambos se movem na mesma direção</text:span></text:p>
          <text:p text:style-name="P7"><text:span text:style-name="Source_20_Text">├── Tensão correlacional se acumula</text:span></text:p>
          <text:p text:style-name="P7"><text:span text:style-name="Source_20_Text">└── É aqui que o sistema se prepara</text:span></text:p>
          <text:p text:style-name="P7"/>
          <text:p text:style-name="P7"><text:span text:style-name="Source_20_Text">ESTADO 3 — RECONVERGÊNCIA</text:span></text:p>
          <text:p text:style-name="P7"><text:span text:style-name="Source_20_Text">├── A correlação negativa se reafirma</text:span></text:p>
          <text:p text:style-name="P7"><text:span text:style-name="Source_20_Text">├── O ativo "atrasado" faz o movimento compensatório</text:span></text:p>
          <text:p text:style-name="P7"><text:span text:style-name="Source_20_Text">├── OU ambos corrigem para restaurar a relação</text:span></text:p>
          <text:p text:style-name="P6"><text:span text:style-name="Source_20_Text">└── É aqui que o sistema atua</text:span></text:p>
          <text:p text:style-name="P3"/>
          <text:list text:continue-numbering="true">
            <text:list-header>
              <text:h text:style-name="P2" text:outline-level="2"><text:soft-page-break/>PARTE 2 — ARQUITETURA DO SISTEMA</text:h>
              <text:list>
                <text:list-header>
                  <text:h text:style-name="P4" text:outline-level="3">2.1 Camadas de Análise</text:h>
                </text:list-header>
              </text:list>
            </text:list-header>
          </text:list>
          <text:p text:style-name="P6">text</text:p>
          <text:p text:style-name="P7"><text:span text:style-name="Source_20_Text">CAMADA 1 — MACRO CORRELACIONAL</text:span></text:p>
          <text:p text:style-name="P7"><text:span text:style-name="Source_20_Text">│ <text:s text:c="2"/>Horizonte: Diário / Semanal</text:span></text:p>
          <text:p text:style-name="P7"><text:span text:style-name="Source_20_Text">│ <text:s text:c="2"/>Objetivo: Medir o regime atual de correlação</text:span></text:p>
          <text:p text:style-name="P7"><text:span text:style-name="Source_20_Text">│ <text:s text:c="2"/>Pergunta: "Estamos em período de correlação forte, fraca ou invertida?"</text:span></text:p>
          <text:p text:style-name="P7"><text:span text:style-name="Source_20_Text">│</text:span></text:p>
          <text:p text:style-name="P7"><text:span text:style-name="Source_20_Text">CAMADA 2 — DINÂMICA DE FREQUÊNCIA</text:span></text:p>
          <text:p text:style-name="P7"><text:span text:style-name="Source_20_Text">│ <text:s text:c="2"/>Horizonte: Intraday (5min, 15min, 60min)</text:span></text:p>
          <text:p text:style-name="P7"><text:span text:style-name="Source_20_Text">│ <text:s text:c="2"/>Objetivo: Detectar ciclos de sincronia e dessincronia</text:span></text:p>
          <text:p text:style-name="P7"><text:span text:style-name="Source_20_Text">│ <text:s text:c="2"/>Pergunta: "Qual a frequência atual dos ciclos de reconvergência?"</text:span></text:p>
          <text:p text:style-name="P7"><text:span text:style-name="Source_20_Text">│</text:span></text:p>
          <text:p text:style-name="P7"><text:span text:style-name="Source_20_Text">CAMADA 3 — DETECÇÃO DE TENSÃO</text:span></text:p>
          <text:p text:style-name="P7"><text:span text:style-name="Source_20_Text">│ <text:s text:c="2"/>Horizonte: Intraday (1min, 5min)</text:span></text:p>
          <text:p text:style-name="P7"><text:span text:style-name="Source_20_Text">│ <text:s text:c="2"/>Objetivo: Identificar acúmulo de divergência</text:span></text:p>
          <text:p text:style-name="P7"><text:span text:style-name="Source_20_Text">│ <text:s text:c="2"/>Pergunta: "Quanto de tensão está acumulada agora?"</text:span></text:p>
          <text:p text:style-name="P7"><text:span text:style-name="Source_20_Text">│</text:span></text:p>
          <text:p text:style-name="P7"><text:span text:style-name="Source_20_Text">CAMADA 4 — SINAIS PRECURSORES</text:span></text:p>
          <text:p text:style-name="P7"><text:span text:style-name="Source_20_Text">│ <text:s text:c="2"/>Horizonte: Tick / 1min</text:span></text:p>
          <text:p text:style-name="P7"><text:span text:style-name="Source_20_Text">│ <text:s text:c="2"/>Objetivo: Captar sinais que antecedam a reconvergência</text:span></text:p>
          <text:p text:style-name="P7"><text:span text:style-name="Source_20_Text">│ <text:s text:c="2"/>Pergunta: "Quais micro-sinais indicam que a correção está começando?"</text:span></text:p>
          <text:p text:style-name="P7"><text:span text:style-name="Source_20_Text">│</text:span></text:p>
          <text:p text:style-name="P7"><text:span text:style-name="Source_20_Text">CAMADA 5 — EXECUÇÃO E GESTÃO</text:span></text:p>
          <text:p text:style-name="P7"><text:span text:style-name="Source_20_Text">│ <text:s text:c="2"/>Horizonte: Tick / Tempo real</text:span></text:p>
          <text:p text:style-name="P7"><text:span text:style-name="Source_20_Text">│ <text:s text:c="2"/>Objetivo: Entrada, saída, sizing, risco</text:span></text:p>
          <text:p text:style-name="P6"><text:span text:style-name="Source_20_Text">│ <text:s text:c="2"/>Pergunta: "Como entrar com precisão e proteger a posição?"</text:span></text:p>
          <text:p text:style-name="P3"/>
          <text:list text:continue-numbering="true">
            <text:list-header>
              <text:h text:style-name="P2" text:outline-level="2">PARTE 3 — MÉTRICAS E INDICADORES PROPRIETÁRIOS</text:h>
              <text:list>
                <text:list-header>
                  <text:h text:style-name="P4" text:outline-level="3">3.1 Índice de Regime Correlacional (IRC)</text:h>
                </text:list-header>
              </text:list>
            </text:list-header>
          </text:list>
          <text:p text:style-name="P6">text</text:p>
          <text:p text:style-name="P7"><text:span text:style-name="Source_20_Text">Propósito: Classificar o regime atual de mercado</text:span></text:p>
          <text:p text:style-name="P7"><text:span text:style-name="Source_20_Text">Composição:</text:span></text:p>
          <text:p text:style-name="P7"><text:span text:style-name="Source_20_Text">├── Correlação rolling de Pearson (janelas múltiplas: 20, 50, 100 períodos)</text:span></text:p>
          <text:p text:style-name="P7"><text:span text:style-name="Source_20_Text">├── Correlação de Spearman (captura relações não-lineares)</text:span></text:p>
          <text:p text:style-name="P7"><text:span text:style-name="Source_20_Text">├── Beta rolling do WIN em relação ao WDO</text:span></text:p>
          <text:p text:style-name="P7"><text:span text:style-name="Source_20_Text">├── Velocidade de mudança da correlação (derivada da correlação)</text:span></text:p>
          <text:p text:style-name="P7"><text:span text:style-name="Source_20_Text">│</text:span></text:p>
          <text:p text:style-name="P7"><text:span text:style-name="Source_20_Text">Classificação:</text:span></text:p>
          <text:p text:style-name="P7"><text:span text:style-name="Source_20_Text">├── IRC &gt; 0.7 negativo <text:s/>→ Regime de alta sincronia negativa</text:span></text:p>
          <text:p text:style-name="P7"><text:span text:style-name="Source_20_Text">├── IRC entre 0.3 e 0.7 → Regime de sincronia moderada</text:span></text:p>
          <text:p text:style-name="P7"><text:span text:style-name="Source_20_Text">├── IRC &lt; 0.3 <text:s text:c="10"/>→ Regime de dessincronia (ALERTA)</text:span></text:p>
          <text:p text:style-name="P6"><text:span text:style-name="Source_20_Text">└── IRC positivo <text:s text:c="8"/>→ Regime invertido (ALERTA MÁXIMO)</text:span></text:p>
          <text:list>
            <text:list-item>
              <text:list>
                <text:list-header>
                  <text:h text:style-name="P4" text:outline-level="3">3.2 Spread Normalizado (SN)</text:h>
                </text:list-header>
              </text:list>
            </text:list-item>
          </text:list>
          <text:p text:style-name="P6">text</text:p>
          <text:p text:style-name="P7"><text:soft-page-break/><text:span text:style-name="Source_20_Text">Propósito: Medir a divergência entre os dois ativos em tempo real</text:span></text:p>
          <text:p text:style-name="P7"><text:span text:style-name="Source_20_Text">Composição:</text:span></text:p>
          <text:p text:style-name="P7"><text:span text:style-name="Source_20_Text">├── Construção de spread sintético: WIN normalizado vs WDO normalizado</text:span></text:p>
          <text:p text:style-name="P7"><text:span text:style-name="Source_20_Text">├── Z-Score do spread (distância da média em desvios-padrão)</text:span></text:p>
          <text:p text:style-name="P7"><text:span text:style-name="Source_20_Text">├── Bandas dinâmicas baseadas em volatilidade realizada</text:span></text:p>
          <text:p text:style-name="P7"><text:span text:style-name="Source_20_Text">│</text:span></text:p>
          <text:p text:style-name="P7"><text:span text:style-name="Source_20_Text">Sinais:</text:span></text:p>
          <text:p text:style-name="P7"><text:span text:style-name="Source_20_Text">├── Z-Score &gt; +2.0 <text:s/>→ Spread extremamente esticado (tensão alta)</text:span></text:p>
          <text:p text:style-name="P7"><text:span text:style-name="Source_20_Text">├── Z-Score &gt; +1.5 <text:s/>→ Spread esticado (tensão moderada)</text:span></text:p>
          <text:p text:style-name="P7"><text:span text:style-name="Source_20_Text">├── Z-Score entre -1 e +1 → Spread em zona neutra</text:span></text:p>
          <text:p text:style-name="P7"><text:span text:style-name="Source_20_Text">├── Z-Score &lt; -1.5 <text:s/>→ Spread comprimido do outro lado</text:span></text:p>
          <text:p text:style-name="P6"><text:span text:style-name="Source_20_Text">└── Reversão do Z-Score após extremo → SINAL DE RECONVERGÊNCIA</text:span></text:p>
          <text:list>
            <text:list-item>
              <text:list>
                <text:list-header>
                  <text:h text:style-name="P4" text:outline-level="3">3.3 Índice de Atraso Relativo (IAR)</text:h>
                </text:list-header>
              </text:list>
            </text:list-item>
          </text:list>
          <text:p text:style-name="P6">text</text:p>
          <text:p text:style-name="P7"><text:span text:style-name="Source_20_Text">Propósito: Identificar qual ativo está "atrasado" na relação</text:span></text:p>
          <text:p text:style-name="P7"><text:span text:style-name="Source_20_Text">Composição:</text:span></text:p>
          <text:p text:style-name="P7"><text:span text:style-name="Source_20_Text">├── Comparação de retornos acumulados em janela curta</text:span></text:p>
          <text:p text:style-name="P7"><text:span text:style-name="Source_20_Text">├── Comparação de momentum relativo</text:span></text:p>
          <text:p text:style-name="P7"><text:span text:style-name="Source_20_Text">├── Análise de lead-lag (quem está liderando o movimento)</text:span></text:p>
          <text:p text:style-name="P7"><text:span text:style-name="Source_20_Text">├── Cross-correlation com defasagens (lags de 1 a N períodos)</text:span></text:p>
          <text:p text:style-name="P7"><text:span text:style-name="Source_20_Text">│</text:span></text:p>
          <text:p text:style-name="P7"><text:span text:style-name="Source_20_Text">Interpretação:</text:span></text:p>
          <text:p text:style-name="P7"><text:span text:style-name="Source_20_Text">├── IAR positivo alto → WIN liderou, WDO está atrasado</text:span></text:p>
          <text:p text:style-name="P7"><text:span text:style-name="Source_20_Text">├── IAR negativo alto → WDO liderou, WIN está atrasado</text:span></text:p>
          <text:p text:style-name="P6"><text:span text:style-name="Source_20_Text">└── O ativo "atrasado" é o candidato a fazer o movimento de ajuste</text:span></text:p>
          <text:list>
            <text:list-item>
              <text:list>
                <text:list-header>
                  <text:h text:style-name="P4" text:outline-level="3">3.4 Velocímetro de Reconvergência (VR)</text:h>
                </text:list-header>
              </text:list>
            </text:list-item>
          </text:list>
          <text:p text:style-name="P6">text</text:p>
          <text:p text:style-name="P7"><text:span text:style-name="Source_20_Text">Propósito: Medir a velocidade com que a correlação está se restaurando</text:span></text:p>
          <text:p text:style-name="P7"><text:span text:style-name="Source_20_Text">Composição:</text:span></text:p>
          <text:p text:style-name="P7"><text:span text:style-name="Source_20_Text">├── Taxa de variação do spread</text:span></text:p>
          <text:p text:style-name="P7"><text:span text:style-name="Source_20_Text">├── Aceleração/desaceleração da convergência</text:span></text:p>
          <text:p text:style-name="P7"><text:span text:style-name="Source_20_Text">├── Comparação com velocidades históricas de reconvergência</text:span></text:p>
          <text:p text:style-name="P7"><text:span text:style-name="Source_20_Text">│</text:span></text:p>
          <text:p text:style-name="P7"><text:span text:style-name="Source_20_Text">Uso:</text:span></text:p>
          <text:p text:style-name="P7"><text:span text:style-name="Source_20_Text">├── VR acelerando → Reconvergência ganhando força (manter posição)</text:span></text:p>
          <text:p text:style-name="P7"><text:span text:style-name="Source_20_Text">├── VR desacelerando → Reconvergência perdendo força (atenção)</text:span></text:p>
          <text:p text:style-name="P6"><text:span text:style-name="Source_20_Text">└── VR invertendo → Divergência voltando (considerar saída)</text:span></text:p>
          <text:p text:style-name="P3"/>
          <text:list text:continue-numbering="true">
            <text:list-header>
              <text:h text:style-name="P2" text:outline-level="2">PARTE 4 — CATÁLOGO DE SINAIS PRECURSORES</text:h>
              <text:list>
                <text:list-header>
                  <text:h text:style-name="P4" text:outline-level="3">4.1 Sinais Estruturais (Macro)</text:h>
                </text:list-header>
              </text:list>
            </text:list-header>
          </text:list>
          <text:p text:style-name="P6">text</text:p>
          <text:p text:style-name="P7"><text:span text:style-name="Source_20_Text">SINAL E1 — Compressão de Correlação</text:span></text:p>
          <text:p text:style-name="P7"><text:span text:style-name="Source_20_Text">├── Descrição: A correlação rolling se comprime para faixas estreitas</text:span></text:p>
          <text:p text:style-name="P7"><text:span text:style-name="Source_20_Text">│ <text:s text:c="2"/>após período de dessincronia</text:span></text:p>
          <text:p text:style-name="P7"><text:span text:style-name="Source_20_Text">├── Significado: O mercado está "decidindo" — ruptura iminente</text:span></text:p>
          <text:p text:style-name="P7"><text:span text:style-name="Source_20_Text">├── Ação: Preparar para entrada quando a direção se definir</text:span></text:p>
          <text:p text:style-name="P7"><text:span text:style-name="Source_20_Text">│</text:span></text:p>
          <text:p text:style-name="P7"><text:soft-page-break/><text:span text:style-name="Source_20_Text">SINAL E2 — Divergência de Volatilidade</text:span></text:p>
          <text:p text:style-name="P7"><text:span text:style-name="Source_20_Text">├── Descrição: A volatilidade de um ativo expande enquanto</text:span></text:p>
          <text:p text:style-name="P7"><text:span text:style-name="Source_20_Text">│ <text:s text:c="2"/>a do outro comprime</text:span></text:p>
          <text:p text:style-name="P7"><text:span text:style-name="Source_20_Text">├── Significado: Um ativo está absorvendo toda a informação,</text:span></text:p>
          <text:p text:style-name="P7"><text:span text:style-name="Source_20_Text">│ <text:s text:c="2"/>o outro ainda não reagiu</text:span></text:p>
          <text:p text:style-name="P7"><text:span text:style-name="Source_20_Text">├── Ação: Monitorar o ativo comprimido para ruptura</text:span></text:p>
          <text:p text:style-name="P7"><text:span text:style-name="Source_20_Text">│</text:span></text:p>
          <text:p text:style-name="P7"><text:span text:style-name="Source_20_Text">SINAL E3 — Quebra de Estrutura de Lead-Lag</text:span></text:p>
          <text:p text:style-name="P7"><text:span text:style-name="Source_20_Text">├── Descrição: O ativo que normalmente lidera muda</text:span></text:p>
          <text:p text:style-name="P7"><text:span text:style-name="Source_20_Text">│ <text:s text:c="2"/>(WIN costuma liderar, WDO passa a liderar, ou vice-versa)</text:span></text:p>
          <text:p text:style-name="P7"><text:span text:style-name="Source_20_Text">├── Significado: Mudança de regime, reposicionamento institucional</text:span></text:p>
          <text:p text:style-name="P6"><text:span text:style-name="Source_20_Text">├── Ação: Recalibrar modelo de antecipação</text:span></text:p>
          <text:list>
            <text:list-item>
              <text:list>
                <text:list-header>
                  <text:h text:style-name="P4" text:outline-level="3">4.2 Sinais de Microestrutura (Intraday)</text:h>
                </text:list-header>
              </text:list>
            </text:list-item>
          </text:list>
          <text:p text:style-name="P6">text</text:p>
          <text:p text:style-name="P7"><text:span text:style-name="Source_20_Text">SINAL M1 — Divergência de Fluxo</text:span></text:p>
          <text:p text:style-name="P7"><text:span text:style-name="Source_20_Text">├── Descrição: O book/fluxo de um ativo mostra pressão direcional</text:span></text:p>
          <text:p text:style-name="P7"><text:span text:style-name="Source_20_Text">│ <text:s text:c="2"/>enquanto o outro ativo ainda não precificou</text:span></text:p>
          <text:p text:style-name="P7"><text:span text:style-name="Source_20_Text">├── Significado: "Smart money" posicionando em um ativo,</text:span></text:p>
          <text:p text:style-name="P7"><text:span text:style-name="Source_20_Text">│ <text:s text:c="2"/>o outro vai seguir (inversamente)</text:span></text:p>
          <text:p text:style-name="P7"><text:span text:style-name="Source_20_Text">├── Ação: Sinal de antecipação — posicionar no ativo atrasado</text:span></text:p>
          <text:p text:style-name="P7"><text:span text:style-name="Source_20_Text">│</text:span></text:p>
          <text:p text:style-name="P7"><text:span text:style-name="Source_20_Text">SINAL M2 — Exaustão de Momentum Unilateral</text:span></text:p>
          <text:p text:style-name="P7"><text:span text:style-name="Source_20_Text">├── Descrição: Um ativo fez movimento forte e começa a mostrar</text:span></text:p>
          <text:p text:style-name="P7"><text:span text:style-name="Source_20_Text">│ <text:s text:c="2"/>sinais de exaustão (volume decrescente, candles de reversão)</text:span></text:p>
          <text:p text:style-name="P7"><text:span text:style-name="Source_20_Text">│ <text:s text:c="2"/>enquanto o outro permaneceu parado</text:span></text:p>
          <text:p text:style-name="P7"><text:span text:style-name="Source_20_Text">├── Significado: O ativo que andou vai desacelerar/reverter,</text:span></text:p>
          <text:p text:style-name="P7"><text:span text:style-name="Source_20_Text">│ <text:s text:c="2"/>o parado pode iniciar movimento</text:span></text:p>
          <text:p text:style-name="P7"><text:span text:style-name="Source_20_Text">├── Ação: Dupla entrada — reversão no que andou + tendência no parado</text:span></text:p>
          <text:p text:style-name="P7"><text:span text:style-name="Source_20_Text">│</text:span></text:p>
          <text:p text:style-name="P7"><text:span text:style-name="Source_20_Text">SINAL M3 — Absorção Assimétrica</text:span></text:p>
          <text:p text:style-name="P7"><text:span text:style-name="Source_20_Text">├── Descrição: Grandes ordens sendo absorvidas em um ativo</text:span></text:p>
          <text:p text:style-name="P7"><text:span text:style-name="Source_20_Text">│ <text:s text:c="2"/>(preço não anda apesar de volume) enquanto o outro ativo</text:span></text:p>
          <text:p text:style-name="P7"><text:span text:style-name="Source_20_Text">│ <text:s text:c="2"/>começa a se mover</text:span></text:p>
          <text:p text:style-name="P7"><text:span text:style-name="Source_20_Text">├── Significado: Institucional segurando um ativo enquanto</text:span></text:p>
          <text:p text:style-name="P7"><text:span text:style-name="Source_20_Text">│ <text:s text:c="2"/>opera o outro — correlação prestes a se manifestar</text:span></text:p>
          <text:p text:style-name="P7"><text:span text:style-name="Source_20_Text">├── Ação: Posicionar a favor do ativo que está sendo "segurado"</text:span></text:p>
          <text:p text:style-name="P7"><text:span text:style-name="Source_20_Text">│</text:span></text:p>
          <text:p text:style-name="P7"><text:span text:style-name="Source_20_Text">SINAL M4 — Spike de Volume Simultâneo</text:span></text:p>
          <text:p text:style-name="P7"><text:span text:style-name="Source_20_Text">├── Descrição: Ambos os ativos apresentam spike de volume</text:span></text:p>
          <text:p text:style-name="P7"><text:span text:style-name="Source_20_Text">│ <text:s text:c="2"/>ao mesmo tempo, mas sem movimento de preço proporcional</text:span></text:p>
          <text:p text:style-name="P7"><text:span text:style-name="Source_20_Text">├── Significado: Briga institucional — resolução iminente</text:span></text:p>
          <text:p text:style-name="P7"><text:span text:style-name="Source_20_Text">│ <text:s text:c="2"/>da direção correlacional</text:span></text:p>
          <text:p text:style-name="P7"><text:span text:style-name="Source_20_Text">├── Ação: Aguardar definição e entrar na reconvergência</text:span></text:p>
          <text:p text:style-name="P7"><text:span text:style-name="Source_20_Text">│</text:span></text:p>
          <text:p text:style-name="P7"><text:span text:style-name="Source_20_Text">SINAL M5 — Descolamento Temporal</text:span></text:p>
          <text:p text:style-name="P7"><text:span text:style-name="Source_20_Text">├── Descrição: Um ativo reage a um evento/notícia e o outro</text:span></text:p>
          <text:p text:style-name="P7"><text:span text:style-name="Source_20_Text">│ <text:s text:c="2"/>apresenta delay na reação inversa</text:span></text:p>
          <text:p text:style-name="P7"><text:span text:style-name="Source_20_Text">├── Significado: Janela de oportunidade no "gap temporal"</text:span></text:p>
          <text:p text:style-name="P7"><text:span text:style-name="Source_20_Text">│ <text:s text:c="2"/>da correlação</text:span></text:p>
          <text:p text:style-name="P6"><text:span text:style-name="Source_20_Text">├── Ação: Posicionar no ativo atrasado antes da reação</text:span></text:p>
          <text:list>
            <text:list-item>
              <text:list>
                <text:list-header>
                  <text:h text:style-name="P4" text:outline-level="3">4.3 Sinais Estatísticos (Quantitativos)</text:h>
                </text:list-header>
              </text:list>
            </text:list-item>
          </text:list>
          <text:p text:style-name="P6">text</text:p>
          <text:p text:style-name="P7"><text:span text:style-name="Source_20_Text">SINAL Q1 — Z-Score Extremo com Reversão Incipiente</text:span></text:p>
          <text:p text:style-name="P7"><text:span text:style-name="Source_20_Text">├── Descrição: Spread atinge Z-Score extremo (&gt;2.0) e mostra</text:span></text:p>
          <text:p text:style-name="P7"><text:span text:style-name="Source_20_Text">│ <text:s text:c="2"/>primeiro candle/tick de reversão</text:span></text:p>
          <text:p text:style-name="P7"><text:span text:style-name="Source_20_Text">├── Significado: Estatisticamente improvável manter, reversão à média</text:span></text:p>
          <text:p text:style-name="P7"><text:soft-page-break/><text:span text:style-name="Source_20_Text">├── Ação: Entrar na reconvergência com stop além do extremo</text:span></text:p>
          <text:p text:style-name="P7"><text:span text:style-name="Source_20_Text">│</text:span></text:p>
          <text:p text:style-name="P7"><text:span text:style-name="Source_20_Text">SINAL Q2 — Divergência de Cointegração</text:span></text:p>
          <text:p text:style-name="P7"><text:span text:style-name="Source_20_Text">├── Descrição: O resíduo da regressão de cointegração atinge</text:span></text:p>
          <text:p text:style-name="P7"><text:span text:style-name="Source_20_Text">│ <text:s text:c="2"/>níveis extremos</text:span></text:p>
          <text:p text:style-name="P7"><text:span text:style-name="Source_20_Text">├── Significado: A relação de longo prazo foi violada</text:span></text:p>
          <text:p text:style-name="P7"><text:span text:style-name="Source_20_Text">│ <text:s text:c="2"/>temporariamente — vai retornar</text:span></text:p>
          <text:p text:style-name="P7"><text:span text:style-name="Source_20_Text">├── Ação: Posicionar para retorno ao equilíbrio</text:span></text:p>
          <text:p text:style-name="P7"><text:span text:style-name="Source_20_Text">│</text:span></text:p>
          <text:p text:style-name="P7"><text:span text:style-name="Source_20_Text">SINAL Q3 — Mudança de Regime Detectada</text:span></text:p>
          <text:p text:style-name="P7"><text:span text:style-name="Source_20_Text">├── Descrição: Modelo de mudança de regime (HMM ou similar)</text:span></text:p>
          <text:p text:style-name="P7"><text:span text:style-name="Source_20_Text">│ <text:s text:c="2"/>detecta transição de estado</text:span></text:p>
          <text:p text:style-name="P7"><text:span text:style-name="Source_20_Text">├── Significado: O mercado está mudando de comportamento,</text:span></text:p>
          <text:p text:style-name="P7"><text:span text:style-name="Source_20_Text">│ <text:s text:c="2"/>oportunidades na transição</text:span></text:p>
          <text:p text:style-name="P7"><text:span text:style-name="Source_20_Text">├── Ação: Ajustar parâmetros e posicionamento ao novo regime</text:span></text:p>
          <text:p text:style-name="P7"><text:span text:style-name="Source_20_Text">│</text:span></text:p>
          <text:p text:style-name="P7"><text:span text:style-name="Source_20_Text">SINAL Q4 — Convergência de Múltiplas Janelas</text:span></text:p>
          <text:p text:style-name="P7"><text:span text:style-name="Source_20_Text">├── Descrição: Correlações de diferentes timeframes (curta, média,</text:span></text:p>
          <text:p text:style-name="P7"><text:span text:style-name="Source_20_Text">│ <text:s text:c="2"/>longa) convergem para o mesmo ponto</text:span></text:p>
          <text:p text:style-name="P7"><text:span text:style-name="Source_20_Text">├── Significado: Alinhamento multi-temporal, movimento forte iminente</text:span></text:p>
          <text:p text:style-name="P6"><text:span text:style-name="Source_20_Text">├── Ação: Aumentar convicção na próxima entrada</text:span></text:p>
          <text:p text:style-name="P3"/>
          <text:list text:continue-numbering="true">
            <text:list-header>
              <text:h text:style-name="P2" text:outline-level="2">PARTE 5 — FRAMEWORK DE CENÁRIOS</text:h>
              <text:list>
                <text:list-header>
                  <text:h text:style-name="P4" text:outline-level="3">5.1 Matriz de Cenários Operacionais</text:h>
                </text:list-header>
              </text:list>
            </text:list-header>
          </text:list>
          <text:p text:style-name="P6">text</text:p>
          <text:p text:style-name="P7"><text:span text:style-name="Source_20_Text">┌─────────────────────────────────────────────────────────────────┐</text:span></text:p>
          <text:p text:style-name="P7"><text:span text:style-name="Source_20_Text">│ <text:s text:c="19"/>WIN SUBINDO <text:s text:c="3"/>WIN PARADO <text:s text:c="3"/>WIN CAINDO <text:s text:c="5"/>│</text:span></text:p>
          <text:p text:style-name="P7"><text:span text:style-name="Source_20_Text">├─────────────────────────────────────────────────────────────────┤</text:span></text:p>
          <text:p text:style-name="P7"><text:span text:style-name="Source_20_Text">│ WDO SUBINDO <text:s text:c="3"/>│ <text:s/>ANOMALIA <text:s text:c="4"/>│ <text:s/>WDO LIDERA <text:s/>│ <text:s/>SINCRONIA <text:s text:c="3"/>│</text:span></text:p>
          <text:p text:style-name="P7"><text:span text:style-name="Source_20_Text">│ <text:s text:c="15"/>│ <text:s/>Correlação+ <text:s/>│ <text:s/>WIN atrasado │ <text:s/>ATIVA <text:s text:c="7"/>│</text:span></text:p>
          <text:p text:style-name="P7"><text:span text:style-name="Source_20_Text">│ <text:s text:c="15"/>│ <text:s/>Raro/Instável│ <text:s/>Oportunidade │ <text:s/>Normal <text:s text:c="6"/>│</text:span></text:p>
          <text:p text:style-name="P7"><text:span text:style-name="Source_20_Text">├─────────────────────────────────────────────────────────────────┤</text:span></text:p>
          <text:p text:style-name="P7"><text:span text:style-name="Source_20_Text">│ WDO PARADO <text:s text:c="4"/>│ <text:s/>WIN LIDERA <text:s text:c="2"/>│ <text:s/>DORMÊNCIA <text:s text:c="2"/>│ <text:s/>WIN LIDERA <text:s text:c="2"/>│</text:span></text:p>
          <text:p text:style-name="P7"><text:span text:style-name="Source_20_Text">│ <text:s text:c="15"/>│ <text:s/>WDO atrasado │ <text:s/>Sem sinal <text:s text:c="3"/>│ <text:s/>WDO atrasado │</text:span></text:p>
          <text:p text:style-name="P7"><text:span text:style-name="Source_20_Text">│ <text:s text:c="15"/>│ <text:s/>Oportunidade │ <text:s/>Aguardar <text:s text:c="4"/>│ <text:s/>Oportunidade │</text:span></text:p>
          <text:p text:style-name="P7"><text:span text:style-name="Source_20_Text">├─────────────────────────────────────────────────────────────────┤</text:span></text:p>
          <text:p text:style-name="P7"><text:span text:style-name="Source_20_Text">│ WDO CAINDO <text:s text:c="4"/>│ <text:s/>SINCRONIA <text:s text:c="3"/>│ <text:s/>WDO LIDERA <text:s/>│ <text:s/>ANOMALIA <text:s text:c="4"/>│</text:span></text:p>
          <text:p text:style-name="P7"><text:span text:style-name="Source_20_Text">│ <text:s text:c="15"/>│ <text:s/>ATIVA <text:s text:c="7"/>│ <text:s/>WIN atrasado │ <text:s/>Correlação+ <text:s/>│</text:span></text:p>
          <text:p text:style-name="P7"><text:span text:style-name="Source_20_Text">│ <text:s text:c="15"/>│ <text:s/>Normal <text:s text:c="6"/>│ <text:s/>Oportunidade │ <text:s/>Raro/Instável│</text:span></text:p>
          <text:p text:style-name="P6"><text:span text:style-name="Source_20_Text">└─────────────────────────────────────────────────────────────────┘</text:span></text:p>
          <text:list>
            <text:list-item>
              <text:list>
                <text:list-header>
                  <text:h text:style-name="P4" text:outline-level="3">5.2 Protocolo por Cenário</text:h>
                </text:list-header>
              </text:list>
            </text:list-item>
          </text:list>
          <text:p text:style-name="P6">text</text:p>
          <text:p text:style-name="P7"><text:span text:style-name="Source_20_Text">CENÁRIO "SINCRONIA ATIVA":</text:span></text:p>
          <text:p text:style-name="P7"><text:span text:style-name="Source_20_Text">├── Monitorar continuidade</text:span></text:p>
          <text:p text:style-name="P7"><text:span text:style-name="Source_20_Text">├── Não operar reconvergência (já está convergido)</text:span></text:p>
          <text:p text:style-name="P7"><text:span text:style-name="Source_20_Text">├── Buscar oportunidades em momentos de micro-dessincronia</text:span></text:p>
          <text:p text:style-name="P7"><text:span text:style-name="Source_20_Text">└── Trailing de posições existentes</text:span></text:p>
          <text:p text:style-name="P7"/>
          <text:p text:style-name="P7"><text:span text:style-name="Source_20_Text">CENÁRIO "ATIVO X LIDERA, ATIVO Y ATRASADO":</text:span></text:p>
          <text:p text:style-name="P7"><text:span text:style-name="Source_20_Text">├── FASE 1: Confirmar que X realmente liderou (não é ruído)</text:span></text:p>
          <text:p text:style-name="P7"><text:span text:style-name="Source_20_Text">├── FASE 2: Avaliar magnitude do atraso de Y</text:span></text:p>
          <text:p text:style-name="P7"><text:span text:style-name="Source_20_Text">├── FASE 3: Buscar sinais precursores no ativo Y</text:span></text:p>
          <text:p text:style-name="P7"><text:soft-page-break/><text:span text:style-name="Source_20_Text">├── FASE 4: Posicionar em Y na direção esperada pela correlação</text:span></text:p>
          <text:p text:style-name="P7"><text:span text:style-name="Source_20_Text">└── FASE 5: Gerenciar com base na reconvergência do spread</text:span></text:p>
          <text:p text:style-name="P7"/>
          <text:p text:style-name="P7"><text:span text:style-name="Source_20_Text">CENÁRIO "ANOMALIA / CORRELAÇÃO POSITIVA":</text:span></text:p>
          <text:p text:style-name="P7"><text:span text:style-name="Source_20_Text">├── ALERTA: Regime anormal</text:span></text:p>
          <text:p text:style-name="P7"><text:span text:style-name="Source_20_Text">├── Investigar causa (evento macro? intervenção? crise?)</text:span></text:p>
          <text:p text:style-name="P7"><text:span text:style-name="Source_20_Text">├── Reduzir ou zerar exposição correlacional</text:span></text:p>
          <text:p text:style-name="P7"><text:span text:style-name="Source_20_Text">├── Aguardar retorno ao regime normal</text:span></text:p>
          <text:p text:style-name="P6"><text:span text:style-name="Source_20_Text">└── Não forçar trades de correlação negativa</text:span></text:p>
          <text:p text:style-name="P3"/>
          <text:list text:continue-numbering="true">
            <text:list-header>
              <text:h text:style-name="P2" text:outline-level="2">PARTE 6 — JANELAS TEMPORAIS CRÍTICAS</text:h>
              <text:list>
                <text:list-header>
                  <text:h text:style-name="P4" text:outline-level="3">6.1 Momentos do Dia com Maior Potencial</text:h>
                </text:list-header>
              </text:list>
            </text:list-header>
          </text:list>
          <text:p text:style-name="P6">text</text:p>
          <text:p text:style-name="P7"><text:span text:style-name="Source_20_Text">PRÉ-ABERTURA (08:45 - 09:15)</text:span></text:p>
          <text:p text:style-name="P7"><text:span text:style-name="Source_20_Text">├── Gaps overnight criam dessincronia inicial</text:span></text:p>
          <text:p text:style-name="P7"><text:span text:style-name="Source_20_Text">├── Analisar: futuro de dólar já abriu (09:00), índice ainda não</text:span></text:p>
          <text:p text:style-name="P7"><text:span text:style-name="Source_20_Text">├── Oportunidade: primeiro ajuste correlacional do dia</text:span></text:p>
          <text:p text:style-name="P7"><text:span text:style-name="Source_20_Text">│</text:span></text:p>
          <text:p text:style-name="P7"><text:span text:style-name="Source_20_Text">PRIMEIRA HORA (09:15 - 10:15)</text:span></text:p>
          <text:p text:style-name="P7"><text:span text:style-name="Source_20_Text">├── Alta volatilidade, fluxo institucional forte</text:span></text:p>
          <text:p text:style-name="P7"><text:span text:style-name="Source_20_Text">├── Desincronias frequentes por excesso de fluxo unilateral</text:span></text:p>
          <text:p text:style-name="P7"><text:span text:style-name="Source_20_Text">├── Melhor janela para sinais de microestrutura (M1-M5)</text:span></text:p>
          <text:p text:style-name="P7"><text:span text:style-name="Source_20_Text">│</text:span></text:p>
          <text:p text:style-name="P7"><text:span text:style-name="Source_20_Text">PRÉ-ABERTURA EUA (10:15 - 10:45)</text:span></text:p>
          <text:p text:style-name="P7"><text:span text:style-name="Source_20_Text">├── Expectativa dos dados/abertura americana</text:span></text:p>
          <text:p text:style-name="P7"><text:span text:style-name="Source_20_Text">├── Um ativo pode se antecipar ao outro</text:span></text:p>
          <text:p text:style-name="P7"><text:span text:style-name="Source_20_Text">├── Oportunidade de lead-lag internacional</text:span></text:p>
          <text:p text:style-name="P7"><text:span text:style-name="Source_20_Text">│</text:span></text:p>
          <text:p text:style-name="P7"><text:span text:style-name="Source_20_Text">ABERTURA EUA + PRIMEIRA HORA (10:30 - 11:30)</text:span></text:p>
          <text:p text:style-name="P7"><text:span text:style-name="Source_20_Text">├── Reprecificação global</text:span></text:p>
          <text:p text:style-name="P7"><text:span text:style-name="Source_20_Text">├── Dessincronia clássica: dólar reage antes, índice ajusta depois</text:span></text:p>
          <text:p text:style-name="P7"><text:span text:style-name="Source_20_Text">├── Janela de ouro para o sistema</text:span></text:p>
          <text:p text:style-name="P7"><text:span text:style-name="Source_20_Text">│</text:span></text:p>
          <text:p text:style-name="P7"><text:span text:style-name="Source_20_Text">PÓS-ALMOÇO (13:30 - 14:30)</text:span></text:p>
          <text:p text:style-name="P7"><text:span text:style-name="Source_20_Text">├── Liquidez reduzida pode gerar dessincronias artificiais</text:span></text:p>
          <text:p text:style-name="P7"><text:span text:style-name="Source_20_Text">├── Cuidado com falsos sinais</text:span></text:p>
          <text:p text:style-name="P7"><text:span text:style-name="Source_20_Text">├── Filtrar por volume mínimo</text:span></text:p>
          <text:p text:style-name="P7"><text:span text:style-name="Source_20_Text">│</text:span></text:p>
          <text:p text:style-name="P7"><text:span text:style-name="Source_20_Text">ÚLTIMA HORA (16:00 - 17:00)</text:span></text:p>
          <text:p text:style-name="P7"><text:span text:style-name="Source_20_Text">├── Ajustes de posição para fechamento</text:span></text:p>
          <text:p text:style-name="P7"><text:span text:style-name="Source_20_Text">├── Reconvergências "forçadas" por zeragem de risco</text:span></text:p>
          <text:p text:style-name="P7"><text:span text:style-name="Source_20_Text">├── Oportunidades rápidas de ajuste</text:span></text:p>
          <text:p text:style-name="P7"><text:span text:style-name="Source_20_Text">│</text:span></text:p>
          <text:p text:style-name="P7"><text:span text:style-name="Source_20_Text">PÓS-FECHAMENTO ÍNDICE (17:00 - 18:00)</text:span></text:p>
          <text:p text:style-name="P7"><text:span text:style-name="Source_20_Text">├── Dólar continua, índice fecha</text:span></text:p>
          <text:p text:style-name="P7"><text:span text:style-name="Source_20_Text">├── Desequilíbrio cria gap para o dia seguinte</text:span></text:p>
          <text:p text:style-name="P6"><text:span text:style-name="Source_20_Text">└── Informação para posicionamento do próximo dia</text:span></text:p>
          <text:p text:style-name="P3"/>
          <text:list text:continue-numbering="true">
            <text:list-header>
              <text:h text:style-name="P2" text:outline-level="2"><text:soft-page-break/>PARTE 7 — CATÁLOGO DE VARIÁVEIS EXTERNAS</text:h>
              <text:list>
                <text:list-header>
                  <text:h text:style-name="P4" text:outline-level="3">7.1 Variáveis que Modulam a Correlação</text:h>
                </text:list-header>
              </text:list>
            </text:list-header>
          </text:list>
          <text:p text:style-name="P6">text</text:p>
          <text:p text:style-name="P7"><text:span text:style-name="Source_20_Text">AMPLIFICADORES DA CORRELAÇÃO NEGATIVA (tornam mais forte):</text:span></text:p>
          <text:p text:style-name="P7"><text:span text:style-name="Source_20_Text">├── Fluxo estrangeiro forte (entrada ou saída)</text:span></text:p>
          <text:p text:style-name="P7"><text:span text:style-name="Source_20_Text">├── Decisões de juros (COPOM/FOMC)</text:span></text:p>
          <text:p text:style-name="P7"><text:span text:style-name="Source_20_Text">├── Dados de inflação</text:span></text:p>
          <text:p text:style-name="P7"><text:span text:style-name="Source_20_Text">├── Risco-país (CDS) em movimento</text:span></text:p>
          <text:p text:style-name="P7"><text:span text:style-name="Source_20_Text">├── Dados de balança comercial</text:span></text:p>
          <text:p text:style-name="P7"><text:span text:style-name="Source_20_Text">└── Intervenções do Banco Central no câmbio</text:span></text:p>
          <text:p text:style-name="P7"/>
          <text:p text:style-name="P7"><text:span text:style-name="Source_20_Text">ATENUADORES DA CORRELAÇÃO (enfraquecem):</text:span></text:p>
          <text:p text:style-name="P7"><text:span text:style-name="Source_20_Text">├── Mercado em range/sem tendência</text:span></text:p>
          <text:p text:style-name="P7"><text:span text:style-name="Source_20_Text">├── Feriados parciais (liquidez reduzida)</text:span></text:p>
          <text:p text:style-name="P7"><text:span text:style-name="Source_20_Text">├── Vencimento de opções/futuros próximo</text:span></text:p>
          <text:p text:style-name="P7"><text:span text:style-name="Source_20_Text">├── Eventos idiossincráticos de um ativo</text:span></text:p>
          <text:p text:style-name="P7"><text:span text:style-name="Source_20_Text">│ <text:s text:c="2"/>(ex: mudança de composição do índice)</text:span></text:p>
          <text:p text:style-name="P7"><text:span text:style-name="Source_20_Text">└── Períodos de carry trade intenso</text:span></text:p>
          <text:p text:style-name="P7"/>
          <text:p text:style-name="P7"><text:span text:style-name="Source_20_Text">INVERSORES DA CORRELAÇÃO (podem tornar positiva):</text:span></text:p>
          <text:p text:style-name="P7"><text:span text:style-name="Source_20_Text">├── Crise de confiança sistêmica (tudo cai junto)</text:span></text:p>
          <text:p text:style-name="P7"><text:span text:style-name="Source_20_Text">├── Euforia generalizada (tudo sobe)</text:span></text:p>
          <text:p text:style-name="P7"><text:span text:style-name="Source_20_Text">├── Flash crashes / circuit breakers</text:span></text:p>
          <text:p text:style-name="P7"><text:span text:style-name="Source_20_Text">├── Eventos geopolíticos extremos</text:span></text:p>
          <text:p text:style-name="P6"><text:span text:style-name="Source_20_Text">└── Mudanças abruptas de política monetária global</text:span></text:p>
          <text:p text:style-name="P3"/>
          <text:list text:continue-numbering="true">
            <text:list-header>
              <text:h text:style-name="P2" text:outline-level="2">PARTE 8 — GESTÃO DE RISCO CORRELACIONAL</text:h>
              <text:list>
                <text:list-header>
                  <text:h text:style-name="P4" text:outline-level="3">8.1 Regras de Risco</text:h>
                </text:list-header>
              </text:list>
            </text:list-header>
          </text:list>
          <text:p text:style-name="P6">text</text:p>
          <text:p text:style-name="P7"><text:span text:style-name="Source_20_Text">REGRA 1 — LIMITE DE EXPOSIÇÃO POR TRADE</text:span></text:p>
          <text:p text:style-name="P7"><text:span text:style-name="Source_20_Text">├── Risco máximo por operação: definir % fixo do capital</text:span></text:p>
          <text:p text:style-name="P7"><text:span text:style-name="Source_20_Text">├── Calculado sobre o spread, não sobre ativos individuais</text:span></text:p>
          <text:p text:style-name="P7"><text:span text:style-name="Source_20_Text">└── Ajustado pela volatilidade atual do spread</text:span></text:p>
          <text:p text:style-name="P7"/>
          <text:p text:style-name="P7"><text:span text:style-name="Source_20_Text">REGRA 2 — STOP POR EXPANSÃO DE SPREAD</text:span></text:p>
          <text:p text:style-name="P7"><text:span text:style-name="Source_20_Text">├── Se o spread continua expandindo além do ponto de entrada</text:span></text:p>
          <text:p text:style-name="P7"><text:span text:style-name="Source_20_Text">├── Stop definido por múltiplos de ATR do spread</text:span></text:p>
          <text:p text:style-name="P7"><text:span text:style-name="Source_20_Text">├── Não por pontos fixos nos ativos individuais</text:span></text:p>
          <text:p text:style-name="P7"><text:span text:style-name="Source_20_Text">└── Stop "de correlação": se a correlação muda de regime, sair</text:span></text:p>
          <text:p text:style-name="P7"/>
          <text:p text:style-name="P7"><text:span text:style-name="Source_20_Text">REGRA 3 — TEMPO MÁXIMO DE EXPOSIÇÃO</text:span></text:p>
          <text:p text:style-name="P7"><text:span text:style-name="Source_20_Text">├── Se a reconvergência não acontece em X períodos</text:span></text:p>
          <text:p text:style-name="P7"><text:span text:style-name="Source_20_Text">├── Saída parcial ou total por "decaimento temporal"</text:span></text:p>
          <text:p text:style-name="P7"><text:span text:style-name="Source_20_Text">├── A tese tem prazo de validade</text:span></text:p>
          <text:p text:style-name="P7"><text:span text:style-name="Source_20_Text">└── Definir janela máxima por timeframe operado</text:span></text:p>
          <text:p text:style-name="P7"/>
          <text:p text:style-name="P7"><text:span text:style-name="Source_20_Text">REGRA 4 — FILTRO DE REGIME</text:span></text:p>
          <text:p text:style-name="P7"><text:span text:style-name="Source_20_Text">├── NÃO operar quando IRC indica regime anômalo</text:span></text:p>
          <text:p text:style-name="P7"><text:span text:style-name="Source_20_Text">├── NÃO operar em horários de baixa liquidez sem filtro</text:span></text:p>
          <text:p text:style-name="P7"><text:soft-page-break/><text:span text:style-name="Source_20_Text">├── NÃO operar contra eventos macro programados</text:span></text:p>
          <text:p text:style-name="P7"><text:span text:style-name="Source_20_Text">└── Lista de "no-trade zones"</text:span></text:p>
          <text:p text:style-name="P7"/>
          <text:p text:style-name="P7"><text:span text:style-name="Source_20_Text">REGRA 5 — DRAWDOWN DO SISTEMA</text:span></text:p>
          <text:p text:style-name="P7"><text:span text:style-name="Source_20_Text">├── Drawdown máximo diário do sistema correlacional</text:span></text:p>
          <text:p text:style-name="P7"><text:span text:style-name="Source_20_Text">├── Drawdown máximo semanal</text:span></text:p>
          <text:p text:style-name="P7"><text:span text:style-name="Source_20_Text">├── Drawdown máximo mensal</text:span></text:p>
          <text:p text:style-name="P7"><text:span text:style-name="Source_20_Text">├── Ao atingir qualquer um: pausar, revisar, recalibrar</text:span></text:p>
          <text:p text:style-name="P6"><text:span text:style-name="Source_20_Text">└── Escala progressiva de redução de tamanho</text:span></text:p>
          <text:list>
            <text:list-item>
              <text:list>
                <text:list-header>
                  <text:h text:style-name="P4" text:outline-level="3">8.2 Sizing Dinâmico</text:h>
                </text:list-header>
              </text:list>
            </text:list-item>
          </text:list>
          <text:p text:style-name="P6">text</text:p>
          <text:p text:style-name="P7"><text:span text:style-name="Source_20_Text">NÍVEL DE CONVICÇÃO → TAMANHO DA POSIÇÃO</text:span></text:p>
          <text:p text:style-name="P7"/>
          <text:p text:style-name="P7"><text:span text:style-name="Source_20_Text">CONVICÇÃO MÁXIMA (múltiplos sinais convergentes):</text:span></text:p>
          <text:p text:style-name="P7"><text:span text:style-name="Source_20_Text">├── Spread em extremo estatístico (Z &gt; 2.0)</text:span></text:p>
          <text:p text:style-name="P7"><text:span text:style-name="Source_20_Text">├── + Sinal de microestrutura confirmando</text:span></text:p>
          <text:p text:style-name="P7"><text:span text:style-name="Source_20_Text">├── + Regime correlacional forte (IRC alto)</text:span></text:p>
          <text:p text:style-name="P7"><text:span text:style-name="Source_20_Text">├── + Janela temporal favorável</text:span></text:p>
          <text:p text:style-name="P7"><text:span text:style-name="Source_20_Text">├── + Sem evento macro iminente</text:span></text:p>
          <text:p text:style-name="P7"><text:span text:style-name="Source_20_Text">└── → TAMANHO CHEIO</text:span></text:p>
          <text:p text:style-name="P7"/>
          <text:p text:style-name="P7"><text:span text:style-name="Source_20_Text">CONVICÇÃO ALTA (maioria dos sinais presentes):</text:span></text:p>
          <text:p text:style-name="P7"><text:span text:style-name="Source_20_Text">├── Spread esticado (Z &gt; 1.5)</text:span></text:p>
          <text:p text:style-name="P7"><text:span text:style-name="Source_20_Text">├── + Pelo menos 1 sinal de microestrutura</text:span></text:p>
          <text:p text:style-name="P7"><text:span text:style-name="Source_20_Text">├── + Regime correlacional moderado+</text:span></text:p>
          <text:p text:style-name="P7"><text:span text:style-name="Source_20_Text">└── → 70% DO TAMANHO</text:span></text:p>
          <text:p text:style-name="P7"/>
          <text:p text:style-name="P7"><text:span text:style-name="Source_20_Text">CONVICÇÃO MODERADA (sinais mistos):</text:span></text:p>
          <text:p text:style-name="P7"><text:span text:style-name="Source_20_Text">├── Spread moderadamente esticado</text:span></text:p>
          <text:p text:style-name="P7"><text:span text:style-name="Source_20_Text">├── + Sinais ambíguos</text:span></text:p>
          <text:p text:style-name="P7"><text:span text:style-name="Source_20_Text">└── → 40% DO TAMANHO OU NÃO OPERAR</text:span></text:p>
          <text:p text:style-name="P7"/>
          <text:p text:style-name="P7"><text:span text:style-name="Source_20_Text">CONVICÇÃO BAIXA:</text:span></text:p>
          <text:p text:style-name="P6"><text:span text:style-name="Source_20_Text">└── → NÃO OPERAR</text:span></text:p>
          <text:p text:style-name="P3"/>
          <text:list text:continue-numbering="true">
            <text:list-header>
              <text:h text:style-name="P2" text:outline-level="2">PARTE 9 — DASHBOARD DE MONITORAMENTO</text:h>
              <text:list>
                <text:list-header>
                  <text:h text:style-name="P4" text:outline-level="3">9.1 Painel Principal — Visão em Tempo Real</text:h>
                </text:list-header>
              </text:list>
            </text:list-header>
          </text:list>
          <text:p text:style-name="P6">text</text:p>
          <text:p text:style-name="P7"><text:span text:style-name="Source_20_Text">┌──────────────────────────────────────────────────────────────┐</text:span></text:p>
          <text:p text:style-name="P7"><text:span text:style-name="Source_20_Text">│ <text:s/>CORR-SYNC DASHBOARD <text:s text:c="40"/>│</text:span></text:p>
          <text:p text:style-name="P7"><text:span text:style-name="Source_20_Text">├──────────────────────────────────────────────────────────────┤</text:span></text:p>
          <text:p text:style-name="P7"><text:span text:style-name="Source_20_Text">│ <text:s text:c="61"/>│</text:span></text:p>
          <text:p text:style-name="P7"><text:span text:style-name="Source_20_Text">│ <text:s/>[REGIME ATUAL] <text:s text:c="9"/>[SPREAD Z-SCORE] <text:s text:c="3"/>[TENSÃO] <text:s text:c="7"/>│</text:span></text:p>
          <text:p text:style-name="P7"><text:span text:style-name="Source_20_Text">│ <text:s text:c="2"/>● DESSINCRONIA <text:s text:c="9"/>+1.87σ <text:s text:c="13"/>████████░░ <text:s text:c="4"/>│</text:span></text:p>
          <text:p text:style-name="P7"><text:span text:style-name="Source_20_Text">│ <text:s text:c="4"/>(WIN lidera) <text:s text:c="9"/>▲ expandindo <text:s text:c="7"/>80% ALTA <text:s text:c="6"/>│</text:span></text:p>
          <text:p text:style-name="P7"><text:span text:style-name="Source_20_Text">│ <text:s text:c="61"/>│</text:span></text:p>
          <text:p text:style-name="P7"><text:span text:style-name="Source_20_Text">│ <text:s/>[IRC - Índice Correlação] <text:s text:c="3"/>[IAR - Atraso Relativo] <text:s text:c="7"/>│</text:span></text:p>
          <text:p text:style-name="P7"><text:span text:style-name="Source_20_Text">│ <text:s text:c="2"/>-0.42 (moderado) <text:s text:c="11"/>WIN +340pts vs WDO esperado <text:s text:c="3"/>│</text:span></text:p>
          <text:p text:style-name="P7"><text:span text:style-name="Source_20_Text">│ <text:s text:c="2"/>▼ enfraquecendo <text:s text:c="12"/>WDO é o ativo atrasado <text:s text:c="8"/>│</text:span></text:p>
          <text:p text:style-name="P7"><text:span text:style-name="Source_20_Text">│ <text:s text:c="61"/>│</text:span></text:p>
          <text:p text:style-name="P7"><text:span text:style-name="Source_20_Text">│ <text:s/>[SINAIS ATIVOS] <text:s text:c="44"/>│</text:span></text:p>
          <text:p text:style-name="P7"><text:soft-page-break/><text:span text:style-name="Source_20_Text">│ <text:s text:c="2"/>✓ Q1 - Z-Score próximo de extremo <text:s text:c="24"/>│</text:span></text:p>
          <text:p text:style-name="P7"><text:span text:style-name="Source_20_Text">│ <text:s text:c="2"/>✓ M2 - Exaustão de momentum no WIN <text:s text:c="23"/>│</text:span></text:p>
          <text:p text:style-name="P7"><text:span text:style-name="Source_20_Text">│ <text:s text:c="2"/>✗ M1 - Sem divergência de fluxo ainda <text:s text:c="20"/>│</text:span></text:p>
          <text:p text:style-name="P7"><text:span text:style-name="Source_20_Text">│ <text:s text:c="2"/>✓ E2 - Divergência de volatilidade presente <text:s text:c="14"/>│</text:span></text:p>
          <text:p text:style-name="P7"><text:span text:style-name="Source_20_Text">│ <text:s text:c="61"/>│</text:span></text:p>
          <text:p text:style-name="P7"><text:span text:style-name="Source_20_Text">│ <text:s/>[CONVICÇÃO ATUAL] <text:s text:c="7"/>[AÇÃO SUGERIDA] <text:s text:c="19"/>│</text:span></text:p>
          <text:p text:style-name="P7"><text:span text:style-name="Source_20_Text">│ <text:s text:c="2"/>████████░░ ALTA <text:s text:c="9"/>PREPARAR: Compra WDO + Venda WIN <text:s/>│</text:span></text:p>
          <text:p text:style-name="P7"><text:span text:style-name="Source_20_Text">│ <text:s text:c="2"/>3 de 4 sinais <text:s text:c="11"/>Aguardar sinal M1 ou M3 <text:s text:c="10"/>│</text:span></text:p>
          <text:p text:style-name="P7"><text:span text:style-name="Source_20_Text">│ <text:s text:c="61"/>│</text:span></text:p>
          <text:p text:style-name="P7"><text:span text:style-name="Source_20_Text">│ <text:s/>[PRÓXIMOS EVENTOS] <text:s text:c="41"/>│</text:span></text:p>
          <text:p text:style-name="P7"><text:span text:style-name="Source_20_Text">│ <text:s text:c="2"/>10:30 - Abertura EUA <text:s text:c="38"/>│</text:span></text:p>
          <text:p text:style-name="P7"><text:span text:style-name="Source_20_Text">│ <text:s text:c="2"/>11:00 - Dados de emprego EUA <text:s text:c="30"/>│</text:span></text:p>
          <text:p text:style-name="P7"><text:span text:style-name="Source_20_Text">│ <text:s text:c="2"/>⚠ Ajustar sizing por evento <text:s text:c="30"/>│</text:span></text:p>
          <text:p text:style-name="P7"><text:span text:style-name="Source_20_Text">│ <text:s text:c="61"/>│</text:span></text:p>
          <text:p text:style-name="P6"><text:span text:style-name="Source_20_Text">└──────────────────────────────────────────────────────────────┘</text:span></text:p>
          <text:list>
            <text:list-item>
              <text:list>
                <text:list-header>
                  <text:h text:style-name="P4" text:outline-level="3">9.2 Painéis Auxiliares</text:h>
                </text:list-header>
              </text:list>
            </text:list-item>
          </text:list>
          <text:p text:style-name="P6">text</text:p>
          <text:p text:style-name="P7"><text:span text:style-name="Source_20_Text">PAINEL 2 — HISTÓRICO DE RECONVERGÊNCIAS</text:span></text:p>
          <text:p text:style-name="P7"><text:span text:style-name="Source_20_Text">├── Últimas 50 reconvergências do spread</text:span></text:p>
          <text:p text:style-name="P7"><text:span text:style-name="Source_20_Text">├── Tempo médio de reconvergência por faixa de Z-Score</text:span></text:p>
          <text:p text:style-name="P7"><text:span text:style-name="Source_20_Text">├── Taxa de sucesso por tipo de sinal</text:span></text:p>
          <text:p text:style-name="P7"><text:span text:style-name="Source_20_Text">└── Drawdown médio antes da reconvergência</text:span></text:p>
          <text:p text:style-name="P7"/>
          <text:p text:style-name="P7"><text:span text:style-name="Source_20_Text">PAINEL 3 — MAPA DE CALOR TEMPORAL</text:span></text:p>
          <text:p text:style-name="P7"><text:span text:style-name="Source_20_Text">├── Heatmap: hora do dia vs taxa de sucesso de reconvergência</text:span></text:p>
          <text:p text:style-name="P7"><text:span text:style-name="Source_20_Text">├── Heatmap: dia da semana vs intensidade de correlação</text:span></text:p>
          <text:p text:style-name="P7"><text:span text:style-name="Source_20_Text">└── Identificação visual dos melhores momentos operacionais</text:span></text:p>
          <text:p text:style-name="P7"/>
          <text:p text:style-name="P7"><text:span text:style-name="Source_20_Text">PAINEL 4 — ANÁLISE DE FLUXO COMPARATIVO</text:span></text:p>
          <text:p text:style-name="P7"><text:span text:style-name="Source_20_Text">├── Fluxo de ordens WIN em tempo real</text:span></text:p>
          <text:p text:style-name="P7"><text:span text:style-name="Source_20_Text">├── Fluxo de ordens WDO em tempo real</text:span></text:p>
          <text:p text:style-name="P7"><text:span text:style-name="Source_20_Text">├── Delta acumulado comparativo</text:span></text:p>
          <text:p text:style-name="P7"><text:span text:style-name="Source_20_Text">└── Agressão compradora vs vendedora lado a lado</text:span></text:p>
          <text:p text:style-name="P7"/>
          <text:p text:style-name="P7"><text:span text:style-name="Source_20_Text">PAINEL 5 — LOG DE OPERAÇÕES E PERFORMANCE</text:span></text:p>
          <text:p text:style-name="P7"><text:span text:style-name="Source_20_Text">├── Todas as operações do sistema</text:span></text:p>
          <text:p text:style-name="P7"><text:span text:style-name="Source_20_Text">├── P&amp;L acumulado</text:span></text:p>
          <text:p text:style-name="P7"><text:span text:style-name="Source_20_Text">├── Métricas: Sharpe, Sortino, taxa de acerto, payoff</text:span></text:p>
          <text:p text:style-name="P7"><text:span text:style-name="Source_20_Text">├── Análise de atribuição (qual sinal gerou mais resultado)</text:span></text:p>
          <text:p text:style-name="P6"><text:span text:style-name="Source_20_Text">└── Curva de equity com drawdowns marcados</text:span></text:p>
          <text:p text:style-name="P3"/>
          <text:list text:continue-numbering="true">
            <text:list-header>
              <text:h text:style-name="P2" text:outline-level="2">PARTE 10 — CICLO DE EVOLUÇÃO DO SISTEMA</text:h>
              <text:list>
                <text:list-header>
                  <text:h text:style-name="P4" text:outline-level="3">10.1 Fases de Desenvolvimento</text:h>
                </text:list-header>
              </text:list>
            </text:list-header>
          </text:list>
          <text:p text:style-name="P6">text</text:p>
          <text:p text:style-name="P7"><text:span text:style-name="Source_20_Text">FASE 1 — PESQUISA E VALIDAÇÃO (Semanas 1-4)</text:span></text:p>
          <text:p text:style-name="P7"><text:span text:style-name="Source_20_Text">├── Coleta de dados históricos (tick, 1min, 5min, diário)</text:span></text:p>
          <text:p text:style-name="P7"><text:span text:style-name="Source_20_Text">├── Análise estatística da correlação histórica</text:span></text:p>
          <text:p text:style-name="P7"><text:span text:style-name="Source_20_Text">├── Identificação e catalogação de padrões de dessincronia</text:span></text:p>
          <text:p text:style-name="P7"><text:span text:style-name="Source_20_Text">├── Backtest dos sinais precursores individualmente</text:span></text:p>
          <text:p text:style-name="P7"><text:span text:style-name="Source_20_Text">├── Definição de parâmetros iniciais</text:span></text:p>
          <text:p text:style-name="P7"><text:span text:style-name="Source_20_Text">└── Entregável: Relatório de viabilidade + parâmetros base</text:span></text:p>
          <text:p text:style-name="P7"><text:soft-page-break/></text:p>
          <text:p text:style-name="P7"><text:span text:style-name="Source_20_Text">FASE 2 — CONSTRUÇÃO (Semanas 5-8)</text:span></text:p>
          <text:p text:style-name="P7"><text:span text:style-name="Source_20_Text">├── Desenvolvimento dos indicadores proprietários</text:span></text:p>
          <text:p text:style-name="P7"><text:span text:style-name="Source_20_Text">├── Construção do dashboard</text:span></text:p>
          <text:p text:style-name="P7"><text:span text:style-name="Source_20_Text">├── Implementação do motor de sinais</text:span></text:p>
          <text:p text:style-name="P7"><text:span text:style-name="Source_20_Text">├── Backtest do sistema integrado</text:span></text:p>
          <text:p text:style-name="P7"><text:span text:style-name="Source_20_Text">├── Otimização de parâmetros (walk-forward)</text:span></text:p>
          <text:p text:style-name="P7"><text:span text:style-name="Source_20_Text">└── Entregável: Sistema funcional em ambiente de teste</text:span></text:p>
          <text:p text:style-name="P7"/>
          <text:p text:style-name="P7"><text:span text:style-name="Source_20_Text">FASE 3 — SIMULAÇÃO (Semanas 9-12)</text:span></text:p>
          <text:p text:style-name="P7"><text:span text:style-name="Source_20_Text">├── Paper trading em tempo real</text:span></text:p>
          <text:p text:style-name="P7"><text:span text:style-name="Source_20_Text">├── Validação dos sinais em condições reais</text:span></text:p>
          <text:p text:style-name="P7"><text:span text:style-name="Source_20_Text">├── Ajuste fino de parâmetros</text:span></text:p>
          <text:p text:style-name="P7"><text:span text:style-name="Source_20_Text">├── Documentação de discrepâncias entre backtest e realidade</text:span></text:p>
          <text:p text:style-name="P7"><text:span text:style-name="Source_20_Text">├── Treinamento operacional</text:span></text:p>
          <text:p text:style-name="P7"><text:span text:style-name="Source_20_Text">└── Entregável: Relatório de simulação + ajustes finais</text:span></text:p>
          <text:p text:style-name="P7"/>
          <text:p text:style-name="P7"><text:span text:style-name="Source_20_Text">FASE 4 — OPERAÇÃO CONTROLADA (Semanas 13-20)</text:span></text:p>
          <text:p text:style-name="P7"><text:span text:style-name="Source_20_Text">├── Operação com tamanho mínimo (1 contrato de cada)</text:span></text:p>
          <text:p text:style-name="P7"><text:span text:style-name="Source_20_Text">├── Validação em capital real</text:span></text:p>
          <text:p text:style-name="P7"><text:span text:style-name="Source_20_Text">├── Monitoramento intensivo de todas as métricas</text:span></text:p>
          <text:p text:style-name="P7"><text:span text:style-name="Source_20_Text">├── Refinamento contínuo dos sinais</text:span></text:p>
          <text:p text:style-name="P7"><text:span text:style-name="Source_20_Text">└── Entregável: Track record inicial + relatório de performance</text:span></text:p>
          <text:p text:style-name="P7"/>
          <text:p text:style-name="P7"><text:span text:style-name="Source_20_Text">FASE 5 — ESCALA (Semana 21+)</text:span></text:p>
          <text:p text:style-name="P7"><text:span text:style-name="Source_20_Text">├── Aumento gradual de tamanho conforme confiança</text:span></text:p>
          <text:p text:style-name="P7"><text:span text:style-name="Source_20_Text">├── Adição de novos sinais validados</text:span></text:p>
          <text:p text:style-name="P7"><text:span text:style-name="Source_20_Text">├── Automação progressiva</text:span></text:p>
          <text:p text:style-name="P7"><text:span text:style-name="Source_20_Text">├── Revisão mensal de performance e calibração</text:span></text:p>
          <text:p text:style-name="P6"><text:span text:style-name="Source_20_Text">└── Entregável: Sistema em produção com governance definido</text:span></text:p>
          <text:list>
            <text:list-item>
              <text:list>
                <text:list-header>
                  <text:h text:style-name="P4" text:outline-level="3">10.2 Revisão e Calibração Contínua</text:h>
                </text:list-header>
              </text:list>
            </text:list-item>
          </text:list>
          <text:p text:style-name="P6">text</text:p>
          <text:p text:style-name="P7"><text:span text:style-name="Source_20_Text">DIÁRIO:</text:span></text:p>
          <text:p text:style-name="P7"><text:span text:style-name="Source_20_Text">├── Revisar operações do dia</text:span></text:p>
          <text:p text:style-name="P7"><text:span text:style-name="Source_20_Text">├── Anotar sinais que funcionaram e que falharam</text:span></text:p>
          <text:p text:style-name="P7"><text:span text:style-name="Source_20_Text">└── Verificar se o regime correlacional mudou</text:span></text:p>
          <text:p text:style-name="P7"/>
          <text:p text:style-name="P7"><text:span text:style-name="Source_20_Text">SEMANAL:</text:span></text:p>
          <text:p text:style-name="P7"><text:span text:style-name="Source_20_Text">├── Análise de performance semanal</text:span></text:p>
          <text:p text:style-name="P7"><text:span text:style-name="Source_20_Text">├── Recalibrar parâmetros se necessário</text:span></text:p>
          <text:p text:style-name="P7"><text:span text:style-name="Source_20_Text">├── Verificar se novos padrões emergiram</text:span></text:p>
          <text:p text:style-name="P7"><text:span text:style-name="Source_20_Text">└── Atualizar base estatística</text:span></text:p>
          <text:p text:style-name="P7"/>
          <text:p text:style-name="P7"><text:span text:style-name="Source_20_Text">MENSAL:</text:span></text:p>
          <text:p text:style-name="P7"><text:span text:style-name="Source_20_Text">├── Relatório completo de performance</text:span></text:p>
          <text:p text:style-name="P7"><text:span text:style-name="Source_20_Text">├── Análise de atribuição por tipo de sinal</text:span></text:p>
          <text:p text:style-name="P7"><text:span text:style-name="Source_20_Text">├── Revisão de parâmetros de risco</text:span></text:p>
          <text:p text:style-name="P7"><text:span text:style-name="Source_20_Text">├── Comparação com benchmarks</text:span></text:p>
          <text:p text:style-name="P7"><text:span text:style-name="Source_20_Text">└── Decisão sobre ajustes estruturais</text:span></text:p>
          <text:p text:style-name="P7"/>
          <text:p text:style-name="P7"><text:span text:style-name="Source_20_Text">TRIMESTRAL:</text:span></text:p>
          <text:p text:style-name="P7"><text:span text:style-name="Source_20_Text">├── Revisão profunda do modelo</text:span></text:p>
          <text:p text:style-name="P7"><text:span text:style-name="Source_20_Text">├── Pesquisa de novos sinais/variáveis</text:span></text:p>
          <text:p text:style-name="P7"><text:span text:style-name="Source_20_Text">├── Stress test com cenários extremos</text:span></text:p>
          <text:p text:style-name="P6"><text:span text:style-name="Source_20_Text">└── Decisão sobre evolução do sistema</text:span></text:p>
          <text:p text:style-name="P3"/>
          <text:list text:continue-numbering="true">
            <text:list-header>
              <text:h text:style-name="P2" text:outline-level="2"><text:soft-page-break/>PARTE 11 — DIFERENCIAIS INSTITUCIONAIS</text:h>
            </text:list-header>
          </text:list>
          <text:p text:style-name="P6">text</text:p>
          <text:p text:style-name="P7"><text:span text:style-name="Source_20_Text">O QUE TORNA ESTE SISTEMA INSTITUCIONAL:</text:span></text:p>
          <text:p text:style-name="P7"/>
          <text:p text:style-name="P7"><text:span text:style-name="Source_20_Text">1. MULTI-CAMADA</text:span></text:p>
          <text:p text:style-name="P7"><text:span text:style-name="Source_20_Text"><text:s text:c="3"/>Não depende de um único indicador — usa convergência</text:span></text:p>
          <text:p text:style-name="P7"><text:span text:style-name="Source_20_Text"><text:s text:c="3"/>de múltiplos sinais em múltiplos timeframes</text:span></text:p>
          <text:p text:style-name="P7"/>
          <text:p text:style-name="P7"><text:span text:style-name="Source_20_Text">2. REGIME-AWARE</text:span></text:p>
          <text:p text:style-name="P7"><text:span text:style-name="Source_20_Text"><text:s text:c="3"/>Reconhece que o mercado muda de regime e se adapta,</text:span></text:p>
          <text:p text:style-name="P7"><text:span text:style-name="Source_20_Text"><text:s text:c="3"/>em vez de operar com parâmetros fixos</text:span></text:p>
          <text:p text:style-name="P7"/>
          <text:p text:style-name="P7"><text:span text:style-name="Source_20_Text">3. RISK-FIRST</text:span></text:p>
          <text:p text:style-name="P7"><text:span text:style-name="Source_20_Text"><text:s text:c="3"/>O risco é definido antes da oportunidade,</text:span></text:p>
          <text:p text:style-name="P7"><text:span text:style-name="Source_20_Text"><text:s text:c="3"/>não depois</text:span></text:p>
          <text:p text:style-name="P7"/>
          <text:p text:style-name="P7"><text:span text:style-name="Source_20_Text">4. PROCESS-DRIVEN</text:span></text:p>
          <text:p text:style-name="P7"><text:span text:style-name="Source_20_Text"><text:s text:c="3"/>Decisões baseadas em processo sistemático,</text:span></text:p>
          <text:p text:style-name="P7"><text:span text:style-name="Source_20_Text"><text:s text:c="3"/>não em intuição</text:span></text:p>
          <text:p text:style-name="P7"/>
          <text:p text:style-name="P7"><text:span text:style-name="Source_20_Text">5. EVOLUTIVO</text:span></text:p>
          <text:p text:style-name="P7"><text:span text:style-name="Source_20_Text"><text:s text:c="3"/>Sistema projetado para aprender e se adaptar</text:span></text:p>
          <text:p text:style-name="P7"><text:span text:style-name="Source_20_Text"><text:s text:c="3"/>continuamente com dados novos</text:span></text:p>
          <text:p text:style-name="P7"/>
          <text:p text:style-name="P7"><text:span text:style-name="Source_20_Text">6. DOCUMENTADO</text:span></text:p>
          <text:p text:style-name="P7"><text:span text:style-name="Source_20_Text"><text:s text:c="3"/>Cada decisão, cada trade, cada ajuste é registrado</text:span></text:p>
          <text:p text:style-name="P7"><text:span text:style-name="Source_20_Text"><text:s text:c="3"/>e auditável</text:span></text:p>
          <text:p text:style-name="P7"/>
          <text:p text:style-name="P7"><text:span text:style-name="Source_20_Text">7. ROBUSTO</text:span></text:p>
          <text:p text:style-name="P7"><text:span text:style-name="Source_20_Text"><text:s text:c="3"/>Testado em múltiplos regimes de mercado,</text:span></text:p>
          <text:p text:style-name="P6"><text:span text:style-name="Source_20_Text"><text:s text:c="3"/>não apenas otimizado para o passado</text:span></text:p>
          <text:p text:style-name="P3"/>
          <text:list text:continue-numbering="true">
            <text:list-header>
              <text:h text:style-name="P2" text:outline-level="2">RESUMO EXECUTIVO</text:h>
            </text:list-header>
          </text:list>
          <text:p text:style-name="P8"><text:span text:style-name="Strong_20_Emphasis">O sistema CORR-SYNC monitora a frequência de correlação negativa entre WIN e WDO, identifica momentos de dessincronia (tensão acumulada), detecta sinais precursores de reconvergência através de 4 camadas de análise (macro, frequência, tensão e microestrutura), e executa operações de reconvergência com gestão de risco baseada em regime correlacional.</text:span></text:p>
          <text:p text:style-name="P8"><text:span text:style-name="Strong_20_Emphasis">O edge não está em "saber que a correlação existe" — está em saber QUANDO ela vai se reafirmar e posicionar-se ANTES.</text:span></text:p>
          <text:p text:style-name="P3"/>
          <text:p text:style-name="P5">Este é o plano estrutural completo. Quando quiser, posso detalhar qualquer seção específica ou começar a traduzir alguma parte em código.</text:p>
          <text:p text:style-name="P5">estou querendo montar um plano para meu sistema. meu plano seria assim:<text:line-break/>monitorar a frequencia entre 2 ativos aonde tem correlação negativa, ativos mini dólar e mini indice , fazer a monitoração para encontrar momento e pontos aonde possa dar o sinal de direção opostas, acompanhar o que acontece para isso ocorra, sei que as vezes uma ativo anda e outro fica parado, mas se tem uma correlação , então deve indicar sinais para que esse <text:soft-page-break/>correlação aconteça sinais que vem se apresentando ao logo que o gráfico vai andando..<text:line-break/>faça um plano sem escrever códigos por enquanto, crie um estrutura de plano que possa fica a nível institucional focando nessa frequência entre esse 2 ativos, buscando sinais que antecipam essa correlação negativa.</text:p>
        </text:list-header>
      </text:list>
      <text:p text:style-name="P9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1T10:40:13.172794900</meta:creation-date>
    <dc:date>2026-04-01T10:43:51.613288100</dc:date>
    <meta:editing-duration>PT3M39S</meta:editing-duration>
    <meta:editing-cycles>1</meta:editing-cycles>
    <meta:document-statistic meta:table-count="0" meta:image-count="0" meta:object-count="0" meta:page-count="12" meta:paragraph-count="477" meta:word-count="3067" meta:character-count="20843" meta:non-whitespace-character-count="16967"/>
    <meta:generator>LibreOffice/26.2.0.3$Windows_X86_64 LibreOffice_project/620$Build-3</meta:generator>
  </office:meta>
</office:document-meta>
</file>