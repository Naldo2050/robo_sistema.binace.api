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199cm" table:align="left"/>
    </style:style>
    <style:style style:name="Tabela1.A" style:family="table-column">
      <style:table-column-properties style:column-width="7.706cm"/>
    </style:style>
    <style:style style:name="Tabela1.B" style:family="table-column">
      <style:table-column-properties style:column-width="6.49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3.54cm" table:align="left"/>
    </style:style>
    <style:style style:name="Tabela2.A" style:family="table-column">
      <style:table-column-properties style:column-width="5.925cm"/>
    </style:style>
    <style:style style:name="Tabela2.B" style:family="table-column">
      <style:table-column-properties style:column-width="3.089cm"/>
    </style:style>
    <style:style style:name="Tabela2.C" style:family="table-column">
      <style:table-column-properties style:column-width="2.185cm"/>
    </style:style>
    <style:style style:name="Tabela2.D" style:family="table-column">
      <style:table-column-properties style:column-width="2.34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  <style:text-properties fo:background-color="#ffff00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Heading_20_1">
      <style:paragraph-properties fo:margin-left="0cm" fo:margin-right="0cm" fo:text-indent="0cm" style:auto-text-indent="false"/>
      <style:text-properties fo:color="#111111" loext:opacity="100%" fo:background-color="#00a933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text-indent="0cm" style:auto-text-indent="fals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text-indent="0cm" style:auto-text-indent="fals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8">
      <style:paragraph-properties fo:margin-left="0cm" fo:margin-right="0cm" fo:text-indent="0cm" style:auto-text-indent="false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9">
      <style:paragraph-properties fo:margin-left="0cm" fo:margin-right="0cm" fo:text-indent="0cm" style:auto-text-indent="false"/>
    </style:style>
    <style:style style:name="P28" style:family="paragraph" style:parent-style-name="Text_20_body" style:list-style-name="L10">
      <style:paragraph-properties fo:margin-left="0cm" fo:margin-right="0cm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1">
      <style:paragraph-properties fo:margin-left="0cm" fo:margin-right="0cm" fo:text-indent="0cm" style:auto-text-indent="false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2">
      <style:paragraph-properties fo:margin-left="0cm" fo:margin-right="0cm" fo:text-indent="0cm" style:auto-text-indent="false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3">
      <style:paragraph-properties fo:margin-left="0cm" fo:margin-right="0cm" fo:text-indent="0cm" style:auto-text-indent="false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4">
      <style:paragraph-properties fo:margin-left="0cm" fo:margin-right="0cm" fo:text-indent="0cm" style:auto-text-indent="false"/>
    </style:style>
    <style:style style:name="P37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5">
      <style:paragraph-properties fo:margin-left="0cm" fo:margin-right="0cm" fo:text-indent="0cm" style:auto-text-indent="false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6">
      <style:paragraph-properties fo:margin-left="0cm" fo:margin-right="0cm" fo:text-indent="0cm" style:auto-text-indent="false"/>
    </style:style>
    <style:style style:name="P41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7">
      <style:paragraph-properties fo:margin-left="0cm" fo:margin-right="0cm" fo:text-indent="0cm" style:auto-text-indent="false"/>
    </style:style>
    <style:style style:name="P43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8">
      <style:paragraph-properties fo:margin-left="0cm" fo:margin-right="0cm" fo:text-indent="0cm" style:auto-text-indent="false"/>
    </style:style>
    <style:style style:name="P45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9">
      <style:paragraph-properties fo:margin-left="0cm" fo:margin-right="0cm" fo:text-indent="0cm" style:auto-text-indent="false"/>
    </style:style>
    <style:style style:name="P47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20">
      <style:paragraph-properties fo:margin-left="0cm" fo:margin-right="0cm" fo:text-indent="0cm" style:auto-text-indent="false"/>
    </style:style>
    <style:style style:name="P49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21">
      <style:paragraph-properties fo:margin-left="0cm" fo:margin-right="0cm" fo:text-indent="0cm" style:auto-text-indent="false"/>
    </style:style>
    <style:style style:name="P51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2">
      <style:paragraph-properties fo:margin-left="0cm" fo:margin-right="0cm" fo:text-indent="0cm" style:auto-text-indent="false"/>
    </style:style>
    <style:style style:name="P53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4" style:family="paragraph" style:parent-style-name="Text_20_body" style:list-style-name="L23">
      <style:paragraph-properties fo:margin-left="0cm" fo:margin-right="0cm" fo:text-indent="0cm" style:auto-text-indent="false"/>
    </style:style>
    <style:style style:name="P55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4">
      <style:paragraph-properties fo:margin-left="0cm" fo:margin-right="0cm" fo:text-indent="0cm" style:auto-text-indent="false"/>
    </style:style>
    <style:style style:name="P57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58" style:family="paragraph" style:parent-style-name="Text_20_body" style:list-style-name="L25">
      <style:paragraph-properties fo:margin-left="0cm" fo:margin-right="0cm" fo:text-indent="0cm" style:auto-text-indent="false"/>
    </style:style>
    <style:style style:name="P59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60" style:family="paragraph" style:parent-style-name="Text_20_body" style:list-style-name="L26">
      <style:paragraph-properties fo:margin-left="0cm" fo:margin-right="0cm" fo:text-indent="0cm" style:auto-text-indent="false"/>
    </style:style>
    <style:style style:name="P61" style:family="paragraph" style:parent-style-name="Heading_20_1">
      <style:paragraph-properties fo:margin-left="0cm" fo:margin-right="0cm" fo:text-indent="0cm" style:auto-text-indent="false"/>
    </style:style>
    <style:style style:name="P62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Text_20_body" style:list-style-name="L27">
      <style:paragraph-properties fo:margin-left="0cm" fo:margin-right="0cm" fo:text-indent="0cm" style:auto-text-indent="false"/>
    </style:style>
    <style:style style:name="P64" style:family="paragraph" style:parent-style-name="Quotations">
      <style:paragraph-properties fo:margin-left="1cm" fo:margin-right="1cm" fo:text-indent="0cm" style:auto-text-indent="false"/>
    </style:style>
    <style:style style:name="P65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28">
      <style:paragraph-properties fo:margin-left="0cm" fo:margin-right="0cm" fo:text-indent="0cm" style:auto-text-indent="false"/>
    </style:style>
    <style:style style:name="P67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Text_20_body" style:list-style-name="L29">
      <style:paragraph-properties fo:margin-left="0cm" fo:margin-right="0cm" fo:text-indent="0cm" style:auto-text-indent="false"/>
    </style:style>
    <style:style style:name="P69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70" style:family="paragraph" style:parent-style-name="Text_20_body" style:list-style-name="L30">
      <style:paragraph-properties fo:margin-left="0cm" fo:margin-right="0cm" fo:text-indent="0cm" style:auto-text-indent="false"/>
    </style:style>
    <style:style style:name="P71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31">
      <style:paragraph-properties fo:margin-left="0cm" fo:margin-right="0cm" fo:text-indent="0cm" style:auto-text-indent="false"/>
    </style:style>
    <style:style style:name="P73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74" style:family="paragraph" style:parent-style-name="Text_20_body" style:list-style-name="L32">
      <style:paragraph-properties fo:margin-left="0cm" fo:margin-right="0cm" fo:text-indent="0cm" style:auto-text-indent="false"/>
    </style:style>
    <style:style style:name="P75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 style:list-style-name="L33">
      <style:paragraph-properties fo:margin-left="0cm" fo:margin-right="0cm" fo:text-indent="0cm" style:auto-text-indent="false"/>
    </style:style>
    <style:style style:name="P77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4">
      <style:paragraph-properties fo:margin-left="0cm" fo:margin-right="0cm" fo:text-indent="0cm" style:auto-text-indent="false"/>
    </style:style>
    <style:style style:name="P79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5">
      <style:paragraph-properties fo:margin-left="0cm" fo:margin-right="0cm" fo:text-indent="0cm" style:auto-text-indent="false"/>
    </style:style>
    <style:style style:name="P81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6">
      <style:paragraph-properties fo:margin-left="0cm" fo:margin-right="0cm" fo:text-indent="0cm" style:auto-text-indent="false"/>
    </style:style>
    <style:style style:name="P83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7">
      <style:paragraph-properties fo:margin-left="0cm" fo:margin-right="0cm" fo:text-indent="0cm" style:auto-text-indent="false"/>
    </style:style>
    <style:style style:name="P85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8">
      <style:paragraph-properties fo:margin-left="0cm" fo:margin-right="0cm" fo:text-indent="0cm" style:auto-text-indent="false"/>
    </style:style>
    <style:style style:name="P87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9">
      <style:paragraph-properties fo:margin-left="0cm" fo:margin-right="0cm" fo:text-indent="0cm" style:auto-text-indent="false"/>
    </style:style>
    <style:style style:name="P89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40">
      <style:paragraph-properties fo:margin-left="0cm" fo:margin-right="0cm" fo:text-indent="0cm" style:auto-text-indent="false"/>
    </style:style>
    <style:style style:name="P91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41">
      <style:paragraph-properties fo:margin-left="0cm" fo:margin-right="0cm" fo:text-indent="0cm" style:auto-text-indent="false"/>
    </style:style>
    <style:style style:name="P93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42">
      <style:paragraph-properties fo:margin-left="0cm" fo:margin-right="0cm" fo:text-indent="0cm" style:auto-text-indent="false"/>
    </style:style>
    <style:style style:name="P95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3">
      <style:paragraph-properties fo:margin-left="0cm" fo:margin-right="0cm" fo:text-indent="0cm" style:auto-text-indent="false"/>
    </style:style>
    <style:style style:name="P97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98" style:family="paragraph" style:parent-style-name="Text_20_body" style:list-style-name="L44">
      <style:paragraph-properties fo:margin-left="0cm" fo:margin-right="0cm" fo:text-indent="0cm" style:auto-text-indent="false"/>
    </style:style>
    <style:style style:name="P99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/>
    </style:style>
    <style:style style:name="P100" style:family="paragraph" style:parent-style-name="Text_20_body" style:list-style-name="L45">
      <style:paragraph-properties fo:margin-left="0cm" fo:margin-right="0cm" fo:text-indent="0cm" style:auto-text-indent="false"/>
    </style:style>
    <style:style style:name="P101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/>
    </style:style>
    <style:style style:name="P102" style:family="paragraph" style:parent-style-name="Text_20_body" style:list-style-name="L46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kill Creator no Contexto do Seu Projeto</text:h>
      <text:p text:style-name="P2">Ótima pergunta! Analisando a estrutura do seu bot de trading, o conceito de <text:span text:style-name="Strong_20_Emphasis">Skill Creator</text:span> pode ser <text:span text:style-name="Strong_20_Emphasis">muito útil</text:span> em pelo menos 3 frentes:</text:p>
      <text:p text:style-name="Horizontal_20_Line"/>
      <text:h text:style-name="P3" text:outline-level="2">1. 🤖 Skills para o AI Analyzer (ALTO VALOR)</text:h>
      <text:p text:style-name="P2">Seu projeto já usa LLMs (Qwen/Groq) via <text:span text:style-name="Source_20_Text">ai_analyzer_qwen.py</text:span> e <text:span text:style-name="Source_20_Text">ai_runner/</text:span>. Um sistema de <text:span text:style-name="Strong_20_Emphasis">skills = function calling / tools</text:span> permitiria à IA <text:span text:style-name="Strong_20_Emphasis">chamar funções específicas</text:span> do seu sistema de forma modular:</text:p>
      <text:p text:style-name="P4">Python</text:p>
      <text:p text:style-name="P5"><text:span text:style-name="Source_20_Text"># Exemplo: skills que a IA poderia invocar dinamicamente</text:span></text:p>
      <text:p text:style-name="P5"/>
      <text:p text:style-name="P5"><text:span text:style-name="Source_20_Text">skills_registry = {</text:span></text:p>
      <text:p text:style-name="P5"><text:span text:style-name="Source_20_Text"><text:s text:c="4"/>"analyze_orderbook": {</text:span></text:p>
      <text:p text:style-name="P5"><text:span text:style-name="Source_20_Text"><text:s text:c="8"/>"function": orderbook_analyzer.analyze,</text:span></text:p>
      <text:p text:style-name="P5"><text:span text:style-name="Source_20_Text"><text:s text:c="8"/>"description": "Analisa orderbook em tempo real (bid/ask walls, spread)",</text:span></text:p>
      <text:p text:style-name="P5"><text:span text:style-name="Source_20_Text"><text:s text:c="8"/>"parameters": {"symbol": "str", "depth": "int"}</text:span></text:p>
      <text:p text:style-name="P5"><text:span text:style-name="Source_20_Text"><text:s text:c="4"/>},</text:span></text:p>
      <text:p text:style-name="P5"><text:span text:style-name="Source_20_Text"><text:s text:c="4"/>"check_support_resistance": {</text:span></text:p>
      <text:p text:style-name="P5"><text:span text:style-name="Source_20_Text"><text:s text:c="8"/>"function": support_resistance.system.get_levels,</text:span></text:p>
      <text:p text:style-name="P5"><text:span text:style-name="Source_20_Text"><text:s text:c="8"/>"description": "Retorna níveis de suporte e resistência ativos",</text:span></text:p>
      <text:p text:style-name="P5"><text:span text:style-name="Source_20_Text"><text:s text:c="8"/>"parameters": {"symbol": "str", "timeframe": "str"}</text:span></text:p>
      <text:p text:style-name="P5"><text:span text:style-name="Source_20_Text"><text:s text:c="4"/>},</text:span></text:p>
      <text:p text:style-name="P5"><text:span text:style-name="Source_20_Text"><text:s text:c="4"/>"get_whale_activity": {</text:span></text:p>
      <text:p text:style-name="P5"><text:span text:style-name="Source_20_Text"><text:s text:c="8"/>"function": flow_analyzer.whale_score.calculate,</text:span></text:p>
      <text:p text:style-name="P5"><text:span text:style-name="Source_20_Text"><text:s text:c="8"/>"description": "Calcula score de atividade de whales",</text:span></text:p>
      <text:p text:style-name="P5"><text:span text:style-name="Source_20_Text"><text:s text:c="8"/>"parameters": {"window_minutes": "int"}</text:span></text:p>
      <text:p text:style-name="P5"><text:span text:style-name="Source_20_Text"><text:s text:c="4"/>},</text:span></text:p>
      <text:p text:style-name="P5"><text:span text:style-name="Source_20_Text"><text:s text:c="4"/>"get_regime": {</text:span></text:p>
      <text:p text:style-name="P5"><text:span text:style-name="Source_20_Text"><text:s text:c="8"/>"function": regime_detector.detect,</text:span></text:p>
      <text:p text:style-name="P5"><text:span text:style-name="Source_20_Text"><text:s text:c="8"/>"description": "Detecta regime de mercado atual (trending/ranging/volatile)",</text:span></text:p>
      <text:p text:style-name="P5"><text:span text:style-name="Source_20_Text"><text:s text:c="8"/>"parameters": {"symbol": "str"}</text:span></text:p>
      <text:p text:style-name="P5"><text:span text:style-name="Source_20_Text"><text:s text:c="4"/>},</text:span></text:p>
      <text:p text:style-name="P5"><text:span text:style-name="Source_20_Text"><text:s text:c="4"/>"check_macro_context": {</text:span></text:p>
      <text:p text:style-name="P5"><text:span text:style-name="Source_20_Text"><text:s text:c="8"/>"function": context_collector.get_macro,</text:span></text:p>
      <text:p text:style-name="P5"><text:span text:style-name="Source_20_Text"><text:s text:c="8"/>"description": "Retorna VIX, Fear&amp;Greed, DXY, funding rates",</text:span></text:p>
      <text:p text:style-name="P5"><text:span text:style-name="Source_20_Text"><text:s text:c="8"/>"parameters": {}</text:span></text:p>
      <text:p text:style-name="P5"><text:span text:style-name="Source_20_Text"><text:s text:c="4"/>},</text:span></text:p>
      <text:p text:style-name="P5"><text:span text:style-name="Source_20_Text"><text:s text:c="4"/>"get_cross_correlations": {</text:span></text:p>
      <text:p text:style-name="P5"><text:span text:style-name="Source_20_Text"><text:s text:c="8"/>"function": cross_asset_correlations.calculate,</text:span></text:p>
      <text:p text:style-name="P5"><text:span text:style-name="Source_20_Text"><text:s text:c="8"/>"description": "Correlações BTC/ETH/DXY/NDX",</text:span></text:p>
      <text:p text:style-name="P5"><text:span text:style-name="Source_20_Text"><text:s text:c="8"/>"parameters": {"window": "int"}</text:span></text:p>
      <text:p text:style-name="P5"><text:span text:style-name="Source_20_Text"><text:s text:c="4"/>}</text:span></text:p>
      <text:p text:style-name="P4"><text:span text:style-name="Source_20_Text">}</text:span></text:p>
      <text:h text:style-name="P6" text:outline-level="3">Como integraria no seu fluxo atual:</text:h>
      <text:p text:style-name="P4">text</text:p>
      <text:p text:style-name="P5"><text:span text:style-name="Source_20_Text">┌──────────────────────────────────────────────────────┐</text:span></text:p>
      <text:p text:style-name="P5"><text:span text:style-name="Source_20_Text">│ <text:s text:c="13"/>FLUXO ATUAL (sem skills) <text:s text:c="15"/>│</text:span></text:p>
      <text:p text:style-name="P5"><text:soft-page-break/><text:span text:style-name="Source_20_Text">│ <text:s text:c="53"/>│</text:span></text:p>
      <text:p text:style-name="P5"><text:span text:style-name="Source_20_Text">│ <text:s/>Orchestrator → coleta TUDO → monta payload → <text:s/>IA <text:s text:c="2"/>│</text:span></text:p>
      <text:p text:style-name="P5"><text:span text:style-name="Source_20_Text">│ <text:s/>(payload fixo, muitos dados desnecessários) <text:s text:c="8"/>│</text:span></text:p>
      <text:p text:style-name="P5"><text:span text:style-name="Source_20_Text">└──────────────────────────────────────────────────────┘</text:span></text:p>
      <text:p text:style-name="P5"/>
      <text:p text:style-name="P5"><text:span text:style-name="Source_20_Text"><text:s text:c="24"/>▼▼▼</text:span></text:p>
      <text:p text:style-name="P5"/>
      <text:p text:style-name="P5"><text:span text:style-name="Source_20_Text">┌──────────────────────────────────────────────────────┐</text:span></text:p>
      <text:p text:style-name="P5"><text:span text:style-name="Source_20_Text">│ <text:s text:c="13"/>FLUXO NOVO (com skills) <text:s text:c="16"/>│</text:span></text:p>
      <text:p text:style-name="P5"><text:span text:style-name="Source_20_Text">│ <text:s text:c="53"/>│</text:span></text:p>
      <text:p text:style-name="P5"><text:span text:style-name="Source_20_Text">│ <text:s/>Orchestrator → envia contexto mínimo → IA decide <text:s text:c="2"/>│</text:span></text:p>
      <text:p text:style-name="P5"><text:span text:style-name="Source_20_Text">│ <text:s/>quais skills precisa → chama sob demanda → responde │</text:span></text:p>
      <text:p text:style-name="P5"><text:span text:style-name="Source_20_Text">│ <text:s/>(payload leve, dados precisos) <text:s text:c="21"/>│</text:span></text:p>
      <text:p text:style-name="P4"><text:span text:style-name="Source_20_Text">└──────────────────────────────────────────────────────┘</text:span></text:p>
      <text:h text:style-name="P6" text:outline-level="3">Benefício direto para o seu projeto: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7">Problema Atual</text:p>
            </table:table-cell>
            <table:table-cell table:style-name="Tabela1.A1" office:value-type="string">
              <text:p text:style-name="P7">Solução com Skills</text:p>
            </table:table-cell>
          </table:table-row>
        </table:table-header-rows>
        <table:table-row>
          <table:table-cell table:style-name="Tabela1.A1" office:value-type="string">
            <text:p text:style-name="P8"><text:span text:style-name="Source_20_Text">ai_payload_builder.py</text:span> (50KB!)</text:p>
          </table:table-cell>
          <table:table-cell table:style-name="Tabela1.A1" office:value-type="string">
            <text:p text:style-name="P8">IA pede só o que precisa</text:p>
          </table:table-cell>
        </table:table-row>
        <table:table-row>
          <table:table-cell table:style-name="Tabela1.A1" office:value-type="string">
            <text:p text:style-name="P8"><text:span text:style-name="Source_20_Text">payload_compressor_v3.py</text:span> (39KB)</text:p>
          </table:table-cell>
          <table:table-cell table:style-name="Tabela1.A1" office:value-type="string">
            <text:p text:style-name="P8">Menos dados = menos compressão</text:p>
          </table:table-cell>
        </table:table-row>
        <table:table-row>
          <table:table-cell table:style-name="Tabela1.A1" office:value-type="string">
            <text:p text:style-name="P8"><text:span text:style-name="Source_20_Text">ai_throttler.py</text:span> limitando chamadas</text:p>
          </table:table-cell>
          <table:table-cell table:style-name="Tabela1.A1" office:value-type="string">
            <text:p text:style-name="P8">Chamadas menores e mais eficientes</text:p>
          </table:table-cell>
        </table:table-row>
        <table:table-row>
          <table:table-cell table:style-name="Tabela1.A1" office:value-type="string">
            <text:p text:style-name="P8">Payload fixo para qualquer cenário</text:p>
          </table:table-cell>
          <table:table-cell table:style-name="Tabela1.A1" office:value-type="string">
            <text:p text:style-name="Table_20_Contents">Payload adaptativo por contexto</text:p>
          </table:table-cell>
        </table:table-row>
      </table:table>
      <text:p text:style-name="Horizontal_20_Line"/>
      <text:h text:style-name="P3" text:outline-level="2">2. 🔧 Skills como Estratégias Modulares (MÉDIO-ALTO VALOR)</text:h>
      <text:p text:style-name="P2">Criar <text:span text:style-name="Strong_20_Emphasis">trading skills plugáveis</text:span> que o sistema ativa/desativa conforme o regime de mercado:</text:p>
      <text:p text:style-name="P4">Python</text:p>
      <text:p text:style-name="P5"><text:span text:style-name="Source_20_Text"># skills/trading_skills/</text:span></text:p>
      <text:p text:style-name="P5"/>
      <text:p text:style-name="P5"><text:span text:style-name="Source_20_Text">class SkillBase:</text:span></text:p>
      <text:p text:style-name="P5"><text:span text:style-name="Source_20_Text"><text:s text:c="4"/>"""Base para todas as trading skills"""</text:span></text:p>
      <text:p text:style-name="P5"><text:span text:style-name="Source_20_Text"><text:s text:c="4"/>name: str</text:span></text:p>
      <text:p text:style-name="P5"><text:span text:style-name="Source_20_Text"><text:s text:c="4"/>required_regime: list[str] <text:s/># ["trending", "volatile", "ranging"]</text:span></text:p>
      <text:p text:style-name="P5"><text:span text:style-name="Source_20_Text"><text:s text:c="4"/>priority: int</text:span></text:p>
      <text:p text:style-name="P5"><text:span text:style-name="Source_20_Text"><text:s text:c="4"/>enabled: bool</text:span></text:p>
      <text:p text:style-name="P5"/>
      <text:p text:style-name="P5"><text:span text:style-name="Source_20_Text"><text:s text:c="4"/>async def evaluate(self, context: MarketContext) -&gt; SkillResult:</text:span></text:p>
      <text:p text:style-name="P5"><text:span text:style-name="Source_20_Text"><text:s text:c="8"/>raise NotImplementedError</text:span></text:p>
      <text:p text:style-name="P5"/>
      <text:p text:style-name="P5"/>
      <text:p text:style-name="P5"><text:span text:style-name="Source_20_Text">class AbsorptionSkill(SkillBase):</text:span></text:p>
      <text:p text:style-name="P5"><text:span text:style-name="Source_20_Text"><text:s text:c="4"/>"""Detecta absorção e sugere entrada"""</text:span></text:p>
      <text:p text:style-name="P5"><text:span text:style-name="Source_20_Text"><text:s text:c="4"/>name = "absorption_detector"</text:span></text:p>
      <text:p text:style-name="P5"><text:span text:style-name="Source_20_Text"><text:s text:c="4"/>required_regime = ["ranging", "reversal"]</text:span></text:p>
      <text:p text:style-name="P5"/>
      <text:p text:style-name="P5"><text:span text:style-name="Source_20_Text"><text:s text:c="4"/>async def evaluate(self, context):</text:span></text:p>
      <text:p text:style-name="P5"><text:span text:style-name="Source_20_Text"><text:s text:c="8"/>absorption = await self.flow_analyzer.detect_absorption(context)</text:span></text:p>
      <text:p text:style-name="P5"><text:span text:style-name="Source_20_Text"><text:s text:c="8"/>if absorption.score &gt; 0.8:</text:span></text:p>
      <text:p text:style-name="P5"><text:span text:style-name="Source_20_Text"><text:s text:c="12"/>return SkillResult(signal="LONG", confidence=absorption.score)</text:span></text:p>
      <text:p text:style-name="P5"/>
      <text:p text:style-name="P5"/>
      <text:p text:style-name="P5"><text:span text:style-name="Source_20_Text">class BreakoutSkill(SkillBase):</text:span></text:p>
      <text:p text:style-name="P5"><text:span text:style-name="Source_20_Text"><text:s text:c="4"/>"""Detecta breakouts de S/R"""</text:span></text:p>
      <text:p text:style-name="P5"><text:span text:style-name="Source_20_Text"><text:s text:c="4"/>name = "breakout_detector"</text:span></text:p>
      <text:p text:style-name="P5"><text:soft-page-break/><text:span text:style-name="Source_20_Text"><text:s text:c="4"/>required_regime = ["trending", "volatile"]</text:span></text:p>
      <text:p text:style-name="P5"/>
      <text:p text:style-name="P5"><text:span text:style-name="Source_20_Text"><text:s text:c="4"/>async def evaluate(self, context):</text:span></text:p>
      <text:p text:style-name="P5"><text:span text:style-name="Source_20_Text"><text:s text:c="8"/>levels = self.sr_system.get_nearby_levels(context.price)</text:span></text:p>
      <text:p text:style-name="P5"><text:span text:style-name="Source_20_Text"><text:s text:c="8"/>volume = context.volume_profile</text:span></text:p>
      <text:p text:style-name="P5"><text:span text:style-name="Source_20_Text"><text:s text:c="8"/># ... lógica de breakout</text:span></text:p>
      <text:p text:style-name="P5"/>
      <text:p text:style-name="P5"/>
      <text:p text:style-name="P5"><text:span text:style-name="Source_20_Text">class WhaleFollowerSkill(SkillBase):</text:span></text:p>
      <text:p text:style-name="P5"><text:span text:style-name="Source_20_Text"><text:s text:c="4"/>"""Segue movimentação de whales"""</text:span></text:p>
      <text:p text:style-name="P5"><text:span text:style-name="Source_20_Text"><text:s text:c="4"/>name = "whale_follower"</text:span></text:p>
      <text:p text:style-name="P5"><text:span text:style-name="Source_20_Text"><text:s text:c="4"/>required_regime = ["all"]</text:span></text:p>
      <text:p text:style-name="P5"/>
      <text:p text:style-name="P5"><text:span text:style-name="Source_20_Text"><text:s text:c="4"/>async def evaluate(self, context):</text:span></text:p>
      <text:p text:style-name="P5"><text:span text:style-name="Source_20_Text"><text:s text:c="8"/>whale_score = await self.whale_detector.calculate(context)</text:span></text:p>
      <text:p text:style-name="P4"><text:span text:style-name="Source_20_Text"><text:s text:c="8"/># ... lógica de whale following</text:span></text:p>
      <text:h text:style-name="P6" text:outline-level="3">Integração com seu <text:span text:style-name="Source_20_Text">market_orchestrator</text:span>:</text:h>
      <text:p text:style-name="P4">Python</text:p>
      <text:p text:style-name="P5"><text:span text:style-name="Source_20_Text"># market_orchestrator/skill_manager.py</text:span></text:p>
      <text:p text:style-name="P5"/>
      <text:p text:style-name="P5"><text:span text:style-name="Source_20_Text">class SkillManager:</text:span></text:p>
      <text:p text:style-name="P5"><text:span text:style-name="Source_20_Text"><text:s text:c="4"/>def __init__(self):</text:span></text:p>
      <text:p text:style-name="P5"><text:span text:style-name="Source_20_Text"><text:s text:c="8"/>self.skills: list[SkillBase] = []</text:span></text:p>
      <text:p text:style-name="P5"><text:span text:style-name="Source_20_Text"><text:s text:c="8"/>self.active_skills: list[SkillBase] = []</text:span></text:p>
      <text:p text:style-name="P5"/>
      <text:p text:style-name="P5"><text:span text:style-name="Source_20_Text"><text:s text:c="4"/>def update_regime(self, regime: str):</text:span></text:p>
      <text:p text:style-name="P5"><text:span text:style-name="Source_20_Text"><text:s text:c="8"/>"""Ativa/desativa skills baseado no regime detectado"""</text:span></text:p>
      <text:p text:style-name="P5"><text:span text:style-name="Source_20_Text"><text:s text:c="8"/>self.active_skills = [</text:span></text:p>
      <text:p text:style-name="P5"><text:span text:style-name="Source_20_Text"><text:s text:c="12"/>s for s in self.skills</text:span></text:p>
      <text:p text:style-name="P5"><text:span text:style-name="Source_20_Text"><text:s text:c="12"/>if regime in s.required_regime or "all" in s.required_regime</text:span></text:p>
      <text:p text:style-name="P5"><text:span text:style-name="Source_20_Text"><text:s text:c="8"/>]</text:span></text:p>
      <text:p text:style-name="P5"/>
      <text:p text:style-name="P5"><text:span text:style-name="Source_20_Text"><text:s text:c="4"/>async def evaluate_all(self, context: MarketContext) -&gt; list[SkillResult]:</text:span></text:p>
      <text:p text:style-name="P5"><text:span text:style-name="Source_20_Text"><text:s text:c="8"/>"""Executa todas as skills ativas em paralelo"""</text:span></text:p>
      <text:p text:style-name="P5"><text:span text:style-name="Source_20_Text"><text:s text:c="8"/>tasks = [skill.evaluate(context) for skill in self.active_skills]</text:span></text:p>
      <text:p text:style-name="P5"><text:span text:style-name="Source_20_Text"><text:s text:c="8"/>results = await asyncio.gather(*tasks, return_exceptions=True)</text:span></text:p>
      <text:p text:style-name="P4"><text:span text:style-name="Source_20_Text"><text:s text:c="8"/>return [r for r in results if isinstance(r, SkillResult)]</text:span></text:p>
      <text:p text:style-name="P4">text</text:p>
      <text:p text:style-name="P5"><text:span text:style-name="Source_20_Text">┌─────────────────────────────────────────────────┐</text:span></text:p>
      <text:p text:style-name="P5"><text:span text:style-name="Source_20_Text">│ <text:s text:c="10"/>REGIME DETECTOR <text:s text:c="23"/>│</text:span></text:p>
      <text:p text:style-name="P5"><text:span text:style-name="Source_20_Text">│ <text:s text:c="8"/>(trending/ranging/volatile) <text:s text:c="13"/>│</text:span></text:p>
      <text:p text:style-name="P5"><text:span text:style-name="Source_20_Text">└──────────────────┬──────────────────────────────┘</text:span></text:p>
      <text:p text:style-name="P5"><text:span text:style-name="Source_20_Text"><text:s text:c="19"/>│</text:span></text:p>
      <text:p text:style-name="P5"><text:span text:style-name="Source_20_Text"><text:s text:c="19"/>▼</text:span></text:p>
      <text:p text:style-name="P5"><text:span text:style-name="Source_20_Text">┌─────────────────────────────────────────────────┐</text:span></text:p>
      <text:p text:style-name="P5"><text:span text:style-name="Source_20_Text">│ <text:s text:c="10"/>SKILL MANAGER <text:s text:c="25"/>│</text:span></text:p>
      <text:p text:style-name="P5"><text:span text:style-name="Source_20_Text">│ <text:s text:c="49"/>│</text:span></text:p>
      <text:p text:style-name="P5"><text:span text:style-name="Source_20_Text">│ <text:s/>Regime: RANGING <text:s text:c="32"/>│</text:span></text:p>
      <text:p text:style-name="P5"><text:span text:style-name="Source_20_Text">│ <text:s/>┌──────────┐ ┌──────────┐ ┌──────────────────┐│</text:span></text:p>
      <text:p text:style-name="P5"><text:span text:style-name="Source_20_Text">│ <text:s/>│Absorption│ │ <text:s/>Mean <text:s text:c="3"/>│ │ <text:s text:c="2"/>Whale <text:s text:c="9"/>││</text:span></text:p>
      <text:p text:style-name="P5"><text:span text:style-name="Source_20_Text">│ <text:s/>│ <text:s/>Skill ✅│ │Reversion │ │ <text:s/>Follower ✅ <text:s text:c="4"/>││</text:span></text:p>
      <text:p text:style-name="P5"><text:span text:style-name="Source_20_Text">│ <text:s/>│ <text:s text:c="9"/>│ │ Skill ✅ │ │ <text:s text:c="17"/>││</text:span></text:p>
      <text:p text:style-name="P5"><text:span text:style-name="Source_20_Text">│ <text:s/>└──────────┘ └──────────┘ └──────────────────┘│</text:span></text:p>
      <text:p text:style-name="P5"><text:span text:style-name="Source_20_Text">│ <text:s/>┌──────────┐ ┌──────────┐ <text:s text:c="21"/>│</text:span></text:p>
      <text:p text:style-name="P5"><text:span text:style-name="Source_20_Text">│ <text:s/>│Breakout <text:s/>│ │ Momentum │ <text:s text:c="2"/>← DESATIVADAS <text:s text:c="4"/>│</text:span></text:p>
      <text:p text:style-name="P5"><text:span text:style-name="Source_20_Text">│ <text:s/>│ Skill ❌ │ │ Skill ❌ │ <text:s text:c="21"/>│</text:span></text:p>
      <text:p text:style-name="P5"><text:span text:style-name="Source_20_Text">│ <text:s/>└──────────┘ └──────────┘ <text:s text:c="21"/>│</text:span></text:p>
      <text:p text:style-name="P5"><text:soft-page-break/><text:span text:style-name="Source_20_Text">└──────────────────┬──────────────────────────────┘</text:span></text:p>
      <text:p text:style-name="P5"><text:span text:style-name="Source_20_Text"><text:s text:c="19"/>│</text:span></text:p>
      <text:p text:style-name="P5"><text:span text:style-name="Source_20_Text"><text:s text:c="19"/>▼</text:span></text:p>
      <text:p text:style-name="P5"><text:span text:style-name="Source_20_Text">┌─────────────────────────────────────────────────┐</text:span></text:p>
      <text:p text:style-name="P5"><text:span text:style-name="Source_20_Text">│ <text:s text:c="4"/>SIGNAL PROCESSOR + RISK MANAGER <text:s text:c="12"/>│</text:span></text:p>
      <text:p text:style-name="P5"><text:span text:style-name="Source_20_Text">│ <text:s text:c="4"/>(combina resultados das skills ativas) <text:s text:c="6"/>│</text:span></text:p>
      <text:p text:style-name="P4"><text:span text:style-name="Source_20_Text">└─────────────────────────────────────────────────┘</text:span></text:p>
      <text:p text:style-name="Horizontal_20_Line"/>
      <text:h text:style-name="P3" text:outline-level="2">3. 🔄 Skills para o Auto-Fixer (VALOR COMPLEMENTAR)</text:h>
      <text:p text:style-name="P2">Seu <text:span text:style-name="Source_20_Text">auto_fixer/</text:span> já tem 8 fases. Cada fase poderia ser uma <text:span text:style-name="Strong_20_Emphasis">skill independente</text:span>:</text:p>
      <text:p text:style-name="P4">Python</text:p>
      <text:p text:style-name="P5"><text:span text:style-name="Source_20_Text"># auto_fixer como skills</text:span></text:p>
      <text:p text:style-name="P5"><text:span text:style-name="Source_20_Text">skills = {</text:span></text:p>
      <text:p text:style-name="P5"><text:span text:style-name="Source_20_Text"><text:s text:c="4"/>"scan_errors": <text:s text:c="3"/>Phase1Scanner, <text:s text:c="3"/># Skill: encontrar erros</text:span></text:p>
      <text:p text:style-name="P5"><text:span text:style-name="Source_20_Text"><text:s text:c="4"/>"extract_context": Phase2Extractor, # Skill: extrair contexto</text:span></text:p>
      <text:p text:style-name="P5"><text:span text:style-name="Source_20_Text"><text:s text:c="4"/>"chunk_code": <text:s text:c="4"/>Phase3Chunker, <text:s text:c="3"/># Skill: dividir código</text:span></text:p>
      <text:p text:style-name="P5"><text:span text:style-name="Source_20_Text"><text:s text:c="4"/>"index_vectors": <text:s/>Phase4Index, <text:s text:c="5"/># Skill: indexar no vector DB</text:span></text:p>
      <text:p text:style-name="P5"><text:span text:style-name="Source_20_Text"><text:s text:c="4"/>"rag_search": <text:s text:c="4"/>Phase5RAG, <text:s text:c="7"/># Skill: busca RAG</text:span></text:p>
      <text:p text:style-name="P5"><text:span text:style-name="Source_20_Text"><text:s text:c="4"/>"analyze_fix": <text:s text:c="3"/>Phase6Analyzer, <text:s text:c="2"/># Skill: analisar correção</text:span></text:p>
      <text:p text:style-name="P5"><text:span text:style-name="Source_20_Text"><text:s text:c="4"/>"apply_patch": <text:s text:c="3"/>Phase7Patcher, <text:s text:c="3"/># Skill: aplicar patch</text:span></text:p>
      <text:p text:style-name="P5"><text:span text:style-name="Source_20_Text"><text:s text:c="4"/>"report": <text:s text:c="8"/>Phase8Reporter, <text:s text:c="2"/># Skill: gerar relatório</text:span></text:p>
      <text:p text:style-name="P4"><text:span text:style-name="Source_20_Text">}</text:span></text:p>
      <text:p text:style-name="Horizontal_20_Line"/>
      <text:h text:style-name="P3" text:outline-level="2">📊 Resumo: Vale a pena para seu projeto?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7">Aplicação</text:p>
            </table:table-cell>
            <table:table-cell table:style-name="Tabela2.A1" office:value-type="string">
              <text:p text:style-name="P7">Valor</text:p>
            </table:table-cell>
            <table:table-cell table:style-name="Tabela2.A1" office:value-type="string">
              <text:p text:style-name="P7">Esforço</text:p>
            </table:table-cell>
            <table:table-cell table:style-name="Tabela2.A1" office:value-type="string">
              <text:p text:style-name="P7">Prioridade</text:p>
            </table:table-cell>
          </table:table-row>
        </table:table-header-rows>
        <table:table-row>
          <table:table-cell table:style-name="Tabela2.A1" office:value-type="string">
            <text:p text:style-name="P8"><text:span text:style-name="Strong_20_Emphasis">Skills para IA (function calling)</text:span></text:p>
          </table:table-cell>
          <table:table-cell table:style-name="Tabela2.A1" office:value-type="string">
            <text:p text:style-name="P8">⭐⭐⭐⭐⭐</text:p>
          </table:table-cell>
          <table:table-cell table:style-name="Tabela2.A1" office:value-type="string">
            <text:p text:style-name="P8">Médio</text:p>
          </table:table-cell>
          <table:table-cell table:style-name="Tabela2.A1" office:value-type="string">
            <text:p text:style-name="P8">🔴 <text:span text:style-name="Strong_20_Emphasis">ALTA</text:span></text:p>
          </table:table-cell>
        </table:table-row>
        <table:table-row>
          <table:table-cell table:style-name="Tabela2.A1" office:value-type="string">
            <text:p text:style-name="P8"><text:span text:style-name="Strong_20_Emphasis">Trading Skills modulares</text:span></text:p>
          </table:table-cell>
          <table:table-cell table:style-name="Tabela2.A1" office:value-type="string">
            <text:p text:style-name="P8">⭐⭐⭐⭐</text:p>
          </table:table-cell>
          <table:table-cell table:style-name="Tabela2.A1" office:value-type="string">
            <text:p text:style-name="P8">Médio-Alto</text:p>
          </table:table-cell>
          <table:table-cell table:style-name="Tabela2.A1" office:value-type="string">
            <text:p text:style-name="P8">🟡 MÉDIA</text:p>
          </table:table-cell>
        </table:table-row>
        <table:table-row>
          <table:table-cell table:style-name="Tabela2.A1" office:value-type="string">
            <text:p text:style-name="P8"><text:span text:style-name="Strong_20_Emphasis">Auto-fixer Skills</text:span></text:p>
          </table:table-cell>
          <table:table-cell table:style-name="Tabela2.A1" office:value-type="string">
            <text:p text:style-name="P8">⭐⭐⭐</text:p>
          </table:table-cell>
          <table:table-cell table:style-name="Tabela2.A1" office:value-type="string">
            <text:p text:style-name="P8">Baixo</text:p>
          </table:table-cell>
          <table:table-cell table:style-name="Tabela2.A1" office:value-type="string">
            <text:p text:style-name="Table_20_Contents">🟢 Baixa</text:p>
          </table:table-cell>
        </table:table-row>
      </table:table>
      <text:p text:style-name="Horizontal_20_Line"/>
      <text:h text:style-name="P3" text:outline-level="2">🎯 Recomendação para seu projeto</text:h>
      <text:p text:style-name="P2">Comece pelo <text:span text:style-name="Strong_20_Emphasis">item 1</text:span> (Skills para IA). O impacto seria imediato:</text:p>
      <text:p text:style-name="P4">text</text:p>
      <text:p text:style-name="P5"><text:span text:style-name="Source_20_Text">ANTES: payload_builder monta 50KB de dados → compressor reduz → IA recebe</text:span></text:p>
      <text:p text:style-name="P4"><text:span text:style-name="Source_20_Text">DEPOIS: IA recebe contexto mínimo → pede skills específicas → resposta precisa</text:span></text:p>
      <text:p text:style-name="P2">Isso resolveria diretamente problemas que você já está tratando em:</text:p>
      <text:list text:style-name="L1">
        <text:list-item>
          <text:p text:style-name="P9"><text:span text:style-name="Source_20_Text">payload_compressor_v3.py</text:span> (39KB de código só para comprimir)</text:p>
        </text:list-item>
        <text:list-item>
          <text:p text:style-name="P9"><text:span text:style-name="Source_20_Text">ai_payload_builder.py</text:span> (50KB para montar)</text:p>
        </text:list-item>
        <text:list-item>
          <text:p text:style-name="P9"><text:span text:style-name="Source_20_Text">optimize_ai_payload.py</text:span></text:p>
        </text:list-item>
        <text:list-item>
          <text:p text:style-name="P10"><text:span text:style-name="Source_20_Text">ai_throttler.py</text:span></text:p>
        </text:list-item>
      </text:list>
      <text:p text:style-name="Standard"/>
      <text:p text:style-name="Standard"><text:soft-page-break/></text:p>
      <text:p text:style-name="Standard"/>
      <text:h text:style-name="P11" text:outline-level="1">O que dá para fazer com skills no seu projeto</text:h>
      <text:p text:style-name="P2">Vou te responder de forma prática: <text:span text:style-name="Strong_20_Emphasis">o melhor uso de skills no seu caso é criar 3 camadas</text:span>.</text:p>
      <text:p text:style-name="Horizontal_20_Line"/>
      <text:h text:style-name="P3" text:outline-level="2">Camada A — Skills de domínio</text:h>
      <text:p text:style-name="P2">Essas skills analisam <text:span text:style-name="Strong_20_Emphasis">um bloco específico</text:span> do mercado.</text:p>
      <text:p text:style-name="P2">Exemplos:</text:p>
      <text:h text:style-name="P6" text:outline-level="3">1. <text:span text:style-name="Source_20_Text">flow_absorption_skill</text:span></text:h>
      <text:p text:style-name="P2">Analisa:</text:p>
      <text:list text:style-name="L2">
        <text:list-item>
          <text:p text:style-name="P12"><text:span text:style-name="Source_20_Text">fluxo_continuo.order_flow</text:span></text:p>
        </text:list-item>
        <text:list-item>
          <text:p text:style-name="P12"><text:span text:style-name="Source_20_Text">absorption_analysis</text:span></text:p>
        </text:list-item>
        <text:list-item>
          <text:p text:style-name="P13"><text:span text:style-name="Source_20_Text">passive_aggressive</text:span></text:p>
        </text:list-item>
      </text:list>
      <text:p text:style-name="P2">Saída:</text:p>
      <text:list text:style-name="L3">
        <text:list-item>
          <text:p text:style-name="P14">bias do fluxo</text:p>
        </text:list-item>
        <text:list-item>
          <text:p text:style-name="P14">tipo de absorção</text:p>
        </text:list-item>
        <text:list-item>
          <text:p text:style-name="P14">agressão compradora/vendedora</text:p>
        </text:list-item>
        <text:list-item>
          <text:p text:style-name="P14">se há reversão ou continuação</text:p>
        </text:list-item>
        <text:list-item>
          <text:p text:style-name="P15">confiança</text:p>
        </text:list-item>
      </text:list>
      <text:p text:style-name="Horizontal_20_Line"/>
      <text:h text:style-name="P6" text:outline-level="3">2. <text:span text:style-name="Source_20_Text">orderbook_liquidity_skill</text:span></text:h>
      <text:p text:style-name="P2">Analisa:</text:p>
      <text:list text:style-name="L4">
        <text:list-item>
          <text:p text:style-name="P16"><text:span text:style-name="Source_20_Text">orderbook_data</text:span></text:p>
        </text:list-item>
        <text:list-item>
          <text:p text:style-name="P16"><text:span text:style-name="Source_20_Text">order_book_depth</text:span></text:p>
        </text:list-item>
        <text:list-item>
          <text:p text:style-name="P17"><text:span text:style-name="Source_20_Text">market_impact</text:span></text:p>
        </text:list-item>
      </text:list>
      <text:p text:style-name="P2">Saída:</text:p>
      <text:list text:style-name="L5">
        <text:list-item>
          <text:p text:style-name="P18">pressão de bid/ask</text:p>
        </text:list-item>
        <text:list-item>
          <text:p text:style-name="P18">profundidade real</text:p>
        </text:list-item>
        <text:list-item>
          <text:p text:style-name="P18">slippage esperado</text:p>
        </text:list-item>
        <text:list-item>
          <text:p text:style-name="P18">se há parede defensiva</text:p>
        </text:list-item>
        <text:list-item>
          <text:p text:style-name="P19">qualidade de execução</text:p>
        </text:list-item>
      </text:list>
      <text:p text:style-name="Horizontal_20_Line"/>
      <text:h text:style-name="P6" text:outline-level="3">3. <text:span text:style-name="Source_20_Text">support_resistance_skill</text:span></text:h>
      <text:p text:style-name="P2">Analisa:</text:p>
      <text:list text:style-name="L6">
        <text:list-item>
          <text:p text:style-name="P20"><text:soft-page-break/><text:span text:style-name="Source_20_Text">historical_vp</text:span></text:p>
        </text:list-item>
        <text:list-item>
          <text:p text:style-name="P20"><text:span text:style-name="Source_20_Text">pivot_points</text:span></text:p>
        </text:list-item>
        <text:list-item>
          <text:p text:style-name="P20"><text:span text:style-name="Source_20_Text">immediate_support</text:span></text:p>
        </text:list-item>
        <text:list-item>
          <text:p text:style-name="P20"><text:span text:style-name="Source_20_Text">immediate_resistance</text:span></text:p>
        </text:list-item>
        <text:list-item>
          <text:p text:style-name="P21"><text:span text:style-name="Source_20_Text">sr_analysis.defense_zones</text:span></text:p>
        </text:list-item>
      </text:list>
      <text:p text:style-name="P2">Saída:</text:p>
      <text:list text:style-name="L7">
        <text:list-item>
          <text:p text:style-name="P22">suportes/resistências relevantes</text:p>
        </text:list-item>
        <text:list-item>
          <text:p text:style-name="P22">distância do preço atual</text:p>
        </text:list-item>
        <text:list-item>
          <text:p text:style-name="P22">força relativa</text:p>
        </text:list-item>
        <text:list-item>
          <text:p text:style-name="P22">probabilidade de rejeição ou rompimento</text:p>
        </text:list-item>
        <text:list-item>
          <text:p text:style-name="P23">mapa de defesa comprador/vendedor</text:p>
        </text:list-item>
      </text:list>
      <text:p text:style-name="Horizontal_20_Line"/>
      <text:h text:style-name="P6" text:outline-level="3">4. <text:span text:style-name="Source_20_Text">regime_skill</text:span></text:h>
      <text:p text:style-name="P2">Analisa:</text:p>
      <text:list text:style-name="L8">
        <text:list-item>
          <text:p text:style-name="P24"><text:span text:style-name="Source_20_Text">regime_analysis</text:span></text:p>
        </text:list-item>
        <text:list-item>
          <text:p text:style-name="P24"><text:span text:style-name="Source_20_Text">market_environment</text:span></text:p>
        </text:list-item>
        <text:list-item>
          <text:p text:style-name="P24"><text:span text:style-name="Source_20_Text">multi_tf</text:span></text:p>
        </text:list-item>
        <text:list-item>
          <text:p text:style-name="P25"><text:span text:style-name="Source_20_Text">volatility_metrics</text:span></text:p>
        </text:list-item>
      </text:list>
      <text:p text:style-name="P2">Saída:</text:p>
      <text:list text:style-name="L9">
        <text:list-item>
          <text:p text:style-name="P26">regime atual</text:p>
        </text:list-item>
        <text:list-item>
          <text:p text:style-name="P26">duração esperada</text:p>
        </text:list-item>
        <text:list-item>
          <text:p text:style-name="P26">estratégias permitidas</text:p>
        </text:list-item>
        <text:list-item>
          <text:p text:style-name="P26">estratégias proibidas</text:p>
        </text:list-item>
        <text:list-item>
          <text:p text:style-name="P27">peso do viés direcional</text:p>
        </text:list-item>
      </text:list>
      <text:p text:style-name="Horizontal_20_Line"/>
      <text:h text:style-name="P6" text:outline-level="3">5. <text:span text:style-name="Source_20_Text">derivatives_crowding_skill</text:span></text:h>
      <text:p text:style-name="P2">Analisa:</text:p>
      <text:list text:style-name="L10">
        <text:list-item>
          <text:p text:style-name="P28"><text:span text:style-name="Source_20_Text">derivatives</text:span></text:p>
        </text:list-item>
      </text:list>
      <text:p text:style-name="P2">Saída:</text:p>
      <text:list text:style-name="L11">
        <text:list-item>
          <text:p text:style-name="P29">crowding de longs/shorts</text:p>
        </text:list-item>
        <text:list-item>
          <text:p text:style-name="P29">risco de squeeze</text:p>
        </text:list-item>
        <text:list-item>
          <text:p text:style-name="P29">leitura de funding</text:p>
        </text:list-item>
        <text:list-item>
          <text:p text:style-name="P30">alinhamento ou divergência com spot</text:p>
        </text:list-item>
      </text:list>
      <text:p text:style-name="Horizontal_20_Line"/>
      <text:h text:style-name="P6" text:outline-level="3">6. <text:span text:style-name="Source_20_Text">macro_cross_asset_skill</text:span></text:h>
      <text:p text:style-name="P2">Analisa:</text:p>
      <text:list text:style-name="L12">
        <text:list-item>
          <text:p text:style-name="P31"><text:span text:style-name="Source_20_Text">ml_features.cross_asset</text:span></text:p>
        </text:list-item>
        <text:list-item>
          <text:p text:style-name="P31"><text:soft-page-break/><text:span text:style-name="Source_20_Text">market_environment</text:span></text:p>
        </text:list-item>
        <text:list-item>
          <text:p text:style-name="P32">fetchers macro/contexto</text:p>
        </text:list-item>
      </text:list>
      <text:p text:style-name="P2">Saída:</text:p>
      <text:list text:style-name="L13">
        <text:list-item>
          <text:p text:style-name="P33">contexto macro</text:p>
        </text:list-item>
        <text:list-item>
          <text:p text:style-name="P33">alinhamento BTC x DXY x NDX x VIX</text:p>
        </text:list-item>
        <text:list-item>
          <text:p text:style-name="P33">risco-on / risk-off</text:p>
        </text:list-item>
        <text:list-item>
          <text:p text:style-name="P34">regime de correlação</text:p>
        </text:list-item>
      </text:list>
      <text:p text:style-name="Horizontal_20_Line"/>
      <text:h text:style-name="P6" text:outline-level="3">7. <text:span text:style-name="Source_20_Text">pattern_smart_money_skill</text:span></text:h>
      <text:p text:style-name="P2">Analisa:</text:p>
      <text:list text:style-name="L14">
        <text:list-item>
          <text:p text:style-name="P35"><text:span text:style-name="Source_20_Text">pattern_recognition</text:span></text:p>
        </text:list-item>
        <text:list-item>
          <text:p text:style-name="P35"><text:span text:style-name="Source_20_Text">candlestick_patterns</text:span></text:p>
        </text:list-item>
        <text:list-item>
          <text:p text:style-name="P35">fair value gaps</text:p>
        </text:list-item>
        <text:list-item>
          <text:p text:style-name="P36">market structure</text:p>
        </text:list-item>
      </text:list>
      <text:p text:style-name="P2">Saída:</text:p>
      <text:list text:style-name="L15">
        <text:list-item>
          <text:p text:style-name="P37">estrutura</text:p>
        </text:list-item>
        <text:list-item>
          <text:p text:style-name="P37">BOS/CHOCH se houver</text:p>
        </text:list-item>
        <text:list-item>
          <text:p text:style-name="P37">gaps relevantes</text:p>
        </text:list-item>
        <text:list-item>
          <text:p text:style-name="P38">leitura smart money</text:p>
        </text:list-item>
      </text:list>
      <text:p text:style-name="Horizontal_20_Line"/>
      <text:h text:style-name="P6" text:outline-level="3">8. <text:span text:style-name="Source_20_Text">institutional_profile_skill</text:span></text:h>
      <text:p text:style-name="P2">Analisa:</text:p>
      <text:list text:style-name="L16">
        <text:list-item>
          <text:p text:style-name="P39"><text:span text:style-name="Source_20_Text">institutional_analytics.profile_analysis</text:span></text:p>
        </text:list-item>
        <text:list-item>
          <text:p text:style-name="P39"><text:span text:style-name="Source_20_Text">volume_node_strength</text:span></text:p>
        </text:list-item>
        <text:list-item>
          <text:p text:style-name="P39"><text:span text:style-name="Source_20_Text">poor_extremes</text:span></text:p>
        </text:list-item>
        <text:list-item>
          <text:p text:style-name="P39"><text:span text:style-name="Source_20_Text">profile_shape</text:span></text:p>
        </text:list-item>
        <text:list-item>
          <text:p text:style-name="P40"><text:span text:style-name="Source_20_Text">no_mans_land</text:span></text:p>
        </text:list-item>
      </text:list>
      <text:p text:style-name="P2">Saída:</text:p>
      <text:list text:style-name="L17">
        <text:list-item>
          <text:p text:style-name="P41">auction state</text:p>
        </text:list-item>
        <text:list-item>
          <text:p text:style-name="P41">se low/high está “unfinished”</text:p>
        </text:list-item>
        <text:list-item>
          <text:p text:style-name="P41">shape do profile</text:p>
        </text:list-item>
        <text:list-item>
          <text:p text:style-name="P41">zonas de aceitação/rejeição</text:p>
        </text:list-item>
        <text:list-item>
          <text:p text:style-name="P42">alvo provável de revisita</text:p>
        </text:list-item>
      </text:list>
      <text:p text:style-name="Horizontal_20_Line"/>
      <text:h text:style-name="P6" text:outline-level="3">9. <text:span text:style-name="Source_20_Text">data_quality_guard_skill</text:span></text:h>
      <text:p text:style-name="P2">Analisa:</text:p>
      <text:list text:style-name="L18">
        <text:list-item>
          <text:p text:style-name="P43"><text:span text:style-name="Source_20_Text">quality</text:span></text:p>
        </text:list-item>
        <text:list-item>
          <text:p text:style-name="P43"><text:soft-page-break/><text:span text:style-name="Source_20_Text">data_reliability</text:span></text:p>
        </text:list-item>
        <text:list-item>
          <text:p text:style-name="P43"><text:span text:style-name="Source_20_Text">orderbook_quality</text:span></text:p>
        </text:list-item>
        <text:list-item>
          <text:p text:style-name="P44">latência / anomalias / completude</text:p>
        </text:list-item>
      </text:list>
      <text:p text:style-name="P2">Saída:</text:p>
      <text:list text:style-name="L19">
        <text:list-item>
          <text:p text:style-name="P45">se o dado é confiável</text:p>
        </text:list-item>
        <text:list-item>
          <text:p text:style-name="P45">se a IA pode analisar</text:p>
        </text:list-item>
        <text:list-item>
          <text:p text:style-name="P45">cap de confiança</text:p>
        </text:list-item>
        <text:list-item>
          <text:p text:style-name="P46">motivos para downgrade</text:p>
        </text:list-item>
      </text:list>
      <text:p text:style-name="P2">Essa skill é importantíssima.</text:p>
      <text:p text:style-name="Horizontal_20_Line"/>
      <text:h text:style-name="P3" text:outline-level="2">Camada B — Skills de síntese</text:h>
      <text:p text:style-name="P2">Essas não olham só um bloco; elas combinam outputs de outras skills.</text:p>
      <text:h text:style-name="P6" text:outline-level="3">10. <text:span text:style-name="Source_20_Text">market_bias_synthesis_skill</text:span></text:h>
      <text:p text:style-name="P2">Combina:</text:p>
      <text:list text:style-name="L20">
        <text:list-item>
          <text:p text:style-name="P47">flow</text:p>
        </text:list-item>
        <text:list-item>
          <text:p text:style-name="P47">orderbook</text:p>
        </text:list-item>
        <text:list-item>
          <text:p text:style-name="P47">regime</text:p>
        </text:list-item>
        <text:list-item>
          <text:p text:style-name="P47">S/R</text:p>
        </text:list-item>
        <text:list-item>
          <text:p text:style-name="P47">derivativos</text:p>
        </text:list-item>
        <text:list-item>
          <text:p text:style-name="P48">padrões</text:p>
        </text:list-item>
      </text:list>
      <text:p text:style-name="P2">Saída:</text:p>
      <text:list text:style-name="L21">
        <text:list-item>
          <text:p text:style-name="P49">bias final: LONG / SHORT / NEUTRO</text:p>
        </text:list-item>
        <text:list-item>
          <text:p text:style-name="P49">cenário dominante</text:p>
        </text:list-item>
        <text:list-item>
          <text:p text:style-name="P49">cenário alternativo</text:p>
        </text:list-item>
        <text:list-item>
          <text:p text:style-name="P49">confiança</text:p>
        </text:list-item>
        <text:list-item>
          <text:p text:style-name="P50">invalidação</text:p>
        </text:list-item>
      </text:list>
      <text:p text:style-name="Horizontal_20_Line"/>
      <text:h text:style-name="P6" text:outline-level="3">11. <text:span text:style-name="Source_20_Text">conflict_resolver_skill</text:span></text:h>
      <text:p text:style-name="P2">Combina sinais contraditórios.</text:p>
      <text:p text:style-name="P2">Exemplo no seu evento:</text:p>
      <text:list text:style-name="L22">
        <text:list-item>
          <text:p text:style-name="P51">fluxo agressor vendedor</text:p>
        </text:list-item>
        <text:list-item>
          <text:p text:style-name="P51">passive buyers defendendo</text:p>
        </text:list-item>
        <text:list-item>
          <text:p text:style-name="P51">regime mean reverting</text:p>
        </text:list-item>
        <text:list-item>
          <text:p text:style-name="P51">bearish candles</text:p>
        </text:list-item>
        <text:list-item>
          <text:p text:style-name="P51">whale accumulation leve</text:p>
        </text:list-item>
        <text:list-item>
          <text:p text:style-name="P52">suporte e resistência muito próximos</text:p>
        </text:list-item>
      </text:list>
      <text:p text:style-name="P2"><text:soft-page-break/>Saída:</text:p>
      <text:list text:style-name="L23">
        <text:list-item>
          <text:p text:style-name="P53">“mercado em range com absorção de venda, sem confirmação de breakdown”</text:p>
        </text:list-item>
        <text:list-item>
          <text:p text:style-name="P53">ou</text:p>
        </text:list-item>
        <text:list-item>
          <text:p text:style-name="P54">“viés de fade em extremos, não de breakout”</text:p>
        </text:list-item>
      </text:list>
      <text:p text:style-name="Horizontal_20_Line"/>
      <text:h text:style-name="P6" text:outline-level="3">12. <text:span text:style-name="Source_20_Text">trade_hypothesis_skill</text:span></text:h>
      <text:p text:style-name="P2">Em vez de mandar todos os dados para a IA, essa skill monta hipóteses estruturadas:</text:p>
      <text:list text:style-name="L24">
        <text:list-item>
          <text:p text:style-name="P55">hipótese 1: reversão no suporte</text:p>
        </text:list-item>
        <text:list-item>
          <text:p text:style-name="P55">hipótese 2: rejeição na resistência</text:p>
        </text:list-item>
        <text:list-item>
          <text:p text:style-name="P56">hipótese 3: rompimento falho</text:p>
        </text:list-item>
      </text:list>
      <text:p text:style-name="P2">Cada hipótese com:</text:p>
      <text:list text:style-name="L25">
        <text:list-item>
          <text:p text:style-name="P57">gatilho</text:p>
        </text:list-item>
        <text:list-item>
          <text:p text:style-name="P57">invalidação</text:p>
        </text:list-item>
        <text:list-item>
          <text:p text:style-name="P57">alvo</text:p>
        </text:list-item>
        <text:list-item>
          <text:p text:style-name="P57">confiança</text:p>
        </text:list-item>
        <text:list-item>
          <text:p text:style-name="P58">evidências</text:p>
        </text:list-item>
      </text:list>
      <text:p text:style-name="Horizontal_20_Line"/>
      <text:h text:style-name="P3" text:outline-level="2">Camada C — Skills para IA / Tool Calling</text:h>
      <text:p text:style-name="P2">Aqui a IA passa a chamar só o que precisa.</text:p>
      <text:p text:style-name="P2">Exemplo:</text:p>
      <text:list text:style-name="L26">
        <text:list-item>
          <text:p text:style-name="P59">contexto mínimo entra</text:p>
        </text:list-item>
        <text:list-item>
          <text:p text:style-name="P59">IA percebe que precisa de:</text:p>
          <text:list>
            <text:list-item>
              <text:p text:style-name="P59"><text:span text:style-name="Source_20_Text">get_flow_absorption</text:span></text:p>
            </text:list-item>
            <text:list-item>
              <text:p text:style-name="P59"><text:span text:style-name="Source_20_Text">get_support_resistance_map</text:span></text:p>
            </text:list-item>
            <text:list-item>
              <text:p text:style-name="P59"><text:span text:style-name="Source_20_Text">get_derivatives_crowding</text:span></text:p>
            </text:list-item>
          </text:list>
        </text:list-item>
        <text:list-item>
          <text:p text:style-name="P59">recebe só essas respostas</text:p>
        </text:list-item>
        <text:list-item>
          <text:p text:style-name="P60">entrega a tese final</text:p>
        </text:list-item>
      </text:list>
      <text:p text:style-name="P2">Isso é o que mais reduz custo e ruído.</text:p>
      <text:p text:style-name="Horizontal_20_Line"/>
      <text:h text:style-name="P61" text:outline-level="1">3. O que eu faria no seu projeto, especificamente</text:h>
      <text:h text:style-name="P3" text:outline-level="2">Melhor abordagem: não criar “skills do zero”</text:h>
      <text:p text:style-name="P2">Você já tem módulos excelentes.<text:line-break/>O ideal é criar uma camada que <text:span text:style-name="Strong_20_Emphasis">embrulha o que já existe</text:span>.</text:p>
      <text:p text:style-name="P2"><text:soft-page-break/>Exemplo:</text:p>
      <text:list text:style-name="L27">
        <text:list-item>
          <text:p text:style-name="P62"><text:span text:style-name="Source_20_Text">orderbook_analyzer.py</text:span> vira fonte da skill de liquidez</text:p>
        </text:list-item>
        <text:list-item>
          <text:p text:style-name="P62"><text:span text:style-name="Source_20_Text">support_resistance/</text:span> vira fonte da skill de S/R</text:p>
        </text:list-item>
        <text:list-item>
          <text:p text:style-name="P62"><text:span text:style-name="Source_20_Text">flow_analyzer/</text:span> vira fonte da skill de fluxo</text:p>
        </text:list-item>
        <text:list-item>
          <text:p text:style-name="P62"><text:span text:style-name="Source_20_Text">src/analysis/regime_detector.py</text:span> vira fonte da skill de regime</text:p>
        </text:list-item>
        <text:list-item>
          <text:p text:style-name="P62"><text:span text:style-name="Source_20_Text">institutional/</text:span> vira fonte das skills institucionais</text:p>
        </text:list-item>
        <text:list-item>
          <text:p text:style-name="P63"><text:span text:style-name="Source_20_Text">fetchers/context_collector.py</text:span> vira fonte da skill macro</text:p>
        </text:list-item>
      </text:list>
      <text:p text:style-name="P2">Ou seja:</text:p>
      <text:p text:style-name="P64"><text:span text:style-name="Strong_20_Emphasis">skills = adapters + contratos + routing</text:span>, não reescrita dos motores.</text:p>
      <text:p text:style-name="Horizontal_20_Line"/>
      <text:h text:style-name="P61" text:outline-level="1">4. Skills mais valiosas para começar</text:h>
      <text:p text:style-name="P2">Se você quiser acertar rápido, eu começaria com estas 6:</text:p>
      <text:h text:style-name="P3" text:outline-level="2">MVP de alto impacto</text:h>
      <text:h text:style-name="P6" text:outline-level="3">1. <text:span text:style-name="Source_20_Text">data_quality_guard_skill</text:span></text:h>
      <text:p text:style-name="P2">Sem isso, a IA vai analisar dado degradado como se fosse perfeito.</text:p>
      <text:p text:style-name="P2">No seu JSON:</text:p>
      <text:list text:style-name="L28">
        <text:list-item>
          <text:p text:style-name="P65"><text:span text:style-name="Source_20_Text">latency_ms: 3622</text:span></text:p>
        </text:list-item>
        <text:list-item>
          <text:p text:style-name="P65"><text:span text:style-name="Source_20_Text">latency_category: DEGRADED</text:span></text:p>
        </text:list-item>
        <text:list-item>
          <text:p text:style-name="P66"><text:span text:style-name="Source_20_Text">expected_liquidity: REDUCED</text:span></text:p>
        </text:list-item>
      </text:list>
      <text:p text:style-name="P2">Isso deveria reduzir confiança da análise final.</text:p>
      <text:p text:style-name="Horizontal_20_Line"/>
      <text:h text:style-name="P6" text:outline-level="3">2. <text:span text:style-name="Source_20_Text">regime_router_skill</text:span></text:h>
      <text:p text:style-name="P2">No seu evento:</text:p>
      <text:list text:style-name="L29">
        <text:list-item>
          <text:p text:style-name="P67"><text:span text:style-name="Source_20_Text">current_regime: MEAN_REVERTING</text:span></text:p>
        </text:list-item>
        <text:list-item>
          <text:p text:style-name="P68"><text:span text:style-name="Source_20_Text">mean_reverting: 0.867</text:span></text:p>
        </text:list-item>
      </text:list>
      <text:p text:style-name="P2">Isso já deveria ligar/desligar tipos de análise.</text:p>
      <text:p text:style-name="P2">Exemplo:</text:p>
      <text:list text:style-name="L30">
        <text:list-item>
          <text:p text:style-name="P69">ativar mean reversion / absorption / range defense</text:p>
        </text:list-item>
        <text:list-item>
          <text:p text:style-name="P70">desativar breakout momentum como skill prioritária</text:p>
        </text:list-item>
      </text:list>
      <text:p text:style-name="Horizontal_20_Line"/>
      <text:h text:style-name="P6" text:outline-level="3">3. <text:span text:style-name="Source_20_Text">flow_absorption_skill</text:span></text:h>
      <text:p text:style-name="P2">No seu evento isso é central.</text:p>
      <text:p text:style-name="P2"><text:soft-page-break/>Você tem:</text:p>
      <text:list text:style-name="L31">
        <text:list-item>
          <text:p text:style-name="P71"><text:span text:style-name="Source_20_Text">aggressive sellers</text:span></text:p>
        </text:list-item>
        <text:list-item>
          <text:p text:style-name="P71"><text:span text:style-name="Source_20_Text">passive buyers</text:span></text:p>
        </text:list-item>
        <text:list-item>
          <text:p text:style-name="P72"><text:span text:style-name="Source_20_Text">signal: sell_absorption</text:span></text:p>
        </text:list-item>
      </text:list>
      <text:p text:style-name="P2">Isso é exatamente o tipo de leitura que merece skill própria.</text:p>
      <text:p text:style-name="Horizontal_20_Line"/>
      <text:h text:style-name="P6" text:outline-level="3">4. <text:span text:style-name="Source_20_Text">support_resistance_context_skill</text:span></text:h>
      <text:p text:style-name="P2">No evento o preço está muito perto de:</text:p>
      <text:list text:style-name="L32">
        <text:list-item>
          <text:p text:style-name="P73">suporte <text:span text:style-name="Source_20_Text">66842.08</text:span></text:p>
        </text:list-item>
        <text:list-item>
          <text:p text:style-name="P74">resistência <text:span text:style-name="Source_20_Text">66933.13</text:span></text:p>
        </text:list-item>
      </text:list>
      <text:p text:style-name="P2">Isso configura <text:span text:style-name="Strong_20_Emphasis">mercado comprimido</text:span>, ideal para skill de contexto operacional.</text:p>
      <text:p text:style-name="Horizontal_20_Line"/>
      <text:h text:style-name="P6" text:outline-level="3">5. <text:span text:style-name="Source_20_Text">derivatives_crowding_skill</text:span></text:h>
      <text:p text:style-name="P2">Você tem:</text:p>
      <text:list text:style-name="L33">
        <text:list-item>
          <text:p text:style-name="P75">funding negativo leve</text:p>
        </text:list-item>
        <text:list-item>
          <text:p text:style-name="P76"><text:span text:style-name="Source_20_Text">long_short_ratio: 1.83</text:span></text:p>
        </text:list-item>
      </text:list>
      <text:p text:style-name="P2">Isso sugere crowding de longs e risco de squeeze/trap.</text:p>
      <text:p text:style-name="Horizontal_20_Line"/>
      <text:h text:style-name="P6" text:outline-level="3">6. <text:span text:style-name="Source_20_Text">consensus_builder_skill</text:span></text:h>
      <text:p text:style-name="P2">Essa seria a skill final que pega tudo e responde:</text:p>
      <text:list text:style-name="L34">
        <text:list-item>
          <text:p text:style-name="P77">qual é o bias operacional?</text:p>
        </text:list-item>
        <text:list-item>
          <text:p text:style-name="P77">é cenário de continuação, reversão, range ou armadilha?</text:p>
        </text:list-item>
        <text:list-item>
          <text:p text:style-name="P78">qual é a confiança real?</text:p>
        </text:list-item>
      </text:list>
      <text:p text:style-name="Horizontal_20_Line"/>
      <text:h text:style-name="P61" text:outline-level="1">5. Como esse evento seria tratado por skills</text:h>
      <text:p text:style-name="P2">Se o seu motor de skills existisse hoje, esse evento provavelmente ativaria algo assim:</text:p>
      <text:h text:style-name="P3" text:outline-level="2">Skills ativadas</text:h>
      <text:list text:style-name="L35">
        <text:list-item>
          <text:p text:style-name="P79"><text:span text:style-name="Source_20_Text">data_quality_guard_skill</text:span></text:p>
        </text:list-item>
        <text:list-item>
          <text:p text:style-name="P79"><text:span text:style-name="Source_20_Text">regime_router_skill</text:span></text:p>
        </text:list-item>
        <text:list-item>
          <text:p text:style-name="P79"><text:span text:style-name="Source_20_Text">flow_absorption_skill</text:span></text:p>
        </text:list-item>
        <text:list-item>
          <text:p text:style-name="P79"><text:span text:style-name="Source_20_Text">orderbook_liquidity_skill</text:span></text:p>
        </text:list-item>
        <text:list-item>
          <text:p text:style-name="P79"><text:span text:style-name="Source_20_Text">support_resistance_context_skill</text:span></text:p>
        </text:list-item>
        <text:list-item>
          <text:p text:style-name="P79"><text:span text:style-name="Source_20_Text">derivatives_crowding_skill</text:span></text:p>
        </text:list-item>
        <text:list-item>
          <text:p text:style-name="P80"><text:soft-page-break/><text:span text:style-name="Source_20_Text">consensus_builder_skill</text:span></text:p>
        </text:list-item>
      </text:list>
      <text:p text:style-name="Horizontal_20_Line"/>
      <text:h text:style-name="P3" text:outline-level="2">Síntese provável desse evento</text:h>
      <text:p text:style-name="P2">Algo próximo de:</text:p>
      <text:list text:style-name="L36">
        <text:list-item>
          <text:p text:style-name="P81"><text:span text:style-name="Strong_20_Emphasis">Regime dominante:</text:span> mean reversion / range</text:p>
        </text:list-item>
        <text:list-item>
          <text:p text:style-name="P81"><text:span text:style-name="Strong_20_Emphasis">Microestrutura:</text:span> agressão vendedora sendo absorvida por bids passivos</text:p>
        </text:list-item>
        <text:list-item>
          <text:p text:style-name="P81"><text:span text:style-name="Strong_20_Emphasis">Níveis imediatos:</text:span> preço preso entre suporte 66842 e resistência 66933</text:p>
        </text:list-item>
        <text:list-item>
          <text:p text:style-name="P81"><text:span text:style-name="Strong_20_Emphasis">Derivativos:</text:span> crowding de longs presente, risco de squeeze/local trap</text:p>
        </text:list-item>
        <text:list-item>
          <text:p text:style-name="P81"><text:span text:style-name="Strong_20_Emphasis">Auction/profile:</text:span> poor low sugere possível revisita de mínima</text:p>
        </text:list-item>
        <text:list-item>
          <text:p text:style-name="P82"><text:span text:style-name="Strong_20_Emphasis">Qualidade:</text:span> análise válida, mas com confiança reduzida por latência degradada e liquidez reduzida</text:p>
        </text:list-item>
      </text:list>
      <text:p text:style-name="Standard"/>
      <text:p text:style-name="Standard"/>
      <text:p text:style-name="Standard"/>
      <text:p text:style-name="Standard"/>
      <text:h text:style-name="P61" text:outline-level="1">6. O que deveria sair do payload fixo e virar skill sob demanda</text:h>
      <text:p text:style-name="P2">Com base no seu JSON, eu separaria assim:</text:p>
      <text:h text:style-name="P3" text:outline-level="2">Deve ficar no payload mínimo</text:h>
      <text:p text:style-name="P2">Sempre presente:</text:p>
      <text:list text:style-name="L37">
        <text:list-item>
          <text:p text:style-name="P83"><text:span text:style-name="Source_20_Text">symbol</text:span></text:p>
        </text:list-item>
        <text:list-item>
          <text:p text:style-name="P83"><text:span text:style-name="Source_20_Text">timestamp</text:span></text:p>
        </text:list-item>
        <text:list-item>
          <text:p text:style-name="P83"><text:span text:style-name="Source_20_Text">event_id</text:span></text:p>
        </text:list-item>
        <text:list-item>
          <text:p text:style-name="P83"><text:span text:style-name="Source_20_Text">price</text:span></text:p>
        </text:list-item>
        <text:list-item>
          <text:p text:style-name="P83"><text:span text:style-name="Source_20_Text">delta</text:span></text:p>
        </text:list-item>
        <text:list-item>
          <text:p text:style-name="P83"><text:span text:style-name="Source_20_Text">volume_total</text:span></text:p>
        </text:list-item>
        <text:list-item>
          <text:p text:style-name="P83"><text:span text:style-name="Source_20_Text">orderbook_data</text:span> resumido</text:p>
        </text:list-item>
        <text:list-item>
          <text:p text:style-name="P83"><text:span text:style-name="Source_20_Text">regime_analysis</text:span> resumido</text:p>
        </text:list-item>
        <text:list-item>
          <text:p text:style-name="P83"><text:span text:style-name="Source_20_Text">nearest_support</text:span></text:p>
        </text:list-item>
        <text:list-item>
          <text:p text:style-name="P83"><text:span text:style-name="Source_20_Text">nearest_resistance</text:span></text:p>
        </text:list-item>
        <text:list-item>
          <text:p text:style-name="P83"><text:span text:style-name="Source_20_Text">quality</text:span> resumida</text:p>
        </text:list-item>
        <text:list-item>
          <text:p text:style-name="P84"><text:span text:style-name="Source_20_Text">alerts</text:span> resumidos</text:p>
        </text:list-item>
      </text:list>
      <text:p text:style-name="Horizontal_20_Line"/>
      <text:h text:style-name="P3" text:outline-level="2">Deve virar skill sob demanda</text:h>
      <text:p text:style-name="P2">Quando o contexto pedir:</text:p>
      <text:list text:style-name="L38">
        <text:list-item>
          <text:p text:style-name="P85"><text:span text:style-name="Source_20_Text">onchain_metrics</text:span></text:p>
        </text:list-item>
        <text:list-item>
          <text:p text:style-name="P85"><text:soft-page-break/>listas completas de <text:span text:style-name="Source_20_Text">fair_value_gaps</text:span></text:p>
        </text:list-item>
        <text:list-item>
          <text:p text:style-name="P85">listas grandes de <text:span text:style-name="Source_20_Text">hvns/lvns</text:span></text:p>
        </text:list-item>
        <text:list-item>
          <text:p text:style-name="P85"><text:span text:style-name="Source_20_Text">dominant_cycles</text:span></text:p>
        </text:list-item>
        <text:list-item>
          <text:p text:style-name="P85"><text:span text:style-name="Source_20_Text">monte_carlo</text:span></text:p>
        </text:list-item>
        <text:list-item>
          <text:p text:style-name="P85"><text:span text:style-name="Source_20_Text">no_mans_land.zones</text:span></text:p>
        </text:list-item>
        <text:list-item>
          <text:p text:style-name="P85"><text:span text:style-name="Source_20_Text">pivot_points</text:span> completos</text:p>
        </text:list-item>
        <text:list-item>
          <text:p text:style-name="P85"><text:span text:style-name="Source_20_Text">multi_tf</text:span> completo</text:p>
        </text:list-item>
        <text:list-item>
          <text:p text:style-name="P85"><text:span text:style-name="Source_20_Text">institutional_analytics</text:span> completo</text:p>
        </text:list-item>
        <text:list-item>
          <text:p text:style-name="P86"><text:span text:style-name="Source_20_Text">cross_asset</text:span> completo</text:p>
        </text:list-item>
      </text:list>
      <text:p text:style-name="Horizontal_20_Line"/>
      <text:h text:style-name="P3" text:outline-level="2">Pode sair do payload em quase todo trigger intraday</text:h>
      <text:p text:style-name="P2">Ou ficar só para logs/storage:</text:p>
      <text:list text:style-name="L39">
        <text:list-item>
          <text:p text:style-name="P87"><text:span text:style-name="Source_20_Text">backup_exchanges</text:span></text:p>
        </text:list-item>
        <text:list-item>
          <text:p text:style-name="P87"><text:span text:style-name="Source_20_Text">requires_paid_api</text:span></text:p>
        </text:list-item>
        <text:list-item>
          <text:p text:style-name="P87">timestamps em 3 fusos no payload da IA</text:p>
        </text:list-item>
        <text:list-item>
          <text:p text:style-name="P87">campos repetidos em raiz e subblocos</text:p>
        </text:list-item>
        <text:list-item>
          <text:p text:style-name="P88">arrays muito longos de zonas e nós</text:p>
        </text:list-item>
      </text:list>
      <text:p text:style-name="Horizontal_20_Line"/>
      <text:h text:style-name="P61" text:outline-level="1">7. Estrutura que eu sugiro criar</text:h>
      <text:p text:style-name="P2">Eu criaria um pacote novo:</text:p>
      <text:p text:style-name="P4">Python</text:p>
      <text:p text:style-name="P5"><text:span text:style-name="Source_20_Text">skills/</text:span></text:p>
      <text:p text:style-name="P5"><text:span text:style-name="Source_20_Text">├── __init__.py</text:span></text:p>
      <text:p text:style-name="P5"><text:span text:style-name="Source_20_Text">├── base.py</text:span></text:p>
      <text:p text:style-name="P5"><text:span text:style-name="Source_20_Text">├── schemas.py</text:span></text:p>
      <text:p text:style-name="P5"><text:span text:style-name="Source_20_Text">├── registry.py</text:span></text:p>
      <text:p text:style-name="P5"><text:span text:style-name="Source_20_Text">├── manager.py</text:span></text:p>
      <text:p text:style-name="P5"><text:span text:style-name="Source_20_Text">├── router.py</text:span></text:p>
      <text:p text:style-name="P5"><text:span text:style-name="Source_20_Text">├── policies.py</text:span></text:p>
      <text:p text:style-name="P5"><text:span text:style-name="Source_20_Text">├── cache.py</text:span></text:p>
      <text:p text:style-name="P5"><text:span text:style-name="Source_20_Text">├── adapters/</text:span></text:p>
      <text:p text:style-name="P5"><text:span text:style-name="Source_20_Text">│ <text:s text:c="2"/>├── orderbook_adapter.py</text:span></text:p>
      <text:p text:style-name="P5"><text:span text:style-name="Source_20_Text">│ <text:s text:c="2"/>├── flow_adapter.py</text:span></text:p>
      <text:p text:style-name="P5"><text:span text:style-name="Source_20_Text">│ <text:s text:c="2"/>├── sr_adapter.py</text:span></text:p>
      <text:p text:style-name="P5"><text:span text:style-name="Source_20_Text">│ <text:s text:c="2"/>├── regime_adapter.py</text:span></text:p>
      <text:p text:style-name="P5"><text:span text:style-name="Source_20_Text">│ <text:s text:c="2"/>├── derivatives_adapter.py</text:span></text:p>
      <text:p text:style-name="P5"><text:span text:style-name="Source_20_Text">│ <text:s text:c="2"/>└── institutional_adapter.py</text:span></text:p>
      <text:p text:style-name="P5"><text:span text:style-name="Source_20_Text">├── analysis/</text:span></text:p>
      <text:p text:style-name="P5"><text:span text:style-name="Source_20_Text">│ <text:s text:c="2"/>├── data_quality_guard_skill.py</text:span></text:p>
      <text:p text:style-name="P5"><text:span text:style-name="Source_20_Text">│ <text:s text:c="2"/>├── regime_router_skill.py</text:span></text:p>
      <text:p text:style-name="P5"><text:span text:style-name="Source_20_Text">│ <text:s text:c="2"/>├── flow_absorption_skill.py</text:span></text:p>
      <text:p text:style-name="P5"><text:span text:style-name="Source_20_Text">│ <text:s text:c="2"/>├── orderbook_liquidity_skill.py</text:span></text:p>
      <text:p text:style-name="P5"><text:span text:style-name="Source_20_Text">│ <text:s text:c="2"/>├── support_resistance_context_skill.py</text:span></text:p>
      <text:p text:style-name="P5"><text:span text:style-name="Source_20_Text">│ <text:s text:c="2"/>├── derivatives_crowding_skill.py</text:span></text:p>
      <text:p text:style-name="P5"><text:span text:style-name="Source_20_Text">│ <text:s text:c="2"/>├── macro_cross_asset_skill.py</text:span></text:p>
      <text:p text:style-name="P5"><text:span text:style-name="Source_20_Text">│ <text:s text:c="2"/>├── pattern_smart_money_skill.py</text:span></text:p>
      <text:p text:style-name="P5"><text:soft-page-break/><text:span text:style-name="Source_20_Text">│ <text:s text:c="2"/>└── institutional_profile_skill.py</text:span></text:p>
      <text:p text:style-name="P5"><text:span text:style-name="Source_20_Text">└── synthesis/</text:span></text:p>
      <text:p text:style-name="P5"><text:span text:style-name="Source_20_Text"><text:s text:c="4"/>├── consensus_builder_skill.py</text:span></text:p>
      <text:p text:style-name="P5"><text:span text:style-name="Source_20_Text"><text:s text:c="4"/>├── conflict_resolver_skill.py</text:span></text:p>
      <text:p text:style-name="P4"><text:span text:style-name="Source_20_Text"><text:s text:c="4"/>└── trade_hypothesis_skill.py</text:span></text:p>
      <text:p text:style-name="Horizontal_20_Line"/>
      <text:h text:style-name="P61" text:outline-level="1">8. Contrato ideal de uma skill</text:h>
      <text:p text:style-name="P2">Cada skill deveria ter:</text:p>
      <text:list text:style-name="L40">
        <text:list-item>
          <text:p text:style-name="P89"><text:span text:style-name="Source_20_Text">name</text:span></text:p>
        </text:list-item>
        <text:list-item>
          <text:p text:style-name="P89"><text:span text:style-name="Source_20_Text">version</text:span></text:p>
        </text:list-item>
        <text:list-item>
          <text:p text:style-name="P89"><text:span text:style-name="Source_20_Text">category</text:span></text:p>
        </text:list-item>
        <text:list-item>
          <text:p text:style-name="P89"><text:span text:style-name="Source_20_Text">cost_class</text:span> (<text:span text:style-name="Source_20_Text">low</text:span>, <text:span text:style-name="Source_20_Text">medium</text:span>, <text:span text:style-name="Source_20_Text">high</text:span>)</text:p>
        </text:list-item>
        <text:list-item>
          <text:p text:style-name="P89"><text:span text:style-name="Source_20_Text">timeout_ms</text:span></text:p>
        </text:list-item>
        <text:list-item>
          <text:p text:style-name="P89"><text:span text:style-name="Source_20_Text">cache_ttl_sec</text:span></text:p>
        </text:list-item>
        <text:list-item>
          <text:p text:style-name="P89"><text:span text:style-name="Source_20_Text">required_fields</text:span></text:p>
        </text:list-item>
        <text:list-item>
          <text:p text:style-name="P89"><text:span text:style-name="Source_20_Text">should_run(context)</text:span></text:p>
        </text:list-item>
        <text:list-item>
          <text:p text:style-name="P90"><text:span text:style-name="Source_20_Text">execute(context)</text:span></text:p>
        </text:list-item>
      </text:list>
      <text:p text:style-name="P2">E retornar algo assim:</text:p>
      <text:p text:style-name="P4">Python</text:p>
      <text:p text:style-name="P5"><text:span text:style-name="Source_20_Text">{</text:span></text:p>
      <text:p text:style-name="P5"><text:span text:style-name="Source_20_Text"><text:s text:c="4"/>"skill": "flow_absorption",</text:span></text:p>
      <text:p text:style-name="P5"><text:span text:style-name="Source_20_Text"><text:s text:c="4"/>"status": "success",</text:span></text:p>
      <text:p text:style-name="P5"><text:span text:style-name="Source_20_Text"><text:s text:c="4"/>"confidence": 0.74,</text:span></text:p>
      <text:p text:style-name="P5"><text:span text:style-name="Source_20_Text"><text:s text:c="4"/>"summary": "Agressão vendedora sendo absorvida por bids passivos",</text:span></text:p>
      <text:p text:style-name="P5"><text:span text:style-name="Source_20_Text"><text:s text:c="4"/>"bias": "bullish_reversal_candidate",</text:span></text:p>
      <text:p text:style-name="P5"><text:span text:style-name="Source_20_Text"><text:s text:c="4"/>"evidence": [</text:span></text:p>
      <text:p text:style-name="P5"><text:span text:style-name="Source_20_Text"><text:s text:c="8"/>"aggressive_sell_pct &gt; aggressive_buy_pct",</text:span></text:p>
      <text:p text:style-name="P5"><text:span text:style-name="Source_20_Text"><text:s text:c="8"/>"bid_depth &gt; ask_depth",</text:span></text:p>
      <text:p text:style-name="P5"><text:span text:style-name="Source_20_Text"><text:s text:c="8"/>"composite_signal = sell_absorption"</text:span></text:p>
      <text:p text:style-name="P5"><text:span text:style-name="Source_20_Text"><text:s text:c="4"/>],</text:span></text:p>
      <text:p text:style-name="P5"><text:span text:style-name="Source_20_Text"><text:s text:c="4"/>"latency_ms": 18,</text:span></text:p>
      <text:p text:style-name="P5"><text:span text:style-name="Source_20_Text"><text:s text:c="4"/>"data_quality_cap": 0.8</text:span></text:p>
      <text:p text:style-name="P4"><text:span text:style-name="Source_20_Text">}</text:span></text:p>
      <text:p text:style-name="Horizontal_20_Line"/>
      <text:h text:style-name="P61" text:outline-level="1">9. Regra importante: skills para IA devem ser read-only</text:h>
      <text:p text:style-name="P2">Se o objetivo agora é <text:span text:style-name="Strong_20_Emphasis">análise dos dados</text:span>, a IA deveria poder chamar apenas skills seguras, por exemplo:</text:p>
      <text:list text:style-name="L41">
        <text:list-item>
          <text:p text:style-name="P91">consultar fluxo</text:p>
        </text:list-item>
        <text:list-item>
          <text:p text:style-name="P91">consultar S/R</text:p>
        </text:list-item>
        <text:list-item>
          <text:p text:style-name="P91">consultar regime</text:p>
        </text:list-item>
        <text:list-item>
          <text:p text:style-name="P91">consultar derivativos</text:p>
        </text:list-item>
        <text:list-item>
          <text:p text:style-name="P91"><text:soft-page-break/>consultar macro</text:p>
        </text:list-item>
        <text:list-item>
          <text:p text:style-name="P92">consultar qualidade</text:p>
        </text:list-item>
      </text:list>
      <text:p text:style-name="P2"><text:span text:style-name="Strong_20_Emphasis">Não</text:span> exponha para a IA por enquanto:</text:p>
      <text:list text:style-name="L42">
        <text:list-item>
          <text:p text:style-name="P93">execução de ordem</text:p>
        </text:list-item>
        <text:list-item>
          <text:p text:style-name="P93">patch automático</text:p>
        </text:list-item>
        <text:list-item>
          <text:p text:style-name="P93">alteração de config</text:p>
        </text:list-item>
        <text:list-item>
          <text:p text:style-name="P93">escrita em banco</text:p>
        </text:list-item>
        <text:list-item>
          <text:p text:style-name="P94">mudança de risco</text:p>
        </text:list-item>
      </text:list>
      <text:p text:style-name="P2">Primeiro: <text:span text:style-name="Strong_20_Emphasis">skills analíticas somente</text:span>.</text:p>
      <text:p text:style-name="Horizontal_20_Line"/>
      <text:h text:style-name="P61" text:outline-level="1">10. Fluxo ideal no seu sistema</text:h>
      <text:h text:style-name="P3" text:outline-level="2">Hoje</text:h>
      <text:p text:style-name="P2"><text:span text:style-name="Source_20_Text">orchestrator -&gt; monta payload gigante -&gt; comprime -&gt; manda para IA</text:span></text:p>
      <text:h text:style-name="P3" text:outline-level="2">Melhor</text:h>
      <text:p text:style-name="P2"><text:span text:style-name="Source_20_Text">orchestrator -&gt; cria contexto mínimo -&gt; skill manager roda skills obrigatórias -&gt; IA chama skills opcionais -&gt; consensus builder -&gt; resposta final</text:span></text:p>
      <text:p text:style-name="Horizontal_20_Line"/>
      <text:h text:style-name="P3" text:outline-level="2">Exemplo de fluxo novo</text:h>
      <text:p text:style-name="P4">text</text:p>
      <text:p text:style-name="P5"><text:span text:style-name="Source_20_Text">ANALYSIS_TRIGGER</text:span></text:p>
      <text:p text:style-name="P5"><text:span text:style-name="Source_20_Text"><text:s text:c="3"/>↓</text:span></text:p>
      <text:p text:style-name="P5"><text:span text:style-name="Source_20_Text">Context Envelope</text:span></text:p>
      <text:p text:style-name="P5"><text:span text:style-name="Source_20_Text"><text:s text:c="3"/>↓</text:span></text:p>
      <text:p text:style-name="P5"><text:span text:style-name="Source_20_Text">Skill Router</text:span></text:p>
      <text:p text:style-name="P5"><text:span text:style-name="Source_20_Text"><text:s text:c="3"/>├── DataQualityGuard</text:span></text:p>
      <text:p text:style-name="P5"><text:span text:style-name="Source_20_Text"><text:s text:c="3"/>├── RegimeRouter</text:span></text:p>
      <text:p text:style-name="P5"><text:span text:style-name="Source_20_Text"><text:s text:c="3"/>├── FlowAbsorption</text:span></text:p>
      <text:p text:style-name="P5"><text:span text:style-name="Source_20_Text"><text:s text:c="3"/>├── SRContext</text:span></text:p>
      <text:p text:style-name="P5"><text:span text:style-name="Source_20_Text"><text:s text:c="3"/>└── OrderbookLiquidity</text:span></text:p>
      <text:p text:style-name="P5"><text:span text:style-name="Source_20_Text"><text:s text:c="3"/>↓</text:span></text:p>
      <text:p text:style-name="P5"><text:span text:style-name="Source_20_Text">Consensus Builder</text:span></text:p>
      <text:p text:style-name="P5"><text:span text:style-name="Source_20_Text"><text:s text:c="3"/>↓</text:span></text:p>
      <text:p text:style-name="P5"><text:span text:style-name="Source_20_Text">Payload compacto para IA</text:span></text:p>
      <text:p text:style-name="P5"><text:span text:style-name="Source_20_Text"><text:s text:c="3"/>↓</text:span></text:p>
      <text:p text:style-name="P5"><text:span text:style-name="Source_20_Text">IA pode pedir skill extra:</text:span></text:p>
      <text:p text:style-name="P5"><text:span text:style-name="Source_20_Text"><text:s text:c="3"/>├── DerivativesCrowding</text:span></text:p>
      <text:p text:style-name="P5"><text:span text:style-name="Source_20_Text"><text:s text:c="3"/>├── InstitutionalProfile</text:span></text:p>
      <text:p text:style-name="P5"><text:span text:style-name="Source_20_Text"><text:s text:c="3"/>└── MacroCrossAsset</text:span></text:p>
      <text:p text:style-name="P5"><text:span text:style-name="Source_20_Text"><text:s text:c="3"/>↓</text:span></text:p>
      <text:p text:style-name="P4"><text:span text:style-name="Source_20_Text">Resposta final</text:span></text:p>
      <text:p text:style-name="Horizontal_20_Line"><text:soft-page-break/></text:p>
      <text:h text:style-name="P61" text:outline-level="1">11. Melhor ganho prático no seu caso</text:h>
      <text:h text:style-name="P3" text:outline-level="2">1. Menos payload</text:h>
      <text:p text:style-name="P2">Seu JSON está bem pesado. Com skills, a IA não precisa receber tudo sempre.</text:p>
      <text:h text:style-name="P3" text:outline-level="2">2. Menos duplicação</text:h>
      <text:p text:style-name="P2">Você para de enviar o mesmo conceito em 2 ou 3 lugares.</text:p>
      <text:h text:style-name="P3" text:outline-level="2">3. Melhor explicabilidade</text:h>
      <text:p text:style-name="P2">Cada skill explica sua conclusão.</text:p>
      <text:h text:style-name="P3" text:outline-level="2">4. Melhor teste</text:h>
      <text:p text:style-name="P2">Você consegue testar:</text:p>
      <text:list text:style-name="L43">
        <text:list-item>
          <text:p text:style-name="P95"><text:span text:style-name="Source_20_Text">flow_absorption_skill</text:span></text:p>
        </text:list-item>
        <text:list-item>
          <text:p text:style-name="P95"><text:span text:style-name="Source_20_Text">sr_context_skill</text:span></text:p>
        </text:list-item>
        <text:list-item>
          <text:p text:style-name="P96"><text:span text:style-name="Source_20_Text">consensus_builder_skill</text:span></text:p>
        </text:list-item>
      </text:list>
      <text:p text:style-name="P2">isoladamente.</text:p>
      <text:h text:style-name="P3" text:outline-level="2">5. Melhor manutenção</text:h>
      <text:p text:style-name="P2">Em vez de crescer mais <text:span text:style-name="Source_20_Text">ai_payload_builder.py</text:span>, você distribui responsabilidade.</text:p>
      <text:p text:style-name="Horizontal_20_Line"/>
      <text:h text:style-name="P61" text:outline-level="1">12. Minha recomendação real para você</text:h>
      <text:h text:style-name="P3" text:outline-level="2">Prioridade 1</text:h>
      <text:p text:style-name="P2">Crie primeiro estas skills:</text:p>
      <text:list text:style-name="L44">
        <text:list-item>
          <text:p text:style-name="P97"><text:span text:style-name="Source_20_Text">data_quality_guard_skill</text:span></text:p>
        </text:list-item>
        <text:list-item>
          <text:p text:style-name="P97"><text:span text:style-name="Source_20_Text">regime_router_skill</text:span></text:p>
        </text:list-item>
        <text:list-item>
          <text:p text:style-name="P97"><text:span text:style-name="Source_20_Text">flow_absorption_skill</text:span></text:p>
        </text:list-item>
        <text:list-item>
          <text:p text:style-name="P97"><text:span text:style-name="Source_20_Text">support_resistance_context_skill</text:span></text:p>
        </text:list-item>
        <text:list-item>
          <text:p text:style-name="P97"><text:span text:style-name="Source_20_Text">orderbook_liquidity_skill</text:span></text:p>
        </text:list-item>
        <text:list-item>
          <text:p text:style-name="P98"><text:span text:style-name="Source_20_Text">consensus_builder_skill</text:span></text:p>
        </text:list-item>
      </text:list>
      <text:h text:style-name="P3" text:outline-level="2">Prioridade 2</text:h>
      <text:p text:style-name="P2">Depois:</text:p>
      <text:list text:style-name="L45">
        <text:list-item>
          <text:p text:style-name="P99"><text:soft-page-break/><text:span text:style-name="Source_20_Text">derivatives_crowding_skill</text:span></text:p>
        </text:list-item>
        <text:list-item>
          <text:p text:style-name="P99"><text:span text:style-name="Source_20_Text">macro_cross_asset_skill</text:span></text:p>
        </text:list-item>
        <text:list-item>
          <text:p text:style-name="P100"><text:span text:style-name="Source_20_Text">institutional_profile_skill</text:span></text:p>
        </text:list-item>
      </text:list>
      <text:h text:style-name="P3" text:outline-level="2">Prioridade 3</text:h>
      <text:p text:style-name="P2">Só depois:</text:p>
      <text:list text:style-name="L46">
        <text:list-item>
          <text:p text:style-name="P101">function calling completo da IA</text:p>
        </text:list-item>
        <text:list-item>
          <text:p text:style-name="P101">trading skills plugáveis por regime</text:p>
        </text:list-item>
        <text:list-item>
          <text:p text:style-name="P102">auto_fixer skills</text:p>
        </text:list-item>
      </text:list>
      <text:p text:style-name="Horizontal_20_Line"/>
      <text:h text:style-name="P61" text:outline-level="1">13. Em uma frase: o que dá para fazer?</text:h>
      <text:p text:style-name="P2">Dá para transformar seu sistema de:</text:p>
      <text:p text:style-name="P64"><text:span text:style-name="Strong_20_Emphasis">“um payload enorme com tudo misturado”</text:span></text:p>
      <text:p text:style-name="P2">em:</text:p>
      <text:p text:style-name="P64"><text:span text:style-name="Strong_20_Emphasis">“um motor de análise modular, acionado por contexto, com síntese objetiva e IA usando dados sob demanda”</text:span></text:p>
      <text:p text:style-name="P2">E isso combina <text:span text:style-name="Strong_20_Emphasis">muito</text:span> com a arquitetura que você já tem.</text:p>
      <text:p text:style-name="Text_20_body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1:31:50.704857000</meta:creation-date>
    <dc:date>2026-04-03T09:56:58.737080700</dc:date>
    <meta:editing-duration>PT20M43S</meta:editing-duration>
    <meta:editing-cycles>3</meta:editing-cycles>
    <meta:generator>LibreOffice/26.2.0.3$Windows_X86_64 LibreOffice_project/620$Build-3</meta:generator>
    <meta:document-statistic meta:table-count="2" meta:image-count="0" meta:object-count="0" meta:page-count="17" meta:paragraph-count="592" meta:word-count="2352" meta:character-count="17896" meta:non-whitespace-character-count="15040"/>
  </office:meta>
</office:document-meta>
</file>