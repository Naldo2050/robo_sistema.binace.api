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20pt" fo:font-weight="bold" fo:background-color="#ffff00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Quotations">
      <style:paragraph-properties fo:margin-left="1cm" fo:margin-right="1cm" fo:text-indent="0cm" style:auto-text-indent="false"/>
      <style:text-properties fo:font-weight="bold" style:font-size-asian="12pt" style:font-weight-asian="bold" style:font-weight-complex="bold"/>
    </style:style>
    <style:style style:name="P7" style:family="paragraph" style:parent-style-name="Heading_20_1">
      <style:paragraph-properties fo:margin-left="1cm" fo:margin-right="1cm" fo:text-indent="0cm" style:auto-text-indent="false"/>
      <style:text-properties fo:font-weight="bold" style:font-size-asian="12pt" style:font-weight-asian="bold" style:font-weight-complex="bold"/>
    </style:style>
    <style:style style:name="P8" style:family="paragraph" style:parent-style-name="Horizontal_20_Line">
      <style:text-properties fo:font-weight="bold" style:font-size-asian="12pt" style:font-weight-asian="bold" style:font-weight-complex="bold"/>
    </style:style>
    <style:style style:name="P9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0000" style:font-size-asian="12pt"/>
    </style:style>
    <style:style style:name="P10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0000" style:font-size-asian="12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0000" style:font-size-asian="12pt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fo:background-color="#ff0000" style:font-size-asian="12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fo:background-color="#ffffff" style:font-size-asian="12pt"/>
    </style:style>
    <style:style style:name="P14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ffff" style:font-size-asian="12pt"/>
    </style:style>
    <style:style style:name="P15" style:family="paragraph" style:parent-style-name="Heading_20_3">
      <style:paragraph-properties fo:margin-left="1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16" style:family="paragraph" style:parent-style-name="Text_20_body">
      <style:paragraph-properties fo:margin-left="1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17" style:family="paragraph" style:parent-style-name="Preformatted_20_Text">
      <style:paragraph-properties fo:margin-left="1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20" style:family="paragraph" style:parent-style-name="Heading_20_2">
      <style:paragraph-properties fo:margin-left="1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21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  <style:text-properties fo:background-color="#ffffff" style:font-size-asian="12pt"/>
    </style:style>
    <style:style style:name="P22" style:family="paragraph" style:parent-style-name="Quotations">
      <style:paragraph-properties fo:margin-left="1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paragraph-rsid="0013808f" fo:background-color="#ffffff" style:font-size-asian="12pt" style:font-weight-asian="bold" style:font-weight-complex="bold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paragraph-rsid="001432b8" fo:background-color="#ffffff" style:font-size-asian="12pt" style:font-weight-asian="bold" style:font-weight-complex="bold"/>
    </style:style>
    <style:style style:name="P25" style:family="paragraph" style:parent-style-name="Preformatted_20_Text">
      <style:paragraph-properties fo:margin-left="0cm" fo:margin-right="1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27" style:family="paragraph" style:parent-style-name="Preformatted_20_Text">
      <style:paragraph-properties fo:margin-left="0cm" fo:margin-right="1cm" fo:text-indent="0cm" style:auto-text-indent="false"/>
      <style:text-properties fo:font-weight="bold" officeooo:paragraph-rsid="001432b8" fo:background-color="#ffffff" style:font-size-asian="12pt" style:font-weight-asian="bold" style:font-weight-complex="bold"/>
    </style:style>
    <style:style style:name="P28" style:family="paragraph" style:parent-style-name="Preformatted_20_Text">
      <style:paragraph-properties fo:margin-left="0cm" fo:margin-right="1cm" fo:text-indent="0cm" style:auto-text-indent="false"/>
      <style:text-properties officeooo:paragraph-rsid="001432b8"/>
    </style:style>
    <style:style style:name="P29" style:family="paragraph" style:parent-style-name="Heading_20_2">
      <style:paragraph-properties fo:margin-left="0cm" fo:margin-right="1cm" fo:text-indent="0cm" style:auto-text-indent="false"/>
      <style:text-properties officeooo:paragraph-rsid="001432b8"/>
    </style:style>
    <style:style style:name="P30" style:family="paragraph" style:parent-style-name="Text_20_body">
      <style:paragraph-properties fo:margin-left="0cm" fo:margin-right="1cm" fo:text-indent="0cm" style:auto-text-indent="false"/>
      <style:text-properties officeooo:paragraph-rsid="001432b8"/>
    </style:style>
    <style:style style:name="P31" style:family="paragraph" style:parent-style-name="Text_20_body">
      <style:paragraph-properties fo:margin-left="0cm" fo:margin-right="1cm" fo:text-indent="0cm" style:auto-text-indent="false"/>
      <style:text-properties fo:font-size="10pt" officeooo:paragraph-rsid="001432b8" fo:background-color="#ffffff" style:font-size-asian="10pt" style:font-size-complex="10pt"/>
    </style:style>
    <style:style style:name="P32" style:family="paragraph" style:parent-style-name="Preformatted_20_Text">
      <style:paragraph-properties fo:margin-left="0cm" fo:margin-right="0cm" fo:margin-top="0cm" fo:margin-bottom="0.499cm" style:contextual-spacing="false" fo:text-align="left" style:justify-single-word="false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33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font-weight="bold" fo:background-color="#ffffff" style:font-size-asian="12pt" style:font-weight-asian="bold" style:font-weight-complex="bold"/>
    </style:style>
    <style:style style:name="P34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  <style:text-properties style:font-name="Liberation Mono" fo:font-size="10pt" fo:background-color="#ffffff" style:font-name-asian="NSimSun" style:font-size-asian="10pt" style:font-name-complex="Liberation Mono" style:font-size-complex="10pt"/>
    </style:style>
    <style:style style:name="P35" style:family="paragraph" style:parent-style-name="Text_20_body">
      <style:text-properties officeooo:paragraph-rsid="00172c9b"/>
    </style:style>
    <style:style style:name="P36" style:family="paragraph" style:parent-style-name="Text_20_body">
      <style:text-properties fo:font-weight="bold" officeooo:paragraph-rsid="00172c9b" style:font-weight-asian="bold" style:font-weight-complex="bold"/>
    </style:style>
    <style:style style:name="P37" style:family="paragraph" style:parent-style-name="Text_20_body">
      <style:text-properties officeooo:paragraph-rsid="00172c9b" fo:background-color="#dddddd"/>
    </style:style>
    <style:style style:name="P38" style:family="paragraph" style:parent-style-name="Text_20_body">
      <style:text-properties fo:font-size="14pt" fo:font-weight="bold" fo:background-color="#ffff00" style:font-size-asian="14pt" style:font-weight-asian="bold" style:font-size-complex="14pt" style:font-weight-complex="bold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color="#ffffff" loext:opacity="100%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fo:background-color="#069a2e" style:font-weight-asian="bold" style:font-weight-complex="bold"/>
    </style:style>
    <style:style style:name="P42" style:family="paragraph" style:parent-style-name="Text_20_body">
      <style:text-properties fo:background-color="#5eb91e"/>
    </style:style>
    <style:style style:name="P43" style:family="paragraph" style:parent-style-name="Text_20_body">
      <style:text-properties fo:font-weight="bold" fo:background-color="#ffff00" style:font-weight-asian="bold" style:font-weight-complex="bold"/>
    </style:style>
    <style:style style:name="P44" style:family="paragraph" style:parent-style-name="Text_20_body">
      <style:text-properties fo:background-color="#ff4000"/>
    </style:style>
    <style:style style:name="P45" style:family="paragraph" style:parent-style-name="Text_20_body">
      <style:text-properties fo:background-color="#00a933"/>
    </style:style>
    <style:style style:name="P46" style:family="paragraph" style:parent-style-name="Text_20_body" style:list-style-name="L2">
      <style:text-properties fo:font-weight="bold" officeooo:paragraph-rsid="001a7563" style:font-weight-asian="bold" style:font-weight-complex="bold"/>
    </style:style>
    <style:style style:name="P47" style:family="paragraph" style:parent-style-name="Text_20_body" style:list-style-name="L2">
      <style:text-properties officeooo:paragraph-rsid="001a7563"/>
    </style:style>
    <style:style style:name="P48" style:family="paragraph" style:parent-style-name="Text_20_body">
      <style:text-properties officeooo:paragraph-rsid="001a7563"/>
    </style:style>
    <style:style style:name="P49" style:family="paragraph" style:parent-style-name="Text_20_body">
      <style:text-properties fo:font-weight="bold" officeooo:paragraph-rsid="001a7563" style:font-weight-asian="bold" style:font-weight-complex="bold"/>
    </style:style>
    <style:style style:name="P50" style:family="paragraph" style:parent-style-name="Text_20_body">
      <style:text-properties fo:color="#111111" loext:opacity="100%" fo:background-color="#999999"/>
    </style:style>
    <style:style style:name="P51" style:family="paragraph" style:parent-style-name="Text_20_body" style:list-style-name="L3">
      <style:text-properties officeooo:paragraph-rsid="001bb63e"/>
    </style:style>
    <style:style style:name="P52" style:family="paragraph" style:parent-style-name="Text_20_body" style:list-style-name="L3"/>
    <style:style style:name="P53" style:family="paragraph" style:parent-style-name="Text_20_body" style:list-style-name="L3">
      <style:paragraph-properties fo:text-align="left" style:justify-single-word="false"/>
    </style:style>
    <style:style style:name="P54" style:family="paragraph" style:parent-style-name="Text_20_body">
      <style:text-properties officeooo:paragraph-rsid="001bb63e"/>
    </style:style>
    <style:style style:name="P55" style:family="paragraph" style:parent-style-name="Text_20_body" style:list-style-name="L4"/>
    <style:style style:name="P56" style:family="paragraph" style:parent-style-name="Text_20_body">
      <style:text-properties officeooo:paragraph-rsid="001d55f0"/>
    </style:style>
    <style:style style:name="T1" style:family="text">
      <style:text-properties fo:font-variant="normal" fo:text-transform="none" fo:color="#2e2b29" loext:opacity="100%" fo:letter-spacing="normal"/>
    </style:style>
    <style:style style:name="T2" style:family="text">
      <style:text-properties fo:font-variant="normal" fo:text-transform="none" fo:color="#2e2b29" loext:opacity="100%" fo:font-family="Inter, 'Inter Fallback', ui-sans-serif, system-ui, sans-serif" fo:letter-spacing="normal" fo:font-style="normal"/>
    </style:style>
    <style:style style:name="T3" style:family="text">
      <style:text-properties fo:font-variant="normal" fo:text-transform="none" fo:color="#2e2b29" loext:opacity="100%" fo:font-family="Inter, 'Inter Fallback', ui-sans-serif, system-ui, sans-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1432b8"/>
    </style:style>
    <style:style style:name="T9" style:family="text">
      <style:text-properties fo:font-weight="bold" fo:background-color="#ffffa6" loext:char-shading-value="0" style:font-size-asian="12pt" style:font-weight-asian="bold" style:font-weight-complex="bold"/>
    </style:style>
    <style:style style:name="T10" style:family="text">
      <style:text-properties fo:font-weight="bold" fo:background-color="#ffffff" loext:char-shading-value="0" style:font-size-asian="12pt" style:font-weight-asian="bold" style:font-weight-complex="bold"/>
    </style:style>
    <style:style style:name="T11" style:family="text">
      <style:text-properties fo:color="#000000" loext:opacity="100%" style:font-name="Liberation Mono" fo:font-size="14pt" fo:font-weight="bold" fo:background-color="#00a933" loext:char-shading-value="0" style:font-name-asian="NSimSun" style:font-size-asian="14pt" style:font-weight-asian="bold" style:font-name-complex="Liberation Mono" style:font-size-complex="14pt" style:font-weight-complex="bold"/>
    </style:style>
    <style:style style:name="T12" style:family="text">
      <style:text-properties fo:color="#000000" loext:opacity="100%" style:font-name="Liberation Mono" fo:font-size="14pt" fo:font-weight="bold" fo:background-color="#ffffff" loext:char-shading-value="0" style:font-name-asian="NSimSun" style:font-size-asian="14pt" style:font-weight-asian="bold" style:font-name-complex="Liberation Mono" style:font-size-complex="14pt" style:font-weight-complex="bold"/>
    </style:style>
    <style:style style:name="T13" style:family="text">
      <style:text-properties fo:color="#000000" loext:opacity="100%" style:font-name="Liberation Mono" fo:font-size="10pt" fo:font-weight="bold" fo:background-color="#ffffff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14" style:family="text">
      <style:text-properties fo:color="#000000" loext:opacity="100%" style:font-name="Liberation Mono" fo:font-size="10pt" fo:font-weight="bold" fo:background-color="#ffff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font-weight="bold" fo:background-color="#ffffff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size="10pt" fo:font-weight="bold" fo:background-color="#ffffff" loext:char-shading-value="0" style:font-size-asian="10pt" style:font-weight-asian="bold" style:font-size-complex="10pt" style:font-weight-complex="bold"/>
    </style:style>
    <style:style style:name="T17" style:family="text">
      <style:text-properties fo:font-size="10pt" fo:background-color="#ffffff" loext:char-shading-value="0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4pt" fo:background-color="#ffff00" loext:char-shading-value="0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style:font-name="Liberation Mono" fo:font-size="14pt" fo:background-color="#ffff00" loext:char-shading-value="0" style:font-name-asian="NSimSun" style:font-size-asian="14pt" style:font-name-complex="Liberation Mono" style:font-size-complex="14pt"/>
    </style:style>
    <style:style style:name="T23" style:family="text">
      <style:text-properties fo:font-size="10pt" fo:background-color="#dddddd" loext:char-shading-value="0" style:font-size-asian="10pt"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fo:background-color="#dddddd" loext:char-shading-value="0" style:font-weight-asian="normal" style:font-weight-complex="normal"/>
    </style:style>
    <style:style style:name="T26" style:family="text">
      <style:text-properties fo:background-color="#dddddd" loext:char-shading-value="0"/>
    </style:style>
    <style:style style:name="T27" style:family="text">
      <style:text-properties fo:background-color="#cccccc" loext:char-shading-value="0"/>
    </style:style>
    <style:style style:name="T28" style:family="text">
      <style:text-properties fo:color="#000000" loext:opacity="100%" fo:background-color="#ff0000" loext:char-shading-value="0"/>
    </style:style>
    <style:style style:name="T29" style:family="text">
      <style:text-properties fo:background-color="#81d41a" loext:char-shading-value="0"/>
    </style:style>
    <style:style style:name="T30" style:family="text">
      <style:text-properties fo:color="#ffffff" loext:opacity="100%" fo:font-weight="normal" fo:background-color="#00a933" loext:char-shading-value="0" style:font-weight-asian="normal" style:font-weight-complex="normal"/>
    </style:style>
    <style:style style:name="T31" style:family="text">
      <style:text-properties fo:background-color="#ff3838" loext:char-shading-value="0"/>
    </style:style>
    <style:style style:name="T32" style:family="text">
      <style:text-properties fo:background-color="#00a933" loext:char-shading-value="0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background-color="#5eb91e" loext:char-shading-value="0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111111" loext:opacity="100%" fo:background-color="#069a2e" loext:char-shading-value="0"/>
    </style:style>
    <style:style style:name="T37" style:family="text">
      <style:text-properties fo:color="#111111" loext:opacity="100%" fo:font-weight="bold" fo:background-color="#069a2e" loext:char-shading-value="0" style:font-weight-asian="bold" style:font-weight-complex="bold"/>
    </style:style>
    <text:list-style style:name="L1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 </text:span><text:span text:style-name="T2">IA pede por skills</text:span></text:p>
      <text:p text:style-name="P1"/>
      <text:list text:style-name="L1">
        <text:list-item>
          <text:p text:style-name="P2"><text:span text:style-name="T3">Ela </text:span><text:span text:style-name="Strong_20_Emphasis"><text:span text:style-name="T4">primeiro entende a situação</text:span></text:span><text:span text:style-name="T4"> </text:span></text:p>
        </text:list-item>
        <text:list-item>
          <text:p text:style-name="P3"><text:span text:style-name="Strong_20_Emphasis">Depois pede exatamente o que precisa</text:span> para decidir</text:p>
        </text:list-item>
        <text:list-item>
          <text:p text:style-name="P3">O raciocínio fica mais limpo e focado</text:p>
        </text:list-item>
      </text:list>
      <text:p text:style-name="P4"/>
      <text:p text:style-name="P4"/>
      <text:h text:style-name="P5" text:outline-level="2">⚡<text:span text:style-name="T5"> Resumo Final</text:span></text:h>
      <text:p text:style-name="P6">No seu projeto, <text:span text:style-name="Strong_20_Emphasis">Skill Creator</text:span> seria basicamente um sistema que <text:span text:style-name="Strong_20_Emphasis">fatia esse JSON gigante em pedaços inteligentes</text:span> e deixa a IA <text:span text:style-name="Strong_20_Emphasis">escolher quais pedaços precisa</text:span> baseado no contexto do momento, em vez de receber tudo sempre.</text:p>
      <text:p text:style-name="P6"/>
      <text:h text:style-name="P7" text:outline-level="1">Sistema de Skills + IA — Explicação Visual Completa</text:h>
      <text:p text:style-name="P8"/>
      <text:h text:style-name="P9" text:outline-level="2">1. PRIMEIRO: Como Funciona HOJE (Sem Skills)</text:h>
      <text:p text:style-name="P10"/>
      <text:p text:style-name="P11"><text:span text:style-name="Source_20_Text"><text:span text:style-name="T6">╔═══════════════════════════════════════════════════════════════════╗</text:span></text:span></text:p>
      <text:p text:style-name="P12"><text:span text:style-name="Source_20_Text"><text:span text:style-name="T7">║ <text:s text:c="20"/>FLUXO ATUAL DO SEU BOT <text:s text:c="22"/>║</text:span></text:span></text:p>
      <text:p text:style-name="P12"><text:span text:style-name="Source_20_Text"><text:span text:style-name="T7">╚═══════════════════════════════════════════════════════════════════╝</text:span></text:span></text:p>
      <text:p text:style-name="P13"/>
      <text:p text:style-name="P12"><text:span text:style-name="Source_20_Text"><text:span text:style-name="T7"><text:s text:c="2"/>BINANCE WebSocket</text:span></text:span></text:p>
      <text:p text:style-name="P12"><text:span text:style-name="Source_20_Text"><text:span text:style-name="T7"><text:s text:c="7"/>│</text:span></text:span></text:p>
      <text:p text:style-name="P12"><text:span text:style-name="Source_20_Text"><text:span text:style-name="T7"><text:s text:c="7"/>▼</text:span></text:span></text:p>
      <text:p text:style-name="P12"><text:span text:style-name="Source_20_Text"><text:span text:style-name="T7">┌──────────────┐ <text:s text:c="4"/>┌─────────────────────┐ <text:s text:c="4"/>┌──────────────┐</text:span></text:span></text:p>
      <text:p text:style-name="P12"><text:span text:style-name="Source_20_Text"><text:span text:style-name="T7">│ <text:s/>ORCHESTRATOR │────▶│ <text:s/>PAYLOAD BUILDER <text:s text:c="3"/>│────▶│ <text:s/>COMPRESSOR <text:s/>│</text:span></text:span></text:p>
      <text:p text:style-name="P12"><text:span text:style-name="Source_20_Text"><text:span text:style-name="T7">│ <text:s/>coleta TUDO <text:s/>│ <text:s text:c="4"/>│ <text:s/>monta JSON gigante │ <text:s text:c="4"/>│ <text:s/>tenta reduzir│</text:span></text:span></text:p>
      <text:p text:style-name="P12"><text:span text:style-name="Source_20_Text"><text:span text:style-name="T7">└──────────────┘ <text:s text:c="4"/>│ <text:s/>(~800 campos) <text:s text:c="6"/>│ <text:s text:c="4"/>│ <text:s/>(39KB código)│</text:span></text:span></text:p>
      <text:p text:style-name="P12"><text:span text:style-name="Source_20_Text"><text:span text:style-name="T7"><text:s text:c="21"/>└─────────────────────┘ <text:s text:c="4"/>└──────┬───────┘</text:span></text:span></text:p>
      <text:p text:style-name="P12"><text:soft-page-break/><text:span text:style-name="Source_20_Text"><text:span text:style-name="T7"><text:s text:c="56"/>│</text:span></text:span></text:p>
      <text:p text:style-name="P12"><text:span text:style-name="Source_20_Text"><text:span text:style-name="T7"><text:s text:c="56"/>▼</text:span></text:span></text:p>
      <text:p text:style-name="P12"><text:span text:style-name="Source_20_Text"><text:span text:style-name="T7"><text:s text:c="47"/>┌──────────────────┐</text:span></text:span></text:p>
      <text:p text:style-name="P12"><text:span text:style-name="Source_20_Text"><text:span text:style-name="T7"><text:s text:c="47"/>│ <text:s text:c="2"/>API da IA <text:s text:c="5"/>│</text:span></text:span></text:p>
      <text:p text:style-name="P12"><text:span text:style-name="Source_20_Text"><text:span text:style-name="T7"><text:s text:c="47"/>│ <text:s text:c="2"/>(Groq/Qwen) <text:s text:c="3"/>│</text:span></text:span></text:p>
      <text:p text:style-name="P12"><text:span text:style-name="Source_20_Text"><text:span text:style-name="T7"><text:s text:c="47"/>│ <text:s text:c="17"/>│</text:span></text:span></text:p>
      <text:p text:style-name="P12"><text:span text:style-name="Source_20_Text"><text:span text:style-name="T7"><text:s text:c="47"/>│ Recebe TUDO: <text:s text:c="4"/>│</text:span></text:span></text:p>
      <text:p text:style-name="P12"><text:span text:style-name="Source_20_Text"><text:span text:style-name="T7"><text:s text:c="47"/>│ • on-chain <text:s text:c="6"/>│</text:span></text:span></text:p>
      <text:p text:style-name="P12"><text:span text:style-name="Source_20_Text"><text:span text:style-name="T7"><text:s text:c="47"/>│ • orderbook <text:s text:c="5"/>│</text:span></text:span></text:p>
      <text:p text:style-name="P12"><text:span text:style-name="Source_20_Text"><text:span text:style-name="T7"><text:s text:c="47"/>│ • 4 timeframes <text:s text:c="2"/>│</text:span></text:span></text:p>
      <text:p text:style-name="P12"><text:span text:style-name="Source_20_Text"><text:span text:style-name="T7"><text:s text:c="47"/>│ • macro <text:s text:c="9"/>│</text:span></text:span></text:p>
      <text:p text:style-name="P12"><text:span text:style-name="Source_20_Text"><text:span text:style-name="T7"><text:s text:c="47"/>│ • whale activity │</text:span></text:span></text:p>
      <text:p text:style-name="P12"><text:span text:style-name="Source_20_Text"><text:span text:style-name="T7"><text:s text:c="47"/>│ • defense zones <text:s/>│</text:span></text:span></text:p>
      <text:p text:style-name="P12"><text:span text:style-name="Source_20_Text"><text:span text:style-name="T7"><text:s text:c="47"/>│ • volume profile │</text:span></text:span></text:p>
      <text:p text:style-name="P12"><text:span text:style-name="Source_20_Text"><text:span text:style-name="T7"><text:s text:c="47"/>│ • derivatives <text:s text:c="3"/>│</text:span></text:span></text:p>
      <text:p text:style-name="P12"><text:span text:style-name="Source_20_Text"><text:span text:style-name="T7"><text:s text:c="47"/>│ • correlações <text:s text:c="3"/>│</text:span></text:span></text:p>
      <text:p text:style-name="P12"><text:span text:style-name="Source_20_Text"><text:span text:style-name="T7"><text:s text:c="47"/>│ • heatmap <text:s text:c="7"/>│</text:span></text:span></text:p>
      <text:p text:style-name="P12"><text:span text:style-name="Source_20_Text"><text:span text:style-name="T7"><text:s text:c="47"/>│ • 152 LVNs <text:s text:c="6"/>│</text:span></text:span></text:p>
      <text:p text:style-name="P12"><text:span text:style-name="Source_20_Text"><text:span text:style-name="T7"><text:s text:c="47"/>│ • anomalias <text:s text:c="5"/>│</text:span></text:span></text:p>
      <text:p text:style-name="P12"><text:span text:style-name="Source_20_Text"><text:span text:style-name="T7"><text:s text:c="47"/>│ • ... tudo mais <text:s/>│</text:span></text:span></text:p>
      <text:p text:style-name="P12"><text:span text:style-name="Source_20_Text"><text:span text:style-name="T7"><text:s text:c="47"/>│ <text:s text:c="17"/>│</text:span></text:span></text:p>
      <text:p text:style-name="P12"><text:span text:style-name="Source_20_Text"><text:span text:style-name="T7"><text:s text:c="47"/>│ <text:s/>15-20KB de JSON │</text:span></text:span></text:p>
      <text:p text:style-name="P12"><text:span text:style-name="Source_20_Text"><text:span text:style-name="T7"><text:s text:c="47"/>└────────┬─────────┘</text:span></text:span></text:p>
      <text:p text:style-name="P12"><text:span text:style-name="Source_20_Text"><text:span text:style-name="T7"><text:s text:c="56"/>│</text:span></text:span></text:p>
      <text:p text:style-name="P12"><text:span text:style-name="Source_20_Text"><text:span text:style-name="T7"><text:s text:c="56"/>▼</text:span></text:span></text:p>
      <text:p text:style-name="P12"><text:span text:style-name="Source_20_Text"><text:span text:style-name="T7"><text:s text:c="51"/>IA responde</text:span></text:span></text:p>
      <text:p text:style-name="P12"><text:span text:style-name="Source_20_Text"><text:span text:style-name="T7"><text:s text:c="51"/>(1 resposta)</text:span></text:span></text:p>
      <text:p text:style-name="P12"><text:soft-page-break/><text:span text:style-name="Source_20_Text"><text:span text:style-name="T7"><text:s text:c="56"/>│</text:span></text:span></text:p>
      <text:p text:style-name="P12"><text:span text:style-name="Source_20_Text"><text:span text:style-name="T7"><text:s text:c="56"/>▼</text:span></text:span></text:p>
      <text:p text:style-name="P12"><text:span text:style-name="Source_20_Text"><text:span text:style-name="T7"><text:s text:c="50"/>SINAL FINAL</text:span></text:span></text:p>
      <text:p text:style-name="P12"><text:span text:style-name="Source_20_Text"><text:span text:style-name="T7"><text:s text:c="50"/>LONG/SHORT/WAIT</text:span></text:span></text:p>
      <text:p text:style-name="P14">------------------------------------------------------------------------------------------------------------------------</text:p>
      <text:h text:style-name="P15" text:outline-level="3">Problemas visíveis:</text:h>
      <text:p text:style-name="P16"/>
      <text:p text:style-name="P17"><text:span text:style-name="Source_20_Text">❌ PROBLEMA 1: Desperdício</text:span></text:p>
      <text:p text:style-name="P18"><text:span text:style-name="Source_20_Text"><text:s text:c="3"/>┌────────────────────────────────────────────────┐</text:span></text:p>
      <text:p text:style-name="P18"><text:span text:style-name="Source_20_Text"><text:s text:c="3"/>│ <text:s/>Regime = BREAKOUT perto de resistência <text:s text:c="7"/>│</text:span></text:p>
      <text:p text:style-name="P18"><text:span text:style-name="Source_20_Text"><text:s text:c="3"/>│ <text:s text:c="47"/>│</text:span></text:p>
      <text:p text:style-name="P18"><text:span text:style-name="Source_20_Text"><text:s text:c="3"/>│ <text:s/>IA recebeu on-chain (mempool, fees) <text:s text:c="10"/>│</text:span></text:p>
      <text:p text:style-name="P18"><text:span text:style-name="Source_20_Text"><text:s text:c="3"/>│ <text:s/>IA recebeu 152 LVNs scored <text:s text:c="19"/>│</text:span></text:p>
      <text:p text:style-name="P18"><text:span text:style-name="Source_20_Text"><text:s text:c="3"/>│ <text:s/>IA recebeu GARCH forecast <text:s text:c="20"/>│</text:span></text:p>
      <text:p text:style-name="P18"><text:span text:style-name="Source_20_Text"><text:s text:c="3"/>│ <text:s/>IA recebeu difficulty adjustment <text:s text:c="13"/>│</text:span></text:p>
      <text:p text:style-name="P18"><text:span text:style-name="Source_20_Text"><text:s text:c="3"/>│ <text:s text:c="47"/>│</text:span></text:p>
      <text:p text:style-name="P18"><text:span text:style-name="Source_20_Text"><text:s text:c="3"/>│ <text:s/>NADA disso ajuda na decisão de breakout <text:s text:c="6"/>│</text:span></text:p>
      <text:p text:style-name="P18"><text:span text:style-name="Source_20_Text"><text:s text:c="3"/>│ <text:s/>Mas a IA gastou tokens processando <text:s text:c="11"/>│</text:span></text:p>
      <text:p text:style-name="P18"><text:span text:style-name="Source_20_Text"><text:s text:c="3"/>└────────────────────────────────────────────────┘</text:span></text:p>
      <text:p text:style-name="P17"><text:span text:style-name="Source_20_Text">❌ PROBLEMA 2: Confusão</text:span></text:p>
      <text:p text:style-name="P18"><text:span text:style-name="Source_20_Text"><text:s text:c="3"/>┌────────────────────────────────────────────────┐</text:span></text:p>
      <text:p text:style-name="P18"><text:span text:style-name="Source_20_Text"><text:s text:c="3"/>│ <text:s/>Dados dizendo coisas opostas ao mesmo tempo: <text:s/>│</text:span></text:p>
      <text:p text:style-name="P18"><text:span text:style-name="Source_20_Text"><text:s text:c="3"/>│ <text:s text:c="47"/>│</text:span></text:p>
      <text:p text:style-name="P18"><text:span text:style-name="Source_20_Text"><text:s text:c="3"/>│ <text:s/>• 15m: ALTA ↑ <text:s text:c="32"/>│</text:span></text:p>
      <text:p text:style-name="P18"><text:span text:style-name="Source_20_Text"><text:s text:c="3"/>│ <text:s/>• 1h: BAIXA ↓ <text:s text:c="32"/>│</text:span></text:p>
      <text:p text:style-name="P18"><text:span text:style-name="Source_20_Text"><text:s text:c="3"/>│ <text:s/>• Retail: COMPRANDO forte <text:s text:c="20"/>│</text:span></text:p>
      <text:p text:style-name="P18"><text:span text:style-name="Source_20_Text"><text:s text:c="3"/>│ <text:s/>• Whales: VENDENDO forte <text:s text:c="21"/>│</text:span></text:p>
      <text:p text:style-name="P18"><text:span text:style-name="Source_20_Text"><text:s text:c="3"/>│ <text:s/>• Regime: BREAKOUT <text:s text:c="27"/>│</text:span></text:p>
      <text:p text:style-name="P18"><text:span text:style-name="Source_20_Text"><text:s text:c="3"/>│ <text:s/>• Macro: RISK_OFF <text:s text:c="28"/>│</text:span></text:p>
      <text:p text:style-name="P18"><text:span text:style-name="Source_20_Text"><text:s text:c="3"/>│ <text:s/>• Profile: B-shape (breakout iminente) <text:s text:c="7"/>│</text:span></text:p>
      <text:p text:style-name="P18"><text:span text:style-name="Source_20_Text"><text:s text:c="3"/>│ <text:s/>• VIX: 25.27 (medo alto) <text:s text:c="20"/>│</text:span></text:p>
      <text:p text:style-name="P18"><text:span text:style-name="Source_20_Text"><text:s text:c="3"/>│ <text:s text:c="47"/>│</text:span></text:p>
      <text:p text:style-name="P18"><text:span text:style-name="Source_20_Text"><text:s text:c="3"/>│ <text:s/>IA recebe TUDO junto = decisão confusa <text:s text:c="7"/>│</text:span></text:p>
      <text:p text:style-name="P18"><text:span text:style-name="Source_20_Text"><text:s text:c="3"/>└────────────────────────────────────────────────┘</text:span></text:p>
      <text:p text:style-name="P16"/>
      <text:p text:style-name="P17"><text:soft-page-break/><text:span text:style-name="Source_20_Text">❌ PROBLEMA 3: Custo</text:span></text:p>
      <text:p text:style-name="P19"><text:span text:style-name="Source_20_Text"><text:s text:c="3"/>┌────────────────────────────────────────────────┐</text:span></text:p>
      <text:p text:style-name="P19"><text:span text:style-name="Source_20_Text"><text:s text:c="3"/>│ <text:s/>Cada janela = 15-20KB de payload <text:s text:c="13"/>│</text:span></text:p>
      <text:p text:style-name="P19"><text:span text:style-name="Source_20_Text"><text:s text:c="3"/>│ <text:s/>× tokens de entrada (caros) <text:s text:c="18"/>│</text:span></text:p>
      <text:p text:style-name="P19"><text:span text:style-name="Source_20_Text"><text:s text:c="3"/>│ <text:s/>× throttling necessário <text:s text:c="22"/>│</text:span></text:p>
      <text:p text:style-name="P19"><text:span text:style-name="Source_20_Text"><text:s text:c="3"/>│ <text:s/>× compressor de 39KB de código <text:s text:c="15"/>│</text:span></text:p>
      <text:p text:style-name="P19"><text:span text:style-name="Source_20_Text"><text:s text:c="3"/>│ <text:s/>× otimizador de payload <text:s text:c="22"/>│</text:span></text:p>
      <text:p text:style-name="P19"><text:span text:style-name="Source_20_Text"><text:s text:c="3"/>│ <text:s/>× guardrails de tamanho <text:s text:c="22"/>│</text:span></text:p>
      <text:p text:style-name="P19"><text:span text:style-name="Source_20_Text"><text:s text:c="3"/>└────────────────────────────────────────────────┘</text:span></text:p>
      <text:h text:style-name="P20" text:outline-level="2">2. COMO FUNCIONA COM SKILLS</text:h>
      <text:h text:style-name="P21" text:outline-level="3">O Mecanismo: "Function Calling" / "Tool Use"</text:h>
      <text:p text:style-name="P22"/>
      <text:p text:style-name="P17"><text:span text:style-name="Source_20_Text">╔═══════════════════════════════════════════════════════════════════╗</text:span></text:p>
      <text:p text:style-name="P19"><text:span text:style-name="Source_20_Text">║ <text:s/>CONCEITO CHAVE: A IA NÃO "CHAMA" NADA DIRETAMENTE <text:s text:c="12"/>║</text:span></text:p>
      <text:p text:style-name="P19"><text:span text:style-name="Source_20_Text">║ <text:s text:c="66"/>║</text:span></text:p>
      <text:p text:style-name="P19"><text:span text:style-name="Source_20_Text">║ <text:s/>O que acontece é uma CONVERSA em rodadas: <text:s text:c="22"/>║</text:span></text:p>
      <text:p text:style-name="P19"><text:span text:style-name="Source_20_Text">║ <text:s text:c="66"/>║</text:span></text:p>
      <text:p text:style-name="P19"><text:span text:style-name="Source_20_Text">║ <text:s/>Rodada 1: Você manda contexto mínimo + lista de skills <text:s text:c="9"/>║</text:span></text:p>
      <text:p text:style-name="P19"><text:span text:style-name="Source_20_Text">║ <text:s/>Rodada 2: IA RESPONDE dizendo "quero a skill X" <text:s text:c="16"/>║</text:span></text:p>
      <text:p text:style-name="P19"><text:span text:style-name="Source_20_Text">║ <text:s/>Rodada 3: SEU CÓDIGO executa a skill e manda o resultado <text:s text:c="7"/>║</text:span></text:p>
      <text:p text:style-name="P19"><text:span text:style-name="Source_20_Text">║ <text:s/>Rodada 4: IA analisa e pede outra skill OU dá resposta final <text:s text:c="3"/>║</text:span></text:p>
      <text:p text:style-name="P19"><text:span text:style-name="Source_20_Text">╚═══════════════════════════════════════════════════════════════════╝</text:span></text:p>
      <text:h text:style-name="P15" text:outline-level="3">Fluxo Visual Detalhado (Passo a Passo):</text:h>
      <text:p text:style-name="P22"/>
      <text:p text:style-name="P22"/>
      <text:p text:style-name="P17"><text:span text:style-name="Source_20_Text">╔══════════════════════════════════════════════════════════════════════════╗</text:span></text:p>
      <text:p text:style-name="P19"><text:span text:style-name="Source_20_Text">║ <text:s text:c="19"/>RODADA 1: CONTEXTO MÍNIMO <text:s text:c="27"/>║</text:span></text:p>
      <text:p text:style-name="P19"><text:span text:style-name="Source_20_Text">╠══════════════════════════════════════════════════════════════════════════╣</text:span></text:p>
      <text:p text:style-name="P19"><text:span text:style-name="Source_20_Text">║ <text:s text:c="73"/>║</text:span></text:p>
      <text:p text:style-name="P19"><text:soft-page-break/><text:span text:style-name="Source_20_Text"><text:s text:c="2"/>Seu bot manda para a API: <text:s text:c="46"/></text:span></text:p>
      <text:p text:style-name="P19"><text:span text:style-name="Source_20_Text"><text:s text:c="70"/></text:span></text:p>
      <text:p text:style-name="P19"><text:span text:style-name="Source_20_Text"><text:s text:c="2"/>┌─────────────────────────────────────────────────────────────────┐ <text:s text:c="3"/></text:span></text:p>
      <text:p text:style-name="P19"><text:span text:style-name="Source_20_Text"><text:s text:c="2"/>│ MENSAGEM: <text:s text:c="54"/>│ <text:s text:c="4"/></text:span></text:p>
      <text:p text:style-name="P19"><text:span text:style-name="Source_20_Text"><text:s text:c="2"/>│ <text:s text:c="64"/>│ <text:s text:c="4"/></text:span></text:p>
      <text:p text:style-name="P19"><text:span text:style-name="Source_20_Text"><text:s text:c="2"/>│ "BTC está em 66847.80, regime BREAKOUT (47.8%), <text:s text:c="15"/>│ <text:s text:c="2"/></text:span></text:p>
      <text:p text:style-name="P19"><text:span text:style-name="Source_20_Text"><text:s text:c="2"/>│ <text:s/>sessão EUROPE, tendência 15m ALTA mas 1h/4h/1d BAIXA, <text:s text:c="7"/>│ <text:s text:c="2"/></text:span></text:p>
      <text:p text:style-name="P19"><text:span text:style-name="Source_20_Text"><text:s text:c="2"/>│ <text:s/>delta +4.69 (compradores dominando), <text:s text:c="25"/>│ <text:s text:c="3"/></text:span></text:p>
      <text:p text:style-name="P19"><text:span text:style-name="Source_20_Text"><text:s text:c="2"/>│ <text:s/>resistência mais próxima em 66940 (0.14% acima), <text:s text:c="13"/>│ <text:s text:c="4"/></text:span></text:p>
      <text:p text:style-name="P23"><text:span text:style-name="Source_20_Text"><text:s text:c="2"/>│ <text:s/>2 alertas ativos: RESISTANCE_TEST + BREAKOUT_SIGNAL, <text:s text:c="9"/>│ <text:s text:c="3"/></text:span></text:p>
      <text:p text:style-name="P23"><text:span text:style-name="Source_20_Text"><text:s text:c="2"/>│ <text:s/>Fear &amp; Greed: 12 (Extreme Fear). <text:s text:c="29"/>│ <text:s text:c="4"/></text:span></text:p>
      <text:p text:style-name="P19"><text:span text:style-name="Source_20_Text"><text:s text:c="2"/>│ <text:s text:c="64"/>│ <text:s text:c="4"/></text:span></text:p>
      <text:p text:style-name="P19"><text:span text:style-name="Source_20_Text"><text:s text:c="2"/>│ <text:s/>Analise a situação. Você tem estas skills disponíveis:" <text:s text:c="7"/>│ <text:s text:c="4"/></text:span></text:p>
      <text:p text:style-name="P19"><text:span text:style-name="Source_20_Text"><text:s text:c="2"/>└─────────────────────────────────────────────────────────────────┘ </text:span></text:p>
      <text:p text:style-name="P19"><text:span text:style-name="Source_20_Text"/></text:p>
      <text:p text:style-name="P19"><text:span text:style-name="Source_20_Text">┌─────────────────────────────────────────────────────────────────┐ <text:s text:c="4"/></text:span></text:p>
      <text:p text:style-name="P19"><text:span text:style-name="Source_20_Text">║ <text:s/>│ SKILLS DISPONÍVEIS (lista que você registra na API): <text:s text:c="11"/>│ <text:s text:c="4"/></text:span></text:p>
      <text:p text:style-name="P19"><text:span text:style-name="Source_20_Text">║ <text:s/>│ <text:s text:c="64"/>│ <text:s text:c="4"/></text:span></text:p>
      <text:p text:style-name="P19"><text:span text:style-name="Source_20_Text">║ <text:s/>│ <text:s/>📊 orderflow_detail <text:s text:c="3"/>→ fluxo detalhado, CVD, absorção <text:s text:c="6"/>│ <text:s text:c="4"/></text:span></text:p>
      <text:p text:style-name="P19"><text:span text:style-name="Source_20_Text">║ <text:s/>│ <text:s/>🐋 whale_analysis <text:s text:c="5"/>→ atividade whale, acumulação <text:s text:c="9"/>│ <text:s text:c="4"/></text:span></text:p>
      <text:p text:style-name="P19"><text:span text:style-name="Source_20_Text">║ <text:s/>│ <text:s/>📖 orderbook_depth <text:s text:c="4"/>→ profundidade do book, liquidez <text:s text:c="6"/>│ <text:s text:c="4"/></text:span></text:p>
      <text:p text:style-name="P19"><text:span text:style-name="Source_20_Text">║ <text:s/>│ <text:s/>🏛️ institutional_map <text:s text:c="2"/>→ defense zones, passivo/agressivo <text:s text:c="4"/>│ <text:s text:c="4"/></text:span></text:p>
      <text:p text:style-name="P19"><text:span text:style-name="Source_20_Text">║ <text:s/>│ <text:s/>🌍 macro_context <text:s text:c="6"/>→ DXY, VIX, SP500, correlações <text:s text:c="7"/>│ <text:s text:c="4"/></text:span></text:p>
      <text:p text:style-name="P19"><text:span text:style-name="Source_20_Text">║ <text:s/>│ <text:s/>📐 volume_profile <text:s text:c="5"/>→ POC, VAH, VAL, no-man's-land <text:s text:c="7"/>│ <text:s text:c="4"/></text:span></text:p>
      <text:p text:style-name="P19"><text:span text:style-name="Source_20_Text">║ <text:s/>│ <text:s/>📈 technical_multitf <text:s text:c="2"/>→ RSI, MACD, ADX dos 4 timeframes <text:s text:c="4"/>│ <text:s text:c="4"/></text:span></text:p>
      <text:p text:style-name="P19"><text:span text:style-name="Source_20_Text">║ <text:s/>│ <text:s/>⛓️ onchain_data <text:s text:c="7"/>→ mempool, fees, dificuldade <text:s text:c="10"/>│ <text:s text:c="4"/></text:span></text:p>
      <text:p text:style-name="P19"><text:span text:style-name="Source_20_Text">║ <text:s/>│ <text:s/>💰 derivatives_data <text:s text:c="3"/>→ funding, OI, long/short ratio <text:s text:c="7"/>│ <text:s text:c="4"/></text:span></text:p>
      <text:p text:style-name="P19"><text:span text:style-name="Source_20_Text">║ <text:s/>└─────────────────────────────────────────────────────────────────┘ </text:span></text:p>
      <text:p text:style-name="P19"><text:span text:style-name="Source_20_Text">Tamanho enviado: ~500 bytes (vs 15-20KB hoje)</text:span></text:p>
      <text:p text:style-name="P19"><text:soft-page-break/><text:span text:style-name="Source_20_Text">╔══════════════════════════════════════════════════════════════════════════╗</text:span></text:p>
      <text:p text:style-name="P19"><text:span text:style-name="Source_20_Text">║ <text:s text:c="19"/>RODADA 2: IA PEDE SKILLS <text:s text:c="28"/>║</text:span></text:p>
      <text:p text:style-name="P19"><text:span text:style-name="Source_20_Text">╠═════════════════════════════════════════════════════════════════════════</text:span></text:p>
      <text:p text:style-name="P19"><text:span text:style-name="Source_20_Text">║ <text:s text:c="73"/></text:span></text:p>
      <text:p text:style-name="P19"><text:span text:style-name="Source_20_Text">║ <text:s/>A API da IA NÃO retorna texto. Retorna uma ESTRUTURA dizendo: <text:s text:c="9"/></text:span></text:p>
      <text:p text:style-name="P19"><text:span text:style-name="Source_20_Text">║ <text:s text:c="73"/></text:span></text:p>
      <text:p text:style-name="P19"><text:span text:style-name="Source_20_Text">║ <text:s/>┌─────────────────────────────────────────────────────────────────┐ <text:s text:c="4"/></text:span></text:p>
      <text:p text:style-name="P19"><text:span text:style-name="Source_20_Text">║ <text:s/>│ RESPOSTA DA API: <text:s text:c="47"/>│ <text:s text:c="4"/></text:span></text:p>
      <text:p text:style-name="P19"><text:span text:style-name="Source_20_Text">║ <text:s/>│ <text:s text:c="64"/>│ <text:s text:c="4"/></text:span></text:p>
      <text:p text:style-name="P19"><text:span text:style-name="Source_20_Text">║ <text:s/>│ { <text:s text:c="62"/>│ <text:s text:c="4"/></text:span></text:p>
      <text:p text:style-name="P19"><text:span text:style-name="Source_20_Text">║ <text:s/>│ <text:s text:c="2"/>"type": "tool_calls", <text:s text:c="4"/>← não é resposta final! <text:s text:c="11"/>│ <text:s text:c="4"/></text:span></text:p>
      <text:p text:style-name="P19"><text:span text:style-name="Source_20_Text">║ <text:s/>│ <text:s text:c="2"/>"tool_calls": [ <text:s text:c="46"/>│ <text:s text:c="4"/></text:span></text:p>
      <text:p text:style-name="P19"><text:span text:style-name="Source_20_Text">║ <text:s/>│ <text:s text:c="4"/>{ <text:s text:c="58"/>│ <text:s text:c="4"/></text:span></text:p>
      <text:p text:style-name="P19"><text:span text:style-name="Source_20_Text">║ <text:s/>│ <text:s text:c="6"/>"skill": "orderbook_depth", <text:s text:c="30"/>│ <text:s text:c="4"/></text:span></text:p>
      <text:p text:style-name="P19"><text:span text:style-name="Source_20_Text">║ <text:s/>│ <text:s text:c="6"/>"reason": "Breakout perto de resistência, <text:s text:c="16"/>│ <text:s text:c="4"/></text:span></text:p>
      <text:p text:style-name="P19"><text:span text:style-name="Source_20_Text">║ <text:s/>│ <text:s text:c="17"/>preciso ver se há liquidez para romper" <text:s text:c="8"/>│ <text:s text:c="4"/></text:span></text:p>
      <text:p text:style-name="P19"><text:span text:style-name="Source_20_Text">║ <text:s/>│ <text:s text:c="4"/>}, <text:s text:c="57"/>│ <text:s text:c="4"/></text:span></text:p>
      <text:p text:style-name="P19"><text:span text:style-name="Source_20_Text">║ <text:s/>│ <text:s text:c="4"/>{ <text:s text:c="58"/>│ <text:s text:c="4"/></text:span></text:p>
      <text:p text:style-name="P19"><text:span text:style-name="Source_20_Text">║ <text:s/>│ <text:s text:c="6"/>"skill": "institutional_map", <text:s text:c="28"/>│ <text:s text:c="4"/></text:span></text:p>
      <text:p text:style-name="P19"><text:span text:style-name="Source_20_Text">║ <text:s/>│ <text:s text:c="6"/>"reason": "Preciso ver as defense zones <text:s text:c="18"/>│ <text:s text:c="4"/></text:span></text:p>
      <text:p text:style-name="P19"><text:span text:style-name="Source_20_Text">║ <text:s/>│ <text:s text:c="17"/>e se há absorção passiva na resistência" <text:s text:c="7"/>│ <text:s text:c="4"/></text:span></text:p>
      <text:p text:style-name="P19"><text:span text:style-name="Source_20_Text">║ <text:s/>│ <text:s text:c="4"/>} <text:s text:c="58"/>│ <text:s text:c="4"/></text:span></text:p>
      <text:p text:style-name="P19"><text:span text:style-name="Source_20_Text">║ <text:s/>│ <text:s text:c="2"/>] <text:s text:c="60"/>│ <text:s text:c="4"/></text:span></text:p>
      <text:p text:style-name="P19"><text:span text:style-name="Source_20_Text">║ <text:s/>│ } <text:s text:c="62"/>│ <text:s text:c="4"/></text:span></text:p>
      <text:p text:style-name="P19"><text:span text:style-name="Source_20_Text">║ <text:s/>└─────────────────────────────────────────────────────────────────┘ </text:span></text:p>
      <text:p text:style-name="P24"><text:span text:style-name="Source_20_Text">OBSERVE: A IA ESCOLHEU só 2 de 9 skills disponíveis! <text:s text:c="18"/></text:span></text:p>
      <text:p text:style-name="P24"><text:span text:style-name="Source_20_Text">Ela NÃO pediu on-chain, NÃO pediu técnicos, NÃO pediu macro</text:span></text:p>
      <text:p text:style-name="P19"><text:span text:style-name="Source_20_Text"/></text:p>
      <text:p text:style-name="P19"><text:span text:style-name="Source_20_Text"/></text:p>
      <text:p text:style-name="P19"><text:soft-page-break/><text:span text:style-name="Source_20_Text"/></text:p>
      <text:p text:style-name="P25"><text:span text:style-name="Source_20_Text">RODADA 3: SEU BOT EXECUTA AS SKILLS.</text:span></text:p>
      <text:p text:style-name="P25"><text:span text:style-name="Source_20_Text"/></text:p>
      <text:p text:style-name="P25"><text:span text:style-name="Source_20_Text"/></text:p>
      <text:p text:style-name="P25"><text:span text:style-name="Source_20_Text"><text:s/>Seu código (NÃO a IA) faz isso:</text:span></text:p>
      <text:p text:style-name="P26"><text:span text:style-name="Source_20_Text">║ <text:s text:c="73"/></text:span></text:p>
      <text:p text:style-name="P26"><text:span text:style-name="Source_20_Text">║ <text:s/>1. Lê "tool_calls" da resposta. <text:s text:c="10"/></text:span></text:p>
      <text:p text:style-name="P26"><text:span text:style-name="Source_20_Text">║ <text:s/>2. Para cada skill pedida:</text:span></text:p>
      <text:p text:style-name="P26"><text:span text:style-name="Source_20_Text">║ <text:s text:c="4"/>→ Pega a FATIA correspondente do JSON que você já te</text:span><text:span text:style-name="Source_20_Text"><text:span text:style-name="T8">M</text:span></text:span></text:p>
      <text:p text:style-name="P26"><text:span text:style-name="Source_20_Text">║ <text:s text:c="4"/>→ Monta resultado</text:span></text:p>
      <text:p text:style-name="P19"><text:span text:style-name="Source_20_Text">║ <text:s/>3. Manda de volta para a API</text:span></text:p>
      <text:p text:style-name="P19"><text:span text:style-name="Source_20_Text"/></text:p>
      <text:p text:style-name="P19"><text:span text:style-name="Source_20_Text">┌──────────────────────────────────────────────────┐ <text:s text:c="19"/></text:span></text:p>
      <text:p text:style-name="P19"><text:span text:style-name="Source_20_Text">║ <text:s/>│ <text:s/>Skill: orderbook_depth <text:s text:c="25"/>│ <text:s text:c="19"/></text:span></text:p>
      <text:p text:style-name="P19"><text:span text:style-name="Source_20_Text">║ <text:s/>│ <text:s text:c="49"/>│ <text:s text:c="19"/></text:span></text:p>
      <text:p text:style-name="P19"><text:span text:style-name="Source_20_Text">║ <text:s/>│ <text:s/>Resultado enviado: <text:s text:c="29"/>│ <text:s text:c="19"/></text:span></text:p>
      <text:p text:style-name="P19"><text:span text:style-name="Source_20_Text">║ <text:s/>│ <text:s/>{ <text:s text:c="46"/>│ <text:s text:c="19"/></text:span></text:p>
      <text:p text:style-name="P19"><text:span text:style-name="Source_20_Text">║ <text:s/>│ <text:s text:c="3"/>"bid_depth": 209263, <text:s text:c="25"/>│ <text:s text:c="19"/></text:span></text:p>
      <text:p text:style-name="P19"><text:span text:style-name="Source_20_Text">║ <text:s/>│ <text:s text:c="3"/>"ask_depth": 1185440, <text:s text:c="24"/>│ <text:s text:c="19"/></text:span></text:p>
      <text:p text:style-name="P19"><text:span text:style-name="Source_20_Text">║ <text:s/>│ <text:s text:c="3"/>"imbalance": -0.754, <text:s text:c="25"/>│ <text:s text:c="19"/></text:span></text:p>
      <text:p text:style-name="P19"><text:span text:style-name="Source_20_Text">║ <text:s/>│ <text:s text:c="3"/>"total_depth_ratio": 0.14, <text:s text:c="19"/>│ <text:s text:c="19"/></text:span></text:p>
      <text:p text:style-name="P19"><text:span text:style-name="Source_20_Text">║ <text:s/>│ <text:s text:c="3"/>"spread_bps": 0.015, <text:s text:c="25"/>│ <text:s text:c="19"/></text:span></text:p>
      <text:p text:style-name="P19"><text:span text:style-name="Source_20_Text">║ <text:s/>│ <text:s text:c="3"/>"anomaly": "DEPTH_EXTREME_ASYMMETRY", <text:s text:c="8"/>│ <text:s text:c="19"/></text:span></text:p>
      <text:p text:style-name="P19"><text:span text:style-name="Source_20_Text">║ <text:s/>│ <text:s text:c="3"/>"liquidity_score": 9.99, <text:s text:c="21"/>│ <text:s text:c="18"/></text:span></text:p>
      <text:p text:style-name="P19"><text:span text:style-name="Source_20_Text">║ <text:s/>│ <text:s text:c="3"/>"slippage_1m_buy": 7.95 <text:s text:c="22"/>│ <text:s text:c="19"/></text:span></text:p>
      <text:p text:style-name="P19"><text:span text:style-name="Source_20_Text">║ <text:s/>│ <text:s/>} <text:s text:c="46"/>│ <text:s text:c="19"/></text:span></text:p>
      <text:p text:style-name="P19"><text:span text:style-name="Source_20_Text">║ <text:s/>└──────────────────────────────────────────────────┘</text:span></text:p>
      <text:p text:style-name="P25"><text:span text:style-name="Source_20_Text">┌──────────────────────────────────────────────────┐ <text:s text:c="19"/></text:span></text:p>
      <text:p text:style-name="P26"><text:span text:style-name="Source_20_Text">║ <text:s/>│ <text:s/>Skill: institutional_map. <text:s text:c="42"/></text:span></text:p>
      <text:p text:style-name="P26"><text:span text:style-name="Source_20_Text">║ <text:s/>│ <text:s text:c="49"/>│ <text:s text:c="17"/></text:span></text:p>
      <text:p text:style-name="P26"><text:span text:style-name="Source_20_Text">║ <text:s/>│ <text:s/>Resultado enviado: <text:s text:c="29"/>│ <text:s text:c="18"/></text:span></text:p>
      <text:p text:style-name="P26"><text:span text:style-name="Source_20_Text">║ <text:s/>│ <text:s/>{ <text:s text:c="46"/>│ <text:s text:c="19"/></text:span></text:p>
      <text:p text:style-name="P26"><text:span text:style-name="Source_20_Text">║ <text:s/>│ <text:s text:c="3"/>"nearest_sell_defense": 66940 (str 62), <text:s text:c="6"/>│ <text:s text:c="19"/></text:span></text:p>
      <text:p text:style-name="P26"><text:span text:style-name="Source_20_Text">║ <text:s/>│ <text:s text:c="3"/>"aggressive_buyers": 71.58%, <text:s text:c="17"/>│ <text:s text:c="19"/></text:span></text:p>
      <text:p text:style-name="P26"><text:span text:style-name="Source_20_Text">║ <text:s/>│ <text:s text:c="3"/>"passive_sellers": 85%, <text:s text:c="22"/>│ <text:s text:c="19"/></text:span></text:p>
      <text:p text:style-name="P26"><text:span text:style-name="Source_20_Text">║ <text:s/>│ <text:s text:c="3"/>"composite_signal": "buy_absorption", <text:s text:c="8"/>│ <text:s text:c="19"/></text:span></text:p>
      <text:p text:style-name="P26"><text:span text:style-name="Source_20_Text">║ <text:s/>│ <text:s text:c="3"/>"whale_acc_score": -18 (DISTRIBUTING), <text:s text:c="7"/>│ <text:s text:c="18"/></text:span></text:p>
      <text:p text:style-name="P26"><text:span text:style-name="Source_20_Text">║ <text:s/>│ <text:s text:c="3"/>"profile_shape": "B" (breakout expected), <text:s text:c="4"/>│ <text:s text:c="19"/></text:span></text:p>
      <text:p text:style-name="P26"><text:span text:style-name="Source_20_Text">║ <text:s/>│ <text:s text:c="3"/>"defense_asymmetry": "neutral" (0.95) <text:s text:c="8"/>│ <text:s text:c="19"/></text:span></text:p>
      <text:p text:style-name="P19"><text:span text:style-name="Source_20_Text">║ <text:s/>│ <text:s/>} <text:s text:c="42"/></text:span></text:p>
      <text:p text:style-name="P25"><text:soft-page-break/><text:span text:style-name="Source_20_Text"/></text:p>
      <text:p text:style-name="P27"><text:span text:style-name="Source_20_Text"><text:s/>RODADA 4: IA ANALISA E DECIDE (ou pede mais.</text:span></text:p>
      <text:p text:style-name="P27"><text:span text:style-name="Source_20_Text"/></text:p>
      <text:p text:style-name="P27"><text:span text:style-name="Source_20_Text">┌─────────────────────────────────────────────────────────────────┐ <text:s text:c="3"/></text:span></text:p>
      <text:p text:style-name="P26"><text:span text:style-name="Source_20_Text">║ <text:s/>│ "WAIT - Não entrar agora. <text:s text:c="37"/>│ <text:s text:c="4"/></text:span></text:p>
      <text:p text:style-name="P26"><text:span text:style-name="Source_20_Text">║ <text:s/>│ <text:s text:c="64"/>│ <text:s text:c="4"/></text:span></text:p>
      <text:p text:style-name="P26"><text:span text:style-name="Source_20_Text">║ <text:s/>│ <text:s/>Motivo: Embora regime seja BREAKOUT e compradores agressivos <text:s text:c="2"/>│ <text:s text:c="3"/></text:span></text:p>
      <text:p text:style-name="P26"><text:span text:style-name="Source_20_Text">║ <text:s/>│ <text:s/>dominem (71.58%), o orderbook mostra parede de venda <text:s text:c="10"/>│ <text:s text:c="4"/></text:span></text:p>
      <text:p text:style-name="P26"><text:span text:style-name="Source_20_Text">║ <text:s/>│ <text:s/>5.6x maior que bids. Whales estão distribuindo (score -18). <text:s text:c="3"/>│ <text:s text:c="4"/></text:span></text:p>
      <text:p text:style-name="P26"><text:span text:style-name="Source_20_Text">║ <text:s/>│ <text:s/>Perfil B sugere breakout mas assimetria do book sugere <text:s text:c="8"/>│ <text:s text:c="4"/></text:span></text:p>
      <text:p text:style-name="P26"><text:span text:style-name="Source_20_Text">║ <text:s/>│ <text:s/>que será para BAIXO, não para cima. <text:s text:c="27"/>│ <text:s text:c="4"/></text:span></text:p>
      <text:p text:style-name="P26"><text:span text:style-name="Source_20_Text">║ <text:s/>│ <text:s text:c="64"/>│ <text:s text:c="4"/></text:span></text:p>
      <text:p text:style-name="P26"><text:span text:style-name="Source_20_Text">║ <text:s/>│ <text:s/>Confiança: 72%" <text:s text:c="47"/>│ <text:s text:c="4"/></text:span></text:p>
      <text:p text:style-name="P19"><text:span text:style-name="Source_20_Text">║ <text:s/>└─────────────────────────────────────────────────────────────────┘</text:span></text:p>
      <text:p text:style-name="P28"><text:span text:style-name="Source_20_Text"><text:span text:style-name="T9">OPÇÃO B: IA quer confirmar algo → pede mais uma skill. </text:span></text:span></text:p>
      <text:p text:style-name="P28"><text:span text:style-name="Source_20_Text"><text:span text:style-name="T10"/></text:span></text:p>
      <text:p text:style-name="P27"><text:span text:style-name="Source_20_Text">{</text:span></text:p>
      <text:p text:style-name="P27"><text:span text:style-name="Source_20_Text"><text:s text:c="2"/>"type": "tool_calls",</text:span></text:p>
      <text:p text:style-name="P27"><text:span text:style-name="Source_20_Text"><text:s text:c="2"/>"tool_calls": [</text:span></text:p>
      <text:p text:style-name="P27"><text:span text:style-name="Source_20_Text"><text:s text:c="4"/>{</text:span></text:p>
      <text:p text:style-name="P27"><text:span text:style-name="Source_20_Text"><text:s text:c="6"/>"skill": "macro_context",</text:span></text:p>
      <text:p text:style-name="P27"><text:span text:style-name="Source_20_Text"><text:s text:c="6"/>"reason": "Whales distribuindo + ask wall pesado. Preciso confirmar se macro RISK_OFF apoia queda"</text:span></text:p>
      <text:p text:style-name="P27"><text:span text:style-name="Source_20_Text"><text:s text:c="4"/>}</text:span></text:p>
      <text:p text:style-name="P27"><text:span text:style-name="Source_20_Text"><text:s text:c="2"/>]</text:span></text:p>
      <text:p text:style-name="P27"><text:span text:style-name="Source_20_Text">}</text:span></text:p>
      <text:p text:style-name="P28"><text:span text:style-name="Source_20_Text"><text:span text:style-name="T10"><text:s text:c="2"/></text:span></text:span></text:p>
      <text:p text:style-name="P28"><text:span text:style-name="Source_20_Text"><text:span text:style-name="T10"><text:s/>→ E o ciclo se repete (Rodada 5, 6...) até a IA dar resposta final </text:span></text:span></text:p>
      <text:p text:style-name="P28"><text:span text:style-name="Source_20_Text"><text:span text:style-name="T10"/></text:span></text:p>
      <text:h text:style-name="P29" text:outline-level="2"><text:span text:style-name="Source_20_Text"><text:span text:style-name="T11">3. DIAGRAMA COMPLETO DO SISTEMA</text:span></text:span></text:h>
      <text:p text:style-name="P30"><text:span text:style-name="Source_20_Text"><text:span text:style-name="T11"/></text:span></text:p>
      <text:p text:style-name="P30"><text:span text:style-name="Source_20_Text"><text:span text:style-name="T12">╔</text:span></text:span><text:span text:style-name="Source_20_Text"><text:span text:style-name="T13">════════════════════════════════════════════════════════════════════════╗</text:span></text:span></text:p>
      <text:p text:style-name="P30"><text:span text:style-name="Source_20_Text"><text:span text:style-name="T13">║ <text:s text:c="13"/>ARQUITETURA SKILL-BASED COMPLETA <text:s text:c="24"/>║</text:span></text:span></text:p>
      <text:p text:style-name="P30"><text:span text:style-name="Source_20_Text"><text:span text:style-name="T13">╠════════════════════════════════════════════════════════════════════════╣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<text:s text:c="2"/>┌────────────────────────────────────────┐</text:span></text:span></text:p>
      <text:p text:style-name="P30"><text:span text:style-name="Source_20_Text"><text:span text:style-name="T13"><text:s text:c="2"/>│ <text:s text:c="7"/>BINANCE (WebSocket + REST) <text:s text:c="5"/>│</text:span></text:span></text:p>
      <text:p text:style-name="P30"><text:span text:style-name="Source_20_Text"><text:span text:style-name="T13"><text:s text:c="2"/>└────────────────┬───────────────────────┘</text:span></text:span></text:p>
      <text:p text:style-name="P30"><text:span text:style-name="Source_20_Text"><text:span text:style-name="T13"><text:s text:c="19"/>│</text:span></text:span></text:p>
      <text:p text:style-name="P30"><text:span text:style-name="Source_20_Text"><text:span text:style-name="T13"><text:s text:c="19"/>▼</text:span></text:span></text:p>
      <text:p text:style-name="P30"><text:span text:style-name="Source_20_Text"><text:span text:style-name="T13"><text:s text:c="2"/>┌────────────────────────────────────────┐</text:span></text:span></text:p>
      <text:p text:style-name="P30"><text:span text:style-name="Source_20_Text"><text:span text:style-name="T13"><text:s text:c="2"/>│ <text:s text:c="10"/>MARKET ORCHESTRATOR <text:s text:c="9"/>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• Coleta todos os dados normalmente <text:s text:c="2"/>│</text:span></text:span></text:p>
      <text:p text:style-name="P30"><text:span text:style-name="Source_20_Text"><text:span text:style-name="T13"><text:s text:c="2"/>│ <text:s/>• NÃO envia tudo para IA de uma vez <text:s text:c="2"/>│</text:span></text:span></text:p>
      <text:p text:style-name="P30"><text:span text:style-name="Source_20_Text"><text:span text:style-name="T13"><text:s text:c="2"/>│ <text:s/>• Armazena em CACHE LOCAL por skills <text:s/>│</text:span></text:span></text:p>
      <text:p text:style-name="P30"><text:span text:style-name="Source_20_Text"><text:span text:style-name="T13"><text:s text:c="2"/>└────────────────┬───────────────────────┘</text:span></text:span></text:p>
      <text:p text:style-name="P30"><text:soft-page-break/><text:span text:style-name="Source_20_Text"><text:span text:style-name="T13"><text:s text:c="19"/>│</text:span></text:span></text:p>
      <text:p text:style-name="P30"><text:span text:style-name="Source_20_Text"><text:span text:style-name="T13"><text:s text:c="19"/>▼</text:span></text:span></text:p>
      <text:p text:style-name="P30"><text:span text:style-name="Source_20_Text"><text:span text:style-name="T13"><text:s text:c="2"/>┌────────────────────────────────────────┐</text:span></text:span></text:p>
      <text:p text:style-name="P30"><text:span text:style-name="Source_20_Text"><text:span text:style-name="T13"><text:s text:c="2"/>│ <text:s text:c="13"/>SKILL REGISTRY <text:s text:c="11"/>│</text:span></text:span></text:p>
      <text:p text:style-name="P30"><text:span text:style-name="Source_20_Text"><text:span text:style-name="T13"><text:s text:c="2"/>│ <text:s text:c="8"/></text:span></text:span><text:span text:style-name="Source_20_Text"><text:span text:style-name="T14">(Cache organizado por skill)</text:span></text:span><text:span text:style-name="Source_20_Text"><text:span text:style-name="T13"> <text:s text:c="2"/>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┌────────┬────────┬────────┬────────┐ │</text:span></text:span></text:p>
      <text:p text:style-name="P30"><text:span text:style-name="Source_20_Text"><text:span text:style-name="T13"><text:s text:c="2"/>│ <text:s/>│order- <text:s/>│whale <text:s text:c="2"/>│order- <text:s/>│instit. │ │</text:span></text:span></text:p>
      <text:p text:style-name="P30"><text:span text:style-name="Source_20_Text"><text:span text:style-name="T13"><text:s text:c="2"/>│ <text:s/>│flow <text:s text:c="3"/>│analysis│book <text:s text:c="3"/>│map <text:s text:c="4"/>│ │</text:span></text:span></text:p>
      <text:p text:style-name="P30"><text:span text:style-name="Source_20_Text"><text:span text:style-name="T13"><text:s text:c="2"/>│ <text:s/>├────────┼────────┼────────┼────────┤ │</text:span></text:span></text:p>
      <text:p text:style-name="P30"><text:span text:style-name="Source_20_Text"><text:span text:style-name="T13"><text:s text:c="2"/>│ <text:s/>│CVD <text:s text:c="4"/>│whale <text:s text:c="2"/>│L1-L25 <text:s/>│defense │ │</text:span></text:span></text:p>
      <text:p text:style-name="P30"><text:span text:style-name="Source_20_Text"><text:span text:style-name="T13"><text:s text:c="2"/>│ <text:s/>│sector <text:s/>│orders <text:s/>│spread <text:s/>│zones <text:s text:c="2"/>│ │</text:span></text:span></text:p>
      <text:p text:style-name="P30"><text:span text:style-name="Source_20_Text"><text:span text:style-name="T13"><text:s text:c="2"/>│ <text:s/>│absorção│accum. <text:s/>│impact <text:s/>│passive │ │</text:span></text:span></text:p>
      <text:p text:style-name="P30"><text:span text:style-name="Source_20_Text"><text:span text:style-name="T13"><text:s text:c="2"/>│ <text:s/>│ratio <text:s text:c="2"/>│icebergs│anomalies│aggress│ │</text:span></text:span></text:p>
      <text:p text:style-name="P30"><text:span text:style-name="Source_20_Text"><text:span text:style-name="T13"><text:s text:c="2"/>│ <text:s/>└────────┴────────┴────────┴────────┘ 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┌────────┬────────┬────────┬────────┐ │</text:span></text:span></text:p>
      <text:p text:style-name="P30"><text:span text:style-name="Source_20_Text"><text:span text:style-name="T13"><text:s text:c="2"/>│ <text:s/>│macro <text:s text:c="2"/>│volume <text:s/>│technical│onchain│ │</text:span></text:span></text:p>
      <text:p text:style-name="P30"><text:span text:style-name="Source_20_Text"><text:span text:style-name="T13"><text:s text:c="2"/>│ <text:s/>│context │profile │multitf │data <text:s text:c="3"/>│ │</text:span></text:span></text:p>
      <text:p text:style-name="P30"><text:span text:style-name="Source_20_Text"><text:span text:style-name="T13"><text:s text:c="2"/>│ <text:s/>├────────┼────────┼────────┼────────┤ │</text:span></text:span></text:p>
      <text:p text:style-name="P30"><text:span text:style-name="Source_20_Text"><text:span text:style-name="T13"><text:s text:c="2"/>│ <text:s/>│DXY <text:s text:c="4"/>│POC/VAH │15m/1h <text:s/>│mempool │ │</text:span></text:span></text:p>
      <text:p text:style-name="P30"><text:span text:style-name="Source_20_Text"><text:span text:style-name="T13"><text:s text:c="2"/>│ <text:s/>│VIX <text:s text:c="4"/>│no-mans │4h/1d <text:s text:c="2"/>│fees <text:s text:c="3"/>│ │</text:span></text:span></text:p>
      <text:p text:style-name="P30"><text:span text:style-name="Source_20_Text"><text:span text:style-name="T13"><text:s text:c="2"/>│ <text:s/>│SP500 <text:s text:c="2"/>│profile │RSI/MACD│diff. <text:s text:c="2"/>│ │</text:span></text:span></text:p>
      <text:p text:style-name="P30"><text:span text:style-name="Source_20_Text"><text:span text:style-name="T13"><text:s text:c="2"/>│ <text:s/>│F&amp;G <text:s text:c="4"/>│shape <text:s text:c="2"/>│ADX/CCI │addrs <text:s text:c="2"/>│ │</text:span></text:span></text:p>
      <text:p text:style-name="P30"><text:span text:style-name="Source_20_Text"><text:span text:style-name="T13"><text:s text:c="2"/>│ <text:s/>└────────┴────────┴────────┴────────┘ 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┌────────┐ <text:s text:c="27"/>│</text:span></text:span></text:p>
      <text:p text:style-name="P30"><text:span text:style-name="Source_20_Text"><text:span text:style-name="T13"><text:s text:c="2"/>│ <text:s/>│derivat.│ <text:s/>→ </text:span></text:span><text:span text:style-name="Source_20_Text"><text:span text:style-name="T14">Dados PRONTOS</text:span></text:span><text:span text:style-name="Source_20_Text"><text:span text:style-name="T13">, <text:s text:c="9"/>│</text:span></text:span></text:p>
      <text:p text:style-name="P30"><text:span text:style-name="Source_20_Text"><text:span text:style-name="T13"><text:s text:c="2"/>│ <text:s/>│data <text:s text:c="3"/>│ <text:s text:c="3"/>aguardando request da IA│</text:span></text:span></text:p>
      <text:p text:style-name="P30"><text:span text:style-name="Source_20_Text"><text:span text:style-name="T13"><text:s text:c="2"/>│ <text:s/>├────────┤ <text:s text:c="27"/>│</text:span></text:span></text:p>
      <text:p text:style-name="P30"><text:span text:style-name="Source_20_Text"><text:span text:style-name="T13"><text:s text:c="2"/>│ <text:s/>│funding │ <text:s text:c="27"/>│</text:span></text:span></text:p>
      <text:p text:style-name="P30"><text:span text:style-name="Source_20_Text"><text:span text:style-name="T13"><text:s text:c="2"/>│ <text:s/>│OI <text:s text:c="5"/>│ <text:s text:c="27"/>│</text:span></text:span></text:p>
      <text:p text:style-name="P30"><text:span text:style-name="Source_20_Text"><text:span text:style-name="T13"><text:s text:c="2"/>│ <text:s/>│LSR <text:s text:c="4"/>│ <text:s text:c="27"/>│</text:span></text:span></text:p>
      <text:p text:style-name="P30"><text:span text:style-name="Source_20_Text"><text:span text:style-name="T13"><text:s text:c="2"/>│ <text:s/>└────────┘ <text:s text:c="27"/>│</text:span></text:span></text:p>
      <text:p text:style-name="P30"><text:span text:style-name="Source_20_Text"><text:span text:style-name="T13"><text:s text:c="2"/>└────────────────┬───────────────────────┘</text:span></text:span></text:p>
      <text:p text:style-name="P30"><text:span text:style-name="Source_20_Text"><text:span text:style-name="T13"><text:s text:c="19"/>│</text:span></text:span></text:p>
      <text:p text:style-name="P30"><text:soft-page-break/><text:span text:style-name="Source_20_Text"><text:span text:style-name="T13"><text:s text:c="19"/>▼</text:span></text:span></text:p>
      <text:p text:style-name="P30"><text:span text:style-name="Source_20_Text"><text:span text:style-name="T13"><text:s text:c="2"/>┌────────────────────────────────────────┐</text:span></text:span></text:p>
      <text:p text:style-name="P30"><text:span text:style-name="Source_20_Text"><text:span text:style-name="T13"><text:s text:c="2"/>│ <text:s text:c="11"/></text:span></text:span><text:span text:style-name="Source_20_Text"><text:span text:style-name="T14"><text:s/>SKILL EXECUTOR </text:span></text:span><text:span text:style-name="Source_20_Text"><text:span text:style-name="T13"><text:s text:c="12"/>│</text:span></text:span></text:p>
      <text:p text:style-name="P30"><text:span text:style-name="Source_20_Text"><text:span text:style-name="T13"><text:s text:c="2"/>│ <text:s text:c="11"/>(Controlador do Loop) <text:s text:c="6"/>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1. Monta contexto mínimo <text:s text:c="13"/>│</text:span></text:span></text:p>
      <text:p text:style-name="P30"><text:span text:style-name="Source_20_Text"><text:span text:style-name="T13"><text:s text:c="2"/>│ <text:s/>2. Registra skills disponíveis <text:s text:c="7"/>│</text:span></text:span></text:p>
      <text:p text:style-name="P30"><text:span text:style-name="Source_20_Text"><text:span text:style-name="T13"><text:s text:c="2"/>│ <text:s/>3. Envia para IA <text:s text:c="21"/>│</text:span></text:span></text:p>
      <text:p text:style-name="P30"><text:span text:style-name="Source_20_Text"><text:span text:style-name="T13"><text:s text:c="2"/>│ <text:s/>4. IA responde: tool_calls ou final <text:s text:c="2"/>│</text:span></text:span></text:p>
      <text:p text:style-name="P30"><text:span text:style-name="Source_20_Text"><text:span text:style-name="T13"><text:s text:c="2"/>│ <text:s/>5. Se tool_calls → busca no Registry <text:s/>│</text:span></text:span></text:p>
      <text:p text:style-name="P30"><text:span text:style-name="Source_20_Text"><text:span text:style-name="T13"><text:s text:c="2"/>│ <text:s/>6. Repete até resposta (máx 3-4 rounds)│</text:span></text:span></text:p>
      <text:p text:style-name="P30"><text:span text:style-name="Source_20_Text"><text:span text:style-name="T13"><text:s text:c="2"/>└────────────────┬───────────────────────┘</text:span></text:span></text:p>
      <text:p text:style-name="P30"><text:span text:style-name="Source_20_Text"><text:span text:style-name="T13"><text:s text:c="19"/>│</text:span></text:span></text:p>
      <text:p text:style-name="P30"><text:span text:style-name="Source_20_Text"><text:span text:style-name="T13"><text:s text:c="19"/>▼</text:span></text:span></text:p>
      <text:p text:style-name="P30"><text:span text:style-name="Source_20_Text"><text:span text:style-name="T13"><text:s text:c="2"/>┌────────────────────────────────────────┐</text:span></text:span></text:p>
      <text:p text:style-name="P30"><text:span text:style-name="Source_20_Text"><text:span text:style-name="T13"><text:s text:c="2"/>│ <text:s text:c="8"/></text:span></text:span><text:span text:style-name="Source_20_Text"><text:span text:style-name="T14"><text:s/>API DA IA </text:span></text:span><text:span text:style-name="Source_20_Text"><text:span text:style-name="T13">() <text:s text:c="6"/>│</text:span></text:span></text:p>
      <text:p text:style-name="P30"><text:span text:style-name="Source_20_Text"><text:span text:style-name="T13"><text:s text:c="2"/>│ <text:s text:c="39"/>│</text:span></text:span></text:p>
      <text:p text:style-name="P30"><text:span text:style-name="Source_20_Text"><text:span text:style-name="T13"><text:s text:c="2"/>│ <text:s/>• Recebe: contexto + skills defs <text:s text:c="5"/>│</text:span></text:span></text:p>
      <text:p text:style-name="P30"><text:span text:style-name="Source_20_Text"><text:span text:style-name="T13"><text:s text:c="2"/>│ <text:s/>• Decide: quais skills acionar <text:s text:c="7"/>│</text:span></text:span></text:p>
      <text:p text:style-name="P30"><text:span text:style-name="Source_20_Text"><text:span text:style-name="T13"><text:s text:c="2"/>│ <text:s/>• Retorna: tool_calls ou resposta <text:s text:c="4"/>│</text:span></text:span></text:p>
      <text:p text:style-name="P30"><text:span text:style-name="Source_20_Text"><text:span text:style-name="T13"><text:s text:c="2"/>└────────────────────────────────────────┘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╠════════════════════════════════════════════════════════════════════════╣</text:span></text:span></text:p>
      <text:p text:style-name="P30"><text:span text:style-name="Source_20_Text"><text:span text:style-name="T13">║ <text:s/>🔄 FLUXO: Binance → Orquestrador → Registry → Executor → IA → Resposta║</text:span></text:span></text:p>
      <text:p text:style-name="P30"><text:span text:style-name="Source_20_Text"><text:span text:style-name="T13">║ <text:s/>✅ VANTAGENS: tokens otimizados | cache local | skills escaláveis <text:s text:c="4"/>║</text:span></text:span></text:p>
      <text:p text:style-name="P30"><text:span text:style-name="Source_20_Text"><text:span text:style-name="T13">╚════════════════════════════════════════════════════════════════════════╝</text:span></text:span></text:p>
      <text:p text:style-name="P30"><text:span text:style-name="Source_20_Text"><text:span text:style-name="T15"/></text:span></text:p>
      <text:p text:style-name="P31"/>
      <text:p text:style-name="P28"><text:span text:style-name="Source_20_Text"><text:span text:style-name="T16"/></text:span></text:p>
      <text:p text:style-name="P28"><text:span text:style-name="Source_20_Text"><text:span text:style-name="T16"/></text:span></text:p>
      <text:p text:style-name="P27"><text:span text:style-name="Source_20_Text"><text:span text:style-name="T17"/></text:span></text:p>
      <text:p text:style-name="P25"><text:span text:style-name="Source_20_Text"><text:span text:style-name="T17"/></text:span></text:p>
      <text:p text:style-name="P19"><text:span text:style-name="Source_20_Text"><text:span text:style-name="T18"><text:s text:c="5"/></text:span></text:span></text:p>
      <text:p text:style-name="P19"><text:span text:style-name="Source_20_Text"><text:span text:style-name="T18"/></text:span></text:p>
      <text:p text:style-name="P19"><text:span text:style-name="Source_20_Text"><text:span text:style-name="T18"/></text:span></text:p>
      <text:p text:style-name="P19"><text:span text:style-name="Source_20_Text"><text:span text:style-name="T18"/></text:span></text:p>
      <text:p text:style-name="P19"><text:span text:style-name="Source_20_Text"><text:span text:style-name="T18"/></text:span></text:p>
      <text:p text:style-name="P19"><text:soft-page-break/><text:span text:style-name="Source_20_Text"><text:span text:style-name="T18"/></text:span></text:p>
      <text:p text:style-name="P19"><text:span text:style-name="Source_20_Text"><text:span text:style-name="T18">═══════════════════════════════════════════════════════════</text:span></text:span></text:p>
      <text:p text:style-name="P32"><text:span text:style-name="Source_20_Text"><text:span text:style-name="T18"><text:s text:c="9"/></text:span></text:span><text:span text:style-name="Source_20_Text"><text:span text:style-name="T19">COMO A CONVERSA COM A API FUNCIONA</text:span></text:span></text:p>
      <text:p text:style-name="P19"><text:span text:style-name="Source_20_Text"><text:span text:style-name="T18">═══════════════════════════════════════════════════════════</text:span></text:span></text:p>
      <text:p text:style-name="P32"><text:span text:style-name="Source_20_Text"><text:span text:style-name="T18"/></text:span></text:p>
      <text:p text:style-name="P19"><text:span text:style-name="Source_20_Text"><text:span text:style-name="T18"><text:s text:c="2"/>SEU BOT <text:s text:c="30"/>API DA IA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1 <text:s text:c="23"/>│ <text:s text:c="5"/>│</text:span></text:span></text:p>
      <text:p text:style-name="P19"><text:span text:style-name="Source_20_Text"><text:span text:style-name="T18"><text:s text:c="5"/>├──┤ • System prompt com regras <text:s text:c="5"/>├───▶ <text:s/>│</text:span></text:span></text:p>
      <text:p text:style-name="P19"><text:span text:style-name="Source_20_Text"><text:span text:style-name="T18"><text:s text:c="5"/>│ <text:s/>│ • Contexto mínimo (30 campos) <text:s text:c="2"/>│ <text:s text:c="5"/>│</text:span></text:span></text:p>
      <text:p text:style-name="P19"><text:span text:style-name="Source_20_Text"><text:span text:style-name="T18"><text:s text:c="5"/>│ <text:s/>│ • Lista de 9 skills <text:s text:c="12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2 <text:s text:c="23"/>│ <text:s text:c="5"/>│</text:span></text:span></text:p>
      <text:p text:style-name="P19"><text:span text:style-name="Source_20_Text"><text:span text:style-name="T18"><text:s text:c="5"/>│◀─┤ IA retorna: <text:s text:c="20"/>│──────│</text:span></text:span></text:p>
      <text:p text:style-name="P19"><text:span text:style-name="Source_20_Text"><text:span text:style-name="T18"><text:s text:c="5"/>│ <text:s/>│ "Quero: orderbook_depth <text:s text:c="8"/>│ <text:s text:c="5"/>│</text:span></text:span></text:p>
      <text:p text:style-name="P19"><text:span text:style-name="Source_20_Text"><text:span text:style-name="T18"><text:s text:c="5"/>│ <text:s/>│ <text:s/>e institutional_map" <text:s text:c="10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 text:c="8"/>↓ Seu bot busca no ↓ <text:s text:c="13"/>│</text:span></text:span></text:p>
      <text:p text:style-name="P19"><text:span text:style-name="Source_20_Text"><text:span text:style-name="T18"><text:s text:c="5"/>│ <text:s text:c="8"/>Skill Registry <text:s text:c="19"/>│</text:span></text:span></text:p>
      <text:p text:style-name="P19"><text:span text:style-name="Source_20_Text"><text:span text:style-name="T18"><text:s text:c="5"/>│ <text:s text:c="8"/>(dados JÁ coletados) <text:s text:c="13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3 <text:s text:c="23"/>│ <text:s text:c="5"/>│</text:span></text:span></text:p>
      <text:p text:style-name="P19"><text:span text:style-name="Source_20_Text"><text:span text:style-name="T18"><text:s text:c="5"/>├──┤ Resultado orderbook_depth: <text:s text:c="5"/>├───▶ <text:s/>│</text:span></text:span></text:p>
      <text:p text:style-name="P19"><text:soft-page-break/><text:span text:style-name="Source_20_Text"><text:span text:style-name="T18"><text:s text:c="5"/>│ <text:s/>│ {bid: 209K, ask: 1.18M...} <text:s text:c="5"/>│ <text:s text:c="5"/>│</text:span></text:span></text:p>
      <text:p text:style-name="P19"><text:span text:style-name="Source_20_Text"><text:span text:style-name="T18"><text:s text:c="5"/>│ <text:s/>│ Resultado institutional_map: <text:s text:c="3"/>│ <text:s text:c="5"/>│</text:span></text:span></text:p>
      <text:p text:style-name="P19"><text:span text:style-name="Source_20_Text"><text:span text:style-name="T18"><text:s text:c="5"/>│ <text:s/>│ {whale_score: -18, shape: B} <text:s text:c="3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4 <text:s text:c="23"/>│ <text:s text:c="5"/>│</text:span></text:span></text:p>
      <text:p text:style-name="P19"><text:span text:style-name="Source_20_Text"><text:span text:style-name="T18"><text:s text:c="5"/>│◀─┤ IA retorna: <text:s text:c="20"/>│──────│</text:span></text:span></text:p>
      <text:p text:style-name="P19"><text:span text:style-name="Source_20_Text"><text:span text:style-name="T18"><text:s text:c="5"/>│ <text:s/>│ "Quero mais: macro_context" <text:s text:c="4"/>│ <text:s text:c="5"/>│</text:span></text:span></text:p>
      <text:p text:style-name="P19"><text:span text:style-name="Source_20_Text"><text:span text:style-name="T18"><text:s text:c="5"/>│ <text:s/>│ (confirmação Risk Off) <text:s text:c="9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5 <text:s text:c="23"/>│ <text:s text:c="5"/>│</text:span></text:span></text:p>
      <text:p text:style-name="P19"><text:span text:style-name="Source_20_Text"><text:span text:style-name="T18"><text:s text:c="5"/>├──┤ Resultado macro_context: <text:s text:c="7"/>├───▶ <text:s/>│</text:span></text:span></text:p>
      <text:p text:style-name="P19"><text:span text:style-name="Source_20_Text"><text:span text:style-name="T18"><text:s text:c="5"/>│ <text:s/>│ {VIX: 25.27, F&amp;G: 12, <text:s text:c="10"/>│ <text:s text:c="5"/>│</text:span></text:span></text:p>
      <text:p text:style-name="P19"><text:span text:style-name="Source_20_Text"><text:span text:style-name="T18"><text:s text:c="5"/>│ <text:s/>│ <text:s/>DXY: alta, SP500: queda} <text:s text:c="6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pan text:style-name="Source_20_Text"><text:span text:style-name="T18"><text:s text:c="5"/>│ <text:s/>┌─────────────────────────────────┐ <text:s text:c="5"/>│</text:span></text:span></text:p>
      <text:p text:style-name="P19"><text:span text:style-name="Source_20_Text"><text:span text:style-name="T18"><text:s text:c="5"/>│ <text:s/>│ RODADA 6 (FINAL) <text:s text:c="15"/>│ <text:s text:c="5"/>│</text:span></text:span></text:p>
      <text:p text:style-name="P19"><text:span text:style-name="Source_20_Text"><text:span text:style-name="T18"><text:s text:c="5"/>│◀─┤ IA retorna DECISÃO: <text:s text:c="12"/>│──────│</text:span></text:span></text:p>
      <text:p text:style-name="P19"><text:span text:style-name="Source_20_Text"><text:span text:style-name="T18"><text:s text:c="5"/>│ <text:s/>│ "WAIT - Não entrar. <text:s text:c="12"/>│ <text:s text:c="5"/>│</text:span></text:span></text:p>
      <text:p text:style-name="P19"><text:span text:style-name="Source_20_Text"><text:span text:style-name="T18"><text:s text:c="5"/>│ <text:s/>│ <text:s/>• Book pesado pro sell side <text:s text:c="3"/>│ <text:s text:c="5"/>│</text:span></text:span></text:p>
      <text:p text:style-name="P19"><text:span text:style-name="Source_20_Text"><text:span text:style-name="T18"><text:s text:c="5"/>│ <text:s/>│ <text:s/>• Whales distribuindo <text:s text:c="9"/>│ <text:s text:c="5"/>│</text:span></text:span></text:p>
      <text:p text:style-name="P19"><text:span text:style-name="Source_20_Text"><text:span text:style-name="T18"><text:s text:c="5"/>│ <text:s/>│ <text:s/>• Macro Risk Off confirma <text:s text:c="5"/>│ <text:s text:c="5"/>│</text:span></text:span></text:p>
      <text:p text:style-name="P19"><text:span text:style-name="Source_20_Text"><text:span text:style-name="T18"><text:s text:c="5"/>│ <text:s/>│ <text:s/>• Confiança: 78%" <text:s text:c="13"/>│ <text:s text:c="5"/>│</text:span></text:span></text:p>
      <text:p text:style-name="P19"><text:span text:style-name="Source_20_Text"><text:span text:style-name="T18"><text:s text:c="5"/>│ <text:s/>└─────────────────────────────────┘ <text:s text:c="5"/>│</text:span></text:span></text:p>
      <text:p text:style-name="P19"><text:span text:style-name="Source_20_Text"><text:span text:style-name="T18"><text:s text:c="5"/>│ <text:s text:c="42"/>│</text:span></text:span></text:p>
      <text:p text:style-name="P19"><text:soft-page-break/><text:span text:style-name="Source_20_Text"><text:span text:style-name="T18"><text:s text:c="5"/>▼ <text:s text:c="42"/>▼</text:span></text:span></text:p>
      <text:p text:style-name="P19"><text:span text:style-name="Source_20_Text"><text:span text:style-name="T18"><text:s text:c="2"/>SINAL PROCESSADO <text:s text:c="23"/>FIM DA CONVERSA</text:span></text:span></text:p>
      <text:p text:style-name="P19"><text:span text:style-name="Source_20_Text"><text:span text:style-name="T18"/></text:span></text:p>
      <text:p text:style-name="P19"><text:span text:style-name="Source_20_Text"><text:span text:style-name="T18">───────────────────────────────────────────────────────</text:span></text:span></text:p>
      <text:p text:style-name="P19"><text:span text:style-name="Source_20_Text"><text:span text:style-name="T20"><text:s text:c="2"/>🔄 </text:span></text:span><text:span text:style-name="Source_20_Text"><text:span text:style-name="T21">RESUMO DO FLUXO:</text:span></text:span></text:p>
      <text:p text:style-name="P19"><text:span text:style-name="Source_20_Text"><text:span text:style-name="T18"><text:s text:c="2"/>1. Bot envia contexto mínimo + skills disponíveis</text:span></text:span></text:p>
      <text:p text:style-name="P19"><text:span text:style-name="Source_20_Text"><text:span text:style-name="T18"><text:s text:c="2"/>2. IA solicita dados específicos via tool_calls</text:span></text:span></text:p>
      <text:p text:style-name="P19"><text:span text:style-name="Source_20_Text"><text:span text:style-name="T18"><text:s text:c="2"/>3. Bot busca no cache local (Skill Registry)</text:span></text:span></text:p>
      <text:p text:style-name="P19"><text:span text:style-name="Source_20_Text"><text:span text:style-name="T18"><text:s text:c="2"/>4. Bot retorna dados → IA analisa → repete se necessário</text:span></text:span></text:p>
      <text:p text:style-name="P19"><text:span text:style-name="Source_20_Text"><text:span text:style-name="T18"><text:s text:c="2"/>5. IA entrega decisão final com confiança</text:span></text:span></text:p>
      <text:p text:style-name="P19"><text:span text:style-name="Source_20_Text"><text:span text:style-name="T18"/></text:span></text:p>
      <text:p text:style-name="P19"><text:span text:style-name="Source_20_Text"><text:span text:style-name="T20"><text:s text:c="2"/>✅ BENEFÍCIOS:</text:span></text:span></text:p>
      <text:p text:style-name="P19"><text:span text:style-name="Source_20_Text"><text:span text:style-name="T18"><text:s text:c="2"/>• Token efficiency: só envia o que a IA pede</text:span></text:span></text:p>
      <text:p text:style-name="P19"><text:span text:style-name="Source_20_Text"><text:span text:style-name="T18"><text:s text:c="2"/>• Latência: dados já coletados em cache local</text:span></text:span></text:p>
      <text:p text:style-name="P19"><text:span text:style-name="Source_20_Text"><text:span text:style-name="T18"><text:s text:c="2"/>• Controle: máximo de 3-4 rodadas por decisão</text:span></text:span></text:p>
      <text:p text:style-name="P19"><text:span text:style-name="Source_20_Text"><text:span text:style-name="T18">───────────────────────────────────────────────────────</text:span></text:span></text:p>
      <text:p text:style-name="P19"><text:span text:style-name="Source_20_Text"><text:span text:style-name="T18"/></text:span></text:p>
      <text:h text:style-name="P33" text:outline-level="2"><text:span text:style-name="Source_20_Text"><text:span text:style-name="T22">5. COMPARAÇÃO DE CENÁRIOS REAIS</text:span></text:span></text:h>
      <text:h text:style-name="P34" text:outline-level="3">Usando o seu JSON como exemplo em 3 cenários diferentes:</text:h>
      <text:p text:style-name="Text_20_body"><text:span text:style-name="Source_20_Text"><text:span text:style-name="T23">COMPARAÇÃO DE CENÁRIOS REAIS (Base: seu JSON</text:span></text:span></text:p>
      <text:p text:style-name="P35"><text:span text:style-name="T24">🔹 CENÁRIO A: Breakout perto de</text:span> resistência  Contexto:</text:p>
      <text:p text:style-name="P35"><text:s/>regime BREAKOUT, resistência em 66940</text:p>
      <text:p text:style-name="Text_20_body">IA solicita: ✅ orderbook_depth <text:s text:c="3"/>→ liquidez para romper? ✅ institutional_map <text:s/>→ defense zones na resistência? ✅ macro_context <text:s text:c="5"/>→ ambiente confirma? ❌ onchain_data <text:s text:c="6"/>→ irrelevante agora ❌ technical_multitf <text:s/>→ já tem no resumo ❌ volume_profile <text:s text:c="4"/>→ S/R já informado ❌ derivatives_data <text:s text:c="2"/>→ não prioritário</text:p>
      <text:p text:style-name="Text_20_body">→<text:span text:style-name="T25"> </text:span><text:span text:style-name="T25">Skills usadas: 3 de 9 → Dados processados: ~2KB (vs 15-20KB hoje)</text:span></text:p>
      <text:p text:style-name="Text_20_body"><text:span text:style-name="T24">🔹 CENÁRIO B: Mercado lateral sem</text:span> eventos ─────────────────────────────────────────── Contexto: regime RANGING, sem alertas, delta neutro</text:p>
      <text:p text:style-name="P35"/>
      <text:p text:style-name="P36"><text:soft-page-break/>IA solicita:</text:p>
      <text:p text:style-name="P35"> ✅ volume_profile <text:s text:c="4"/>→ onde está o value area? ❌ TODO O RESTO <text:s text:c="6"/>→ não necessário</text:p>
      <text:p text:style-name="P35">→ Resposta IA: "WAIT - mercado lateral, sem setup" →</text:p>
      <text:p text:style-name="P37"><text:s/>Skills usadas: 1 de 9 → Dados processados: ~300 bytes</text:p>
      <text:p text:style-name="Text_20_body"><text:span text:style-name="T24">🔹 CENÁRIO C: Whale dump detectado</text:span> (crítico) ─────────────────────────────────────────── Contexto: delta muito negativo, whale alert, queda em andamento</text:p>
      <text:p text:style-name="Text_20_body">IA solicita: ✅ whale_analysis <text:s text:c="4"/>→ detalhes do dump ✅ orderflow_detail <text:s text:c="2"/>→ há absorção? ✅ orderbook_depth <text:s text:c="3"/>→ suporte no book? ✅ derivatives_data <text:s text:c="2"/>→ risco de liquidações em cadeia? ✅ institutional_map <text:s/>→ defense zones abaixo? ❌ macro_context <text:s text:c="5"/>→ urgência &gt; macro ❌ technical_multitf <text:s/>→ indicadores atrasados ❌ onchain_data <text:s text:c="6"/>→ latência alta ❌ volume_profile <text:s text:c="4"/>→ S/R já conhecido</text:p>
      <text:p text:style-name="Text_20_body">→ <text:span text:style-name="T26">Skills usadas: 5 de 9 → Dados processados: ~4KB (dados CERTOS para a situação)</text:span></text:p>
      <text:p text:style-name="Text_20_body">════════════════════════════════════════════════════════ <text:span text:style-name="T24">📊 RESUMO COMPARATIVO</text:span></text:p>
      <text:p text:style-name="Text_20_body">Cenário <text:s/>| Skills Usadas | Dados Enviados | Decisão Típica ───────────────────────────────────────────────────── A (Breakout) <text:s/>| <text:s text:c="3"/>3/9 <text:s text:c="3"/>| <text:s text:c="2"/>~2 KB <text:s text:c="5"/>| WAIT/CONFIRM B (Lateral) <text:s text:c="2"/>| <text:s text:c="3"/>1/9 <text:s text:c="3"/>| ~300 B <text:s text:c="6"/>| WAIT C (Crítico) <text:s text:c="2"/>| <text:s text:c="3"/>5/9 <text:s text:c="3"/>| <text:s text:c="2"/>~4 KB <text:s text:c="5"/>| SELL/PROTECT</text:p>
      <text:p text:style-name="Text_20_body">✅ Ganhos da arquitetura skill-based: • Token efficiency: 10x a 50x menos dados por decisão • Latência: cache local elimina queries externas • Precisão: IA recebe apenas contexto relevante • Escala: novas skills sem impactar o core ═════════════════════════════════════════════════════</text:p>
      <text:p text:style-name="Text_20_body"/>
      <text:p text:style-name="Text_20_body"/>
      <text:p text:style-name="Text_20_body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QUALIDADE: VAI AFETAR OU NÃO?</text:p>
      <text:p text:style-name="Text_20_body">Análise honesta sobre impacto na qualidade das decisões</text:p>
      <text:p text:style-name="Text_20_body"/>
      <text:p text:style-name="Text_20_body">════════════════════════════════════════════════════════</text:p>
      <text:p text:style-name="Text_20_body"/>
      <text:p text:style-name="Text_20_body">🟢<text:span text:style-name="T24"> PODE MELHORAR A QUALIDADE</text:span></text:p>
      <text:p text:style-name="Text_20_body"/>
      <text:p text:style-name="Text_20_body">1️⃣ <text:span text:style-name="T24">FOCO</text:span></text:p>
      <text:p text:style-name="Text_20_body"><text:s text:c="3"/>• Hoje: IA recebe 800 campos e tenta processar tudo</text:p>
      <text:p text:style-name="Text_20_body"><text:s text:c="3"/>• Skill: IA foca em 50-100 campos relevantes</text:p>
      <text:p text:style-name="Text_20_body"><text:s text:c="3"/><text:span text:style-name="T27">→ Decisão mais clara e fundamentada</text:span></text:p>
      <text:p text:style-name="Text_20_body"/>
      <text:p text:style-name="Text_20_body">2️⃣ <text:span text:style-name="T24">RACIOCÍNIO EXPLÍCITO</text:span></text:p>
      <text:p text:style-name="Text_20_body"><text:s text:c="3"/>• Hoje: IA recebe dados e "de alguma forma" decide</text:p>
      <text:p text:style-name="Text_20_body"><text:s text:c="3"/>• Skill: IA EXPLICA porque quer cada dado</text:p>
      <text:p text:style-name="Text_20_body"><text:s text:c="3"/>→ Você vê o raciocínio: "pedi orderbook porque breakout precisa de liquidez"</text:p>
      <text:p text:style-name="Text_20_body"><text:s text:c="2"/><text:span text:style-name="T27"><text:s/>→ Auditável e debugável</text:span></text:p>
      <text:p text:style-name="Text_20_body"/>
      <text:p text:style-name="Text_20_body">3️⃣ <text:span text:style-name="T24">MENOS CONTRADIÇÃO</text:span></text:p>
      <text:p text:style-name="Text_20_body"><text:s text:c="3"/>• Hoje: 15m diz ALTA, 1d diz BAIXA, retail COMPRA, whale VENDE, macro RISK_OFF — tudo junto</text:p>
      <text:p text:style-name="Text_20_body"><text:s text:c="3"/>• Skill: IA processa em etapas, pondera cada dado</text:p>
      <text:p text:style-name="Text_20_body"><text:s text:c="3"/><text:span text:style-name="T27">→ Menos "paralisia por análise"</text:span></text:p>
      <text:p text:style-name="Text_20_body"/>
      <text:p text:style-name="Text_20_body">4️⃣ <text:span text:style-name="T24">ADAPTATIVO</text:span></text:p>
      <text:p text:style-name="Text_20_body"><text:s text:c="3"/>• Breakout? → pede orderbook e institucional</text:p>
      <text:p text:style-name="Text_20_body"><text:s text:c="3"/>• Lateral? <text:s/>→ pede só volume profile</text:p>
      <text:p text:style-name="Text_20_body"><text:s text:c="3"/>• Dump? <text:s text:c="4"/>→ pede whale + fluxo + derivativos</text:p>
      <text:p text:style-name="Text_20_body"><text:s/><text:span text:style-name="T27"><text:s text:c="2"/>→ Dados CERTOS para cada SITUAÇÃO</text:span></text:p>
      <text:p text:style-name="Text_20_body"/>
      <text:p text:style-name="Text_20_body"/>
      <text:p text:style-name="Text_20_body">════════════════════════════════════════════════════════</text:p>
      <text:p text:style-name="Text_20_body"><text:soft-page-break/></text:p>
      <text:p text:style-name="Text_20_body">🔴 <text:span text:style-name="T24">RISCOS QUE PODEM PIORAR (E SUAS SOLUÇÕES)</text:span></text:p>
      <text:p text:style-name="Text_20_body"/>
      <text:p text:style-name="Text_20_body">1️⃣<text:span text:style-name="T24"> IA NÃO PEDE SKILL IMPORTANTE</text:span></text:p>
      <text:p text:style-name="P39"><text:s/><text:span text:style-name="T28"><text:s text:c="2"/>Risco: IA acha que não precisa de macro, mas o dado macro era crucial</text:span></text:p>
      <text:p text:style-name="Text_20_body"/>
      <text:p text:style-name="Text_20_body"><text:s text:c="3"/>✅ SOLUÇÃO: Skill obrigatória mínima</text:p>
      <text:p text:style-name="Text_20_body"><text:s text:c="3"/>• Resumo de mercado (sempre enviado)</text:p>
      <text:p text:style-name="Text_20_body"><text:s text:c="3"/>• Alertas ativos (sempre enviados)</text:p>
      <text:p text:style-name="Text_20_body"><text:s text:c="3"/>• Regime atual (sempre enviado)</text:p>
      <text:p text:style-name="Text_20_body"><text:s text:c="3"/><text:span text:style-name="T29">→ Só skills de DETALHE são opcionais</text:span></text:p>
      <text:p text:style-name="Text_20_body"/>
      <text:p text:style-name="Text_20_body"/>
      <text:p text:style-name="Text_20_body">2️⃣ <text:span text:style-name="T24">LATÊNCIA EXTRA (MÚLTIPLAS RODADAS)</text:span></text:p>
      <text:p text:style-name="Text_20_body"><text:s text:c="3"/>Risco: 3 rodadas com API = 3x tempo de resposta; pode perder oportunidade em mercado rápido</text:p>
      <text:p text:style-name="Text_20_body"/>
      <text:p text:style-name="Text_20_body"><text:s text:c="3"/>✅ SOLUÇÃO: Limite de rodadas + timeout</text:p>
      <text:p text:style-name="Text_20_body"><text:s text:c="3"/>• Máximo 3 rodadas (contexto + 2 skills)</text:p>
      <text:p text:style-name="Text_20_body"><text:s text:c="3"/>• Se urgente (dump/spike), envia mais dados no contexto inicial</text:p>
      <text:p text:style-name="Text_20_body"><text:s text:c="3"/>• Timeout total: 10 segundos</text:p>
      <text:p text:style-name="Text_20_body"><text:s text:c="3"/>• Se timeout → usa última análise válida</text:p>
      <text:p text:style-name="Text_20_body"/>
      <text:p text:style-name="Text_20_body"/>
      <text:p text:style-name="Text_20_body">3️⃣ <text:span text:style-name="T24">IA PEDE SKILLS DEMAIS</text:span></text:p>
      <text:p text:style-name="Text_20_body"><text:s text:c="2"/><text:span text:style-name="T28"><text:s/>Risco: IA pede todas as 9 skills = pior que hoje</text:span></text:p>
      <text:p text:style-name="Text_20_body"/>
      <text:p text:style-name="Text_20_body"><text:s text:c="3"/>✅ SOLUÇÃO: Limite máximo de skills</text:p>
      <text:p text:style-name="Text_20_body"><text:s text:c="3"/>• Máximo 4 skills por análise</text:p>
      <text:p text:style-name="Text_20_body"><text:s text:c="3"/>•<text:span text:style-name="T30"> Se pedir mais, seu bot recusa e manda só as 4 mais relevantes</text:span></text:p>
      <text:p text:style-name="P40"/>
      <text:p text:style-name="Text_20_body"/>
      <text:p text:style-name="Text_20_body"/>
      <text:p text:style-name="Text_20_body"><text:soft-page-break/>4️⃣ <text:span text:style-name="T24">DADOS FICAM "VELHOS" ENTRE RODADAS</text:span></text:p>
      <text:p text:style-name="Text_20_body"><text:s text:c="2"/><text:span text:style-name="T31"><text:s/>Risco: Entre rodada 1 e rodada 3, o preço mudou</text:span></text:p>
      <text:p text:style-name="Text_20_body"/>
      <text:p text:style-name="Text_20_body"><text:s text:c="3"/>✅ SOLUÇÃO: Dados vêm do CACHE da janela</text:p>
      <text:p text:style-name="Text_20_body"><text:s text:c="3"/>• Todos os dados foram coletados no MESMO momento (início da janela)</text:p>
      <text:p text:style-name="Text_20_body"><text:s text:c="3"/>• A skill só FATIA o que já foi coletado</text:p>
      <text:p text:style-name="Text_20_body"><text:s text:c="3"/>•<text:span text:style-name="T32"> Não coleta novamente → mesmo snapshot temporal</text:span></text:p>
      <text:p text:style-name="Text_20_body"/>
      <text:p text:style-name="Text_20_body"/>
      <text:p text:style-name="Text_20_body">════════════════════════════════════════════════════════</text:p>
      <text:p text:style-name="Text_20_body"/>
      <text:p text:style-name="Text_20_body">📊<text:span text:style-name="T24"> VEREDITO FINAL</text:span></text:p>
      <text:p text:style-name="Text_20_body"/>
      <text:p text:style-name="Text_20_body"><text:s text:c="2"/>Critério <text:s text:c="9"/>| Arquitetura Atual | Skill-Based | Vencedor</text:p>
      <text:p text:style-name="Text_20_body"><text:s text:c="2"/>────────────────────────────────────────────────────────</text:p>
      <text:p text:style-name="Text_20_body"><text:s text:c="2"/>Clareza <text:s text:c="10"/>| Média <text:s text:c="12"/>| Alta <text:s text:c="7"/>✅ Skill</text:p>
      <text:p text:style-name="Text_20_body"><text:s text:c="2"/>Auditabilidade <text:s text:c="3"/>| Baixa <text:s text:c="12"/>| Alta <text:s text:c="7"/>✅ Skill</text:p>
      <text:p text:style-name="Text_20_body"><text:s text:c="2"/>Adaptabilidade <text:s text:c="3"/>| Baixa <text:s text:c="12"/>| Alta <text:s text:c="7"/>✅ Skill</text:p>
      <text:p text:style-name="Text_20_body"><text:s text:c="2"/>Latência <text:s text:c="9"/>| Baixa (1 call) <text:s text:c="3"/>| Média (2-3) ⚠️ Empate*</text:p>
      <text:p text:style-name="Text_20_body"><text:s text:c="2"/>Token Efficiency <text:s/>| Baixa <text:s text:c="12"/>| Muito Alta <text:s/>✅ Skill</text:p>
      <text:p text:style-name="Text_20_body"><text:s text:c="2"/>Robustez <text:s text:c="9"/>| Alta <text:s text:c="13"/>| Alta* <text:s text:c="6"/>✅ Empate**</text:p>
      <text:p text:style-name="Text_20_body"/>
      <text:p text:style-name="Text_20_body"><text:s text:c="2"/>* Com as soluções de mitigação aplicadas</text:p>
      <text:p text:style-name="Text_20_body"><text:s text:c="2"/>** Depende da implementação dos timeouts e fallback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🎯<text:span text:style-name="T24"> </text:span><text:span text:style-name="T33">CONCLUSÃO:</text:span></text:p>
      <text:p text:style-name="Text_20_body"><text:s text:c="2"/><text:span text:style-name="T32">A arquitetura skill-based NÃO reduz a qualidade — </text:span></text:p>
      <text:p text:style-name="Text_20_body"><text:span text:style-name="T32"><text:s text:c="2"/>ela REDISTRIBUI a complexidade de forma inteligente</text:span>.</text:p>
      <text:p text:style-name="Text_20_body"/>
      <text:p text:style-name="Text_20_body"><text:s text:c="2"/>• A IA toma decisões MAIS fundamentadas (menos ruído)</text:p>
      <text:p text:style-name="Text_20_body"><text:s text:c="2"/>• Você ganha VISIBILIDADE do raciocínio (auditável)</text:p>
      <text:p text:style-name="Text_20_body"><text:s text:c="2"/>• O sistema se ADAPTA ao contexto (eficiente)</text:p>
      <text:p text:style-name="Text_20_body"/>
      <text:p text:style-name="Text_20_body"><text:s text:c="2"/>Os riscos existem, mas são MITIGÁVEIS com:</text:p>
      <text:p text:style-name="Text_20_body"><text:s text:c="2"/>→ Skills obrigatórias mínimas</text:p>
      <text:p text:style-name="Text_20_body"><text:s text:c="2"/>→ Limites de rodadas e timeout</text:p>
      <text:p text:style-name="Text_20_body"><text:s text:c="2"/>→ Cache com snapshot único por janela</text:p>
      <text:p text:style-name="Text_20_body"/>
      <text:p text:style-name="Text_20_body"><text:s text:c="2"/>Resultado: mesma confiança, com 10-50x menos tokens.</text:p>
      <text:p text:style-name="Text_20_body"/>
      <text:p text:style-name="Text_20_body">════════════════════════════════════════════════════════</text:p>
      <text:p text:style-name="P38">7. MODELO HÍBRIDO (RECOMENDADO PARA SEU CASO)</text:p>
      <text:p text:style-name="Text_20_body">════════════════════════════════════════════════════════</text:p>
      <text:p text:style-name="Text_20_body"/>
      <text:p text:style-name="P41">O MELHOR DOS DOIS MUNDOS</text:p>
      <text:p text:style-name="Text_20_body">• Nem tudo por skill, nem tudo de uma vez</text:p>
      <text:p text:style-name="Text_20_body"/>
      <text:p text:style-name="Text_20_body"/>
      <text:p text:style-name="Text_20_body">📦 <text:span text:style-name="T24">CAMADA 1: CONTEXTO FIXO (SEMPRE ENVIADO)</text:span></text:p>
      <text:p text:style-name="Text_20_body">────────────────────────────────────────────</text:p>
      <text:p text:style-name="Text_20_body">Não é skill. É o baseline que a IA sempre recebe.</text:p>
      <text:p text:style-name="Text_20_body"/>
      <text:p text:style-name="Text_20_body"><text:s text:c="2"/>• Preço, delta, volume</text:p>
      <text:p text:style-name="Text_20_body"><text:s text:c="2"/>• Regime atual + probabilidades</text:p>
      <text:p text:style-name="Text_20_body"><text:s text:c="2"/>• Sessão de trading + alertas ativos</text:p>
      <text:p text:style-name="Text_20_body"><text:s text:c="2"/>• Top 3 suportes e resistências mais próximos</text:p>
      <text:p text:style-name="Text_20_body"><text:s text:c="2"/>• Fear &amp; Greed + VIX (2 números)</text:p>
      <text:p text:style-name="Text_20_body"><text:soft-page-break/><text:s text:c="2"/>• Tendência por timeframe (4 palavras: Alta/Baixa)</text:p>
      <text:p text:style-name="Text_20_body"><text:s text:c="2"/>• Whale delta resumido (1 número)</text:p>
      <text:p text:style-name="Text_20_body"><text:s text:c="2"/>• Orderbook imbalance (1 número)</text:p>
      <text:p text:style-name="Text_20_body"/>
      <text:p text:style-name="Text_20_body">→ <text:span text:style-name="T34">Tamanho: ~500 bytes — SEMPRE vai, sem a IA pedir</text:span></text:p>
      <text:p text:style-name="P42">→ Com isso a IA já sabe a SITUAÇÃO GERAL</text:p>
      <text:p text:style-name="Text_20_body"/>
      <text:p text:style-name="Text_20_body"/>
      <text:p text:style-name="Text_20_body">🔧<text:span text:style-name="T24"> CAMADA 2: SKILLS SOB DEMANDA (IA PEDE SE PRECISAR)</text:span></text:p>
      <text:p text:style-name="Text_20_body">─────────────────────────────────────────────────────</text:p>
      <text:p text:style-name="Text_20_body"><text:s text:c="2"/>📊 orderflow_detail <text:s text:c="2"/>→ sector flow, absorção, buy/sell ratio</text:p>
      <text:p text:style-name="Text_20_body"><text:s text:c="2"/>🐋 whale_analysis <text:s text:c="4"/>→ ordens grandes, acumulação, icebergs</text:p>
      <text:p text:style-name="Text_20_body"><text:s text:c="2"/>📖 orderbook_depth <text:s text:c="3"/>→ L1-L25, slippage, anomalias</text:p>
      <text:p text:style-name="Text_20_body"><text:s text:c="2"/>🏛️ institutional_map <text:s/>→ defense zones, passivo/agressivo</text:p>
      <text:p text:style-name="Text_20_body"><text:s text:c="2"/>🌍 macro_context <text:s text:c="5"/>→ mercados externos, correlações</text:p>
      <text:p text:style-name="Text_20_body"><text:s text:c="2"/>📐 volume_profile <text:s text:c="4"/>→ POC/VAH/VAL, no-man's-land</text:p>
      <text:p text:style-name="Text_20_body"><text:s text:c="2"/>📈 technical_multitf <text:s/>→ RSI/MACD/ADX/CCI detalhado</text:p>
      <text:p text:style-name="Text_20_body"><text:s text:c="2"/>⛓️ onchain_data <text:s text:c="6"/>→ mempool, fees, dificuldade</text:p>
      <text:p text:style-name="Text_20_body"><text:s text:c="2"/>💰 derivatives_data <text:s text:c="2"/>→ funding, OI, long/short ratio</text:p>
      <text:p text:style-name="Text_20_body"/>
      <text:p text:style-name="Text_20_body">→ Máximo 4 skills por análise</text:p>
      <text:p text:style-name="Text_20_body">→ Máximo 2 rodadas de pedidos</text:p>
      <text:p text:style-name="Text_20_body"/>
      <text:p text:style-name="Text_20_body"/>
      <text:p text:style-name="Text_20_body">🎯<text:span text:style-name="T24"> CAMADA 3: DECISÃO FINAL</text:span></text:p>
      <text:p text:style-name="Text_20_body">─────────────────────────</text:p>
      <text:p text:style-name="Text_20_body">IA retorna:</text:p>
      <text:p text:style-name="Text_20_body"><text:s text:c="2"/>• Direção (BUY/SELL/WAIT)</text:p>
      <text:p text:style-name="Text_20_body"><text:s text:c="2"/>• Confiança (0-100%)</text:p>
      <text:p text:style-name="Text_20_body"><text:s text:c="2"/>• Motivo principal</text:p>
      <text:p text:style-name="Text_20_body"><text:s text:c="2"/>• Skills usadas na análise</text:p>
      <text:p text:style-name="Text_20_body"/>
      <text:p text:style-name="Text_20_body"><text:soft-page-break/>Você SABE:</text:p>
      <text:p text:style-name="Text_20_body"><text:s text:c="2"/>✓ Quais dados a IA usou para decidir</text:p>
      <text:p text:style-name="Text_20_body"><text:s text:c="2"/>✓ O raciocínio ("pedi X por causa de Y")</text:p>
      <text:p text:style-name="Text_20_body"><text:s text:c="2"/>✓ Pode AUDITAR se fez sentido</text:p>
      <text:p text:style-name="Text_20_body"/>
      <text:p text:style-name="Text_20_body"/>
      <text:p text:style-name="Text_20_body">═══════════════════════════════════════════════════════</text:p>
      <text:p text:style-name="Text_20_body"/>
      <text:p text:style-name="P43">8. ONDE ISSO ENTRA NA SUA ESTRUTURA ATUAL</text:p>
      <text:p text:style-name="Text_20_body">════════════════════════════════════════════════════════</text:p>
      <text:p text:style-name="Text_20_body"/>
      <text:p text:style-name="Text_20_body">🔄 <text:span text:style-name="T24">MÓDULOS QUE MUDAM</text:span></text:p>
      <text:p text:style-name="Text_20_body">───────────────────</text:p>
      <text:p text:style-name="Text_20_body">market_orchestrator/</text:p>
      <text:p text:style-name="Text_20_body">└── ai/</text:p>
      <text:p text:style-name="Text_20_body"><text:s text:c="4"/>├── ai_payload_builder.py <text:s/>← SIMPLIFICA (só monta resumo)</text:p>
      <text:p text:style-name="Text_20_body"><text:s text:c="4"/>├── payload_compressor.py <text:s/>← PODE REMOVER (dados já pequenos)</text:p>
      <text:p text:style-name="Text_20_body"><text:s text:c="4"/>├── ai_runner.py <text:s text:c="10"/>← MUDA (loop de skills)</text:p>
      <text:p text:style-name="Text_20_body"><text:s text:c="4"/>└── skill_registry.py <text:s text:c="5"/>← NOVO (mapeia skills → dados)</text:p>
      <text:p text:style-name="Text_20_body"/>
      <text:p text:style-name="Text_20_body"/>
      <text:p text:style-name="Text_20_body">✅<text:span text:style-name="T24"> MÓDULOS QUE NÃO MUDAM</text:span></text:p>
      <text:p text:style-name="Text_20_body">───────────────────────</text:p>
      <text:p text:style-name="Text_20_body"><text:s text:c="2"/>• flow_analyzer/ <text:s text:c="7"/>→ continua coletando tudo normalmente</text:p>
      <text:p text:style-name="Text_20_body"><text:s text:c="2"/>• support_resistance/ <text:s text:c="2"/>→ continua calculando tudo normalmente</text:p>
      <text:p text:style-name="Text_20_body"><text:s text:c="2"/>• orderbook_core/ <text:s text:c="6"/>→ continua funcionando igual</text:p>
      <text:p text:style-name="Text_20_body"><text:s text:c="2"/>• fetchers/ <text:s text:c="12"/>→ continua buscando dados igual</text:p>
      <text:p text:style-name="Text_20_body"><text:s text:c="2"/>• monitoring/ <text:s text:c="10"/>→ continua monitorando igual</text:p>
      <text:p text:style-name="Text_20_body"><text:s text:c="2"/>• data_processing/ <text:s text:c="5"/>→ continua processando igual</text:p>
      <text:p text:style-name="Text_20_body"><text:s text:c="2"/>• events/ <text:s text:c="14"/>→ continua salvando eventos igual</text:p>
      <text:p text:style-name="Text_20_body"><text:s text:c="2"/>• ml/ <text:s text:c="18"/>→ continua calculando features igual</text:p>
      <text:p text:style-name="Text_20_body"/>
      <text:p text:style-name="Text_20_body"><text:soft-page-break/></text:p>
      <text:p text:style-name="Text_20_body">🔑<text:span text:style-name="T24"> A DIFERENÇA CHAVE</text:span></text:p>
      <text:p text:style-name="Text_20_body">──────────────────</text:p>
      <text:p text:style-name="P44">ANTES:</text:p>
      <text:p text:style-name="Text_20_body"><text:s text:c="2"/>orchestrator coleta → builder monta tudo → comprime → IA</text:p>
      <text:p text:style-name="Text_20_body"/>
      <text:p text:style-name="P45">AGORA:</text:p>
      <text:p text:style-name="Text_20_body"><text:s text:c="2"/>orchestrator coleta → cache por skill → IA pede → entrega</text:p>
      <text:p text:style-name="Text_20_body"/>
      <text:p text:style-name="Text_20_body"/>
      <text:p text:style-name="Text_20_body">💡 <text:span text:style-name="T35">RESUMO DA INTEGRAÇÃO:</text:span></text:p>
      <text:p text:style-name="Text_20_body"/>
      <text:p text:style-name="Text_20_body"><text:s text:c="2"/>• Os dados são OS MESMOS</text:p>
      <text:p text:style-name="Text_20_body"><text:s text:c="2"/>• A coleta é A MESMA</text:p>
      <text:p text:style-name="Text_20_body"><text:s text:c="2"/>• Só muda COMO e QUANDO chegam na IA</text:p>
      <text:p text:style-name="Text_20_body"/>
      <text:p text:style-name="Text_20_body"><text:s text:c="2"/>→ Menos complexidade no builder</text:p>
      <text:p text:style-name="Text_20_body"><text:s text:c="2"/>→ Mais controle no executor</text:p>
      <text:p text:style-name="Text_20_body"><text:s text:c="2"/>→ Mesma qualidade, menos tokens</text:p>
      <text:p text:style-name="Text_20_body"/>
      <text:p text:style-name="Text_20_body"/>
      <text:p text:style-name="Text_20_body">════════════════════════════════════════════════════════</text:p>
      <text:p text:style-name="Text_20_body">📋<text:span text:style-name="T24"> CHECKLIST DE IMPLEMENTAÇÃO</text:span></text:p>
      <text:p text:style-name="Text_20_body"/>
      <text:p text:style-name="Text_20_body"><text:s text:c="2"/>[ ] 1. Criar skill_registry.py com mapeamento skill→dados</text:p>
      <text:p text:style-name="Text_20_body"><text:s text:c="2"/>[ ] 2. Refatorar ai_payload_builder.py para contexto mínimo</text:p>
      <text:p text:style-name="Text_20_body"><text:s text:c="2"/>[ ] 3. Implementar loop de skills no ai_runner.py</text:p>
      <text:p text:style-name="Text_20_body"><text:s text:c="2"/>[ ] 4. Adicionar limites: max 4 skills, max 2 rodadas</text:p>
      <text:p text:style-name="Text_20_body"><text:s text:c="2"/>[ ] 5. Definir skills obrigatórias do contexto fixo</text:p>
      <text:p text:style-name="Text_20_body"><text:s text:c="2"/>[ ] 6. Testar com os 3 cenários (Breakout/Lateral/Dump)</text:p>
      <text:p text:style-name="Text_20_body"><text:s text:c="2"/>[ ] 7. Medir: tokens usados, latência, acurácia</text:p>
      <text:p text:style-name="Text_20_body"/>
      <text:p text:style-name="Text_20_body"><text:soft-page-break/>════════════════════════════════════════════════════════</text:p>
      <text:p text:style-name="Text_20_body"/>
      <text:list text:style-name="L2">
        <text:list-item>
          <text:p text:style-name="P46">RESPOSTA DIRETA: AFETA A QUALIDADE?</text:p>
          <text:p text:style-name="P47"> ════════════════════════════════════════════════════</text:p>
        </text:list-item>
      </text:list>
      <text:p text:style-name="Text_20_body">🎯<text:span text:style-name="T24"> VEREDITO FINAL</text:span></text:p>
      <text:p text:style-name="Text_20_body"><text:span text:style-name="T32">OS DADOS SÃO EXATAMENTE OS MESMOS</text:span>.</text:p>
      <text:p text:style-name="Text_20_body">• Você coleta tudo igual • Processa tudo igual • Calcula tudo igual • Armazena tudo igual</text:p>
      <text:p text:style-name="Text_20_body">A única diferença: → Em vez de JOGAR TUDO na IA de uma vez → Você ORGANIZA em fatias (skills) → E deixa a IA PEDIR o que precisa</text:p>
      <text:p text:style-name="Text_20_body">🏥<text:span text:style-name="T24"> ANALOGIA: O MÉDICO E OS EXAMES</text:span></text:p>
      <text:p text:style-name="P48">HOJE (Arquitetura Atual): </text:p>
      <text:p text:style-name="P48">• Você faz TODOS os exames e joga tudo na mesa</text:p>
      <text:p text:style-name="P48"> • O médico recebe 40 resultados de uma vez </text:p>
      <text:p text:style-name="P48">• Ele precisa procurar o que importa no meio do ruído</text:p>
      <text:p text:style-name="P48"> • Risco: perder o sinal importante no volume de dados</text:p>
      <text:p text:style-name="P49">COM SKILLS (Nova Arquitetura): </text:p>
      <text:p text:style-name="P48">• Você diz os sintomas (contexto mínimo) </text:p>
      <text:p text:style-name="P48">• O médico pede: "quero hemograma e raio-X"</text:p>
      <text:p text:style-name="P48"> • Recebe SÓ o que pediu → analisa com FOCO</text:p>
      <text:p text:style-name="P48"> • Se precisar de mais: "agora quero tomografia" </text:p>
      <text:p text:style-name="P48">• Recebe, analisa, decide</text:p>
      <text:p text:style-name="P50">O hospital tem TODOS os exames prontos. O médico pede o que precisa, quando precisa. A qualidade do diagnóstico MELHORA.</text:p>
      <text:p text:style-name="Text_20_body">════════════════════════════════════════════════════════ 📊<text:span text:style-name="T36"> </text:span><text:span text:style-name="T37">IMPACTO REAL: ANTES vs DEPOIS</text:span></text:p>
      <text:p text:style-name="Text_20_body"> ✅ CONCLUSÃO DIRETA</text:p>
      <text:list text:style-name="L3">
        <text:list-item>
          <text:p text:style-name="P51">QUALIDADE:---------Tende a MELHORAR (não piorar)</text:p>
        </text:list-item>
        <text:list-item>
          <text:p text:style-name="P51"><text:s/>CUSTO:----------------- REDUZ SIGNIFICATIVAMENTE (10-50x menos tokens)</text:p>
        </text:list-item>
        <text:list-item>
          <text:p text:style-name="P52"><text:s/>LATÊNCIA:------------ Pode aumentar levemente (2-3 rodadas, &lt;10s total)</text:p>
        </text:list-item>
        <text:list-item>
          <text:p text:style-name="P52"><text:s/>AUDITABILIDADE:---- MELHORA MUITO (raciocínio explícito)</text:p>
        </text:list-item>
        <text:list-item>
          <text:p text:style-name="P53"><text:s/>CONTROLE:-------------Você decide o que é obrigatório vs opcional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🔑<text:span text:style-name="T33"> PONTE CHAVE:</text:span></text:p>
      <text:p text:style-name="Text_20_body">Não é sobre ter MENOS dados. É sobre entregar os dados CERTOS, na hora CERTA.</text:p>
      <text:p text:style-name="P54">→ A IA recebe menos ruído </text:p>
      <text:p text:style-name="P54">→ Toma decisões mais fundamentadas </text:p>
      <text:p text:style-name="P54">→ Você entende o "porquê" de cada pedido </text:p>
      <text:p text:style-name="P54">→ O sistema escala sem reescrever o core</text:p>
      <text:p text:style-name="Text_20_body">════════════════════════════════════════════════════════🚀 <text:span text:style-name="T24">PRÓXIMOS PASSOS RECOMENDADOS</text:span></text:p>
      <text:list text:style-name="L4">
        <text:list-item>
          <text:p text:style-name="P55">Implementar skill_registry.py (mapeamento skill→dados)</text:p>
        </text:list-item>
        <text:list-item>
          <text:p text:style-name="P55">Definir contexto fixo mínimo (~500 bytes obrigatórios)</text:p>
        </text:list-item>
        <text:list-item>
          <text:p text:style-name="P55">Refatorar ai_runner.py para loop de skills (max 2 rodadas)</text:p>
        </text:list-item>
        <text:list-item>
          <text:p text:style-name="P55">Adicionar limites: max 4 skills por análise</text:p>
        </text:list-item>
        <text:list-item>
          <text:p text:style-name="P55">Testar A/B: mesma janela, duas arquiteturas, comparar decisões</text:p>
        </text:list-item>
        <text:list-item>
          <text:p text:style-name="P55">Medir: tokens, latência, acurácia, satisfação do usuário</text:p>
        </text:list-item>
      </text:list>
      <text:p text:style-name="P56">Estimativa de esforço: 2-3 dias de desenvolvimento Risco:</text:p>
      <text:p text:style-name="P56">Baixo (dados e coleta não mudam, só o fluxo para IA)</text:p>
      <text:p text:style-name="P56">Retorno: Alto (custo reduzido + qualidade auditável)</text:p>
      <text:p text:style-name="Text_20_body">════════════════════════════════════════════════════════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2:11:05.574370900</meta:creation-date>
    <dc:date>2026-04-02T15:02:22.206936300</dc:date>
    <meta:editing-duration>PT20M35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23" meta:paragraph-count="586" meta:word-count="3485" meta:character-count="31724" meta:non-whitespace-character-count="19541"/>
  </office:meta>
</office:document-meta>
</file>