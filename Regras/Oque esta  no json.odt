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6033" officeooo:paragraph-rsid="001c6033" fo:background-color="#ffff0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MÉTODOS APLICADO AO ARQUIVO JSON PARA ANALIS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1:40:55.168800600</meta:creation-date>
    <dc:date>2026-04-02T12:10:32.316581600</dc:date>
    <meta:editing-duration>PT19M22S</meta:editing-duration>
    <meta:editing-cycles>1</meta:editing-cycles>
    <meta:document-statistic meta:table-count="0" meta:image-count="0" meta:object-count="0" meta:page-count="1" meta:paragraph-count="1" meta:word-count="9" meta:character-count="54" meta:non-whitespace-character-count="46"/>
    <meta:generator>LibreOffice/26.2.0.3$Windows_X86_64 LibreOffice_project/620$Build-3</meta:generator>
  </office:meta>
</office:document-meta>
</file>